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Anchor</text:p>
          </table:table-cell>
          <table:table-cell table:style-name="ce1" office:value-type="string">
            <text:p>Gloss</text:p>
          </table:table-cell>
          <table:table-cell table:style-name="ce1" office:value-type="string">
            <text:p>Early</text:p>
          </table:table-cell>
          <table:table-cell table:style-name="ce1" office:value-type="string">
            <text:p>Gloss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Middle</text:p>
          </table:table-cell>
          <table:table-cell table:style-name="ce1" office:value-type="string">
            <text:p>Gloss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Late</text:p>
          </table:table-cell>
          <table:table-cell table:style-name="ce1" office:value-type="string">
            <text:p>Gloss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Stability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Coun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Q. an-</text:p>
          </table:table-cell>
          <table:table-cell table:style-name="ce2" office:value-type="string">
            <text:p>intensive</text:p>
          </table:table-cell>
          <table:table-cell office:value-type="string">
            <text:p>AKA</text:p>
          </table:table-cell>
          <table:table-cell office:value-type="string">
            <text:p>*intensive</text:p>
          </table:table-cell>
          <table:table-cell office:value-type="string">
            <text:p>GL/17</text:p>
          </table:table-cell>
          <table:table-cell office:value-type="string">
            <text:p>A/E/I/N</text:p>
          </table:table-cell>
          <table:table-cell office:value-type="string">
            <text:p>intensive</text:p>
          </table:table-cell>
          <table:table-cell office:value-type="string">
            <text:p>EtyAC/A, E, I, N</text:p>
          </table:table-cell>
          <table:table-cell office:value-type="string">
            <text:p>Q. an-</text:p>
          </table:table-cell>
          <table:table-cell office:value-type="string">
            <text:p>intensive</text:p>
          </table:table-cell>
          <table:table-cell office:value-type="string">
            <text:p>Let/279</text:p>
          </table:table-cell>
          <table:table-cell office:value-type="string">
            <text:p>Full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Q. Avar</text:p>
          </table:table-cell>
          <table:table-cell table:style-name="ce2" office:value-type="string">
            <text:p>refuser</text:p>
          </table:table-cell>
          <table:table-cell table:number-columns-repeated="3"/>
          <table:table-cell office:value-type="string">
            <text:p>ABAR</text:p>
          </table:table-cell>
          <table:table-cell office:value-type="string">
            <text:p>*refuser</text:p>
          </table:table-cell>
          <table:table-cell office:value-type="string">
            <text:p>Ety/AB</text:p>
          </table:table-cell>
          <table:table-cell office:value-type="string">
            <text:p>Q. Avari</text:p>
          </table:table-cell>
          <table:table-cell office:value-type="string">
            <text:p>Refuser</text:p>
          </table:table-cell>
          <table:table-cell office:value-type="string">
            <text:p>WJ/37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N./S. annon</text:p>
          </table:table-cell>
          <table:table-cell table:style-name="ce2" office:value-type="string">
            <text:p>gate, door</text:p>
          </table:table-cell>
          <table:table-cell office:value-type="string">
            <text:p>G. anna</text:p>
          </table:table-cell>
          <table:table-cell office:value-type="string">
            <text:p>door</text:p>
          </table:table-cell>
          <table:table-cell office:value-type="string">
            <text:p>GL/19</text:p>
          </table:table-cell>
          <table:table-cell office:value-type="string">
            <text:p>AD</text:p>
          </table:table-cell>
          <table:table-cell office:value-type="string">
            <text:p>entrance, gate</text:p>
          </table:table-cell>
          <table:table-cell office:value-type="string">
            <text:p>Ety/AD</text:p>
          </table:table-cell>
          <table:table-cell office:value-type="string">
            <text:p>Q. ando</text:p>
          </table:table-cell>
          <table:table-cell office:value-type="string">
            <text:p>gate</text:p>
          </table:table-cell>
          <table:table-cell office:value-type="string">
            <text:p>LotR/1122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Q. ar</text:p>
          </table:table-cell>
          <table:table-cell table:style-name="ce2"/>
          <table:table-cell table:number-columns-repeated="6"/>
          <table:table-cell office:value-type="string">
            <text:p>AD</text:p>
          </table:table-cell>
          <table:table-cell office:value-type="string">
            <text:p>beside</text:p>
          </table:table-cell>
          <table:table-cell office:value-type="string">
            <text:p>PE17/71; VT49/2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AFA</text:p>
          </table:table-cell>
          <table:table-cell office:value-type="string">
            <text:p>open, begin</text:p>
          </table:table-cell>
          <table:table-cell office:value-type="string">
            <text:p>QL/2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AHA</text:p>
          </table:table-cell>
          <table:table-cell office:value-type="string">
            <text:p>know</text:p>
          </table:table-cell>
          <table:table-cell office:value-type="string">
            <text:p>QL/2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Q. aiwe</text:p>
          </table:table-cell>
          <table:table-cell office:value-type="string">
            <text:p>bird</text:p>
          </table:table-cell>
          <table:table-cell office:value-type="string">
            <text:p>AI̯²</text:p>
          </table:table-cell>
          <table:table-cell office:value-type="string">
            <text:p>*bird</text:p>
          </table:table-cell>
          <table:table-cell office:value-type="string">
            <text:p>GL/17</text:p>
          </table:table-cell>
          <table:table-cell office:value-type="string">
            <text:p>AIWĒ</text:p>
          </table:table-cell>
          <table:table-cell office:value-type="string">
            <text:p>(small) bird</text:p>
          </table:table-cell>
          <table:table-cell office:value-type="string">
            <text:p>Ety/AIWĒ</text:p>
          </table:table-cell>
          <table:table-cell office:value-type="string">
            <text:p>Q. aiwe</text:p>
          </table:table-cell>
          <table:table-cell office:value-type="string">
            <text:p>bird</text:p>
          </table:table-cell>
          <table:table-cell office:value-type="string">
            <text:p>UT/40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. Aglon</text:p>
          </table:table-cell>
          <table:table-cell office:value-type="string">
            <text:p>narrow pass</text:p>
          </table:table-cell>
          <table:table-cell table:number-columns-repeated="3"/>
          <table:table-cell office:value-type="string">
            <text:p>AK</text:p>
          </table:table-cell>
          <table:table-cell office:value-type="string">
            <text:p>narrow, confined</text:p>
          </table:table-cell>
          <table:table-cell office:value-type="string">
            <text:p>Ety/AK</text:p>
          </table:table-cell>
          <table:table-cell office:value-type="string">
            <text:p>AKAS</text:p>
          </table:table-cell>
          <table:table-cell office:value-type="string">
            <text:p>neck, ridge</text:p>
          </table:table-cell>
          <table:table-cell office:value-type="string">
            <text:p>PE17/92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office:value-type="string">
            <text:p>AK</text:p>
          </table:table-cell>
          <table:table-cell office:value-type="string">
            <text:p>hostile return</text:p>
          </table:table-cell>
          <table:table-cell office:value-type="string">
            <text:p>PE17/16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ALA¹</text:p>
          </table:table-cell>
          <table:table-cell office:value-type="string">
            <text:p>gaze</text:p>
          </table:table-cell>
          <table:table-cell office:value-type="string">
            <text:p>QL/2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Q. alma/alme</text:p>
          </table:table-cell>
          <table:table-cell office:value-type="string">
            <text:p>good fortune</text:p>
          </table:table-cell>
          <table:table-cell table:number-columns-repeated="3"/>
          <table:table-cell office:value-type="string">
            <text:p>ALA</text:p>
          </table:table-cell>
          <table:table-cell office:value-type="string">
            <text:p>*blessed</text:p>
          </table:table-cell>
          <table:table-cell office:value-type="string">
            <text:p>Ety/ÁLAM</text:p>
          </table:table-cell>
          <table:table-cell office:value-type="string">
            <text:p>ALA</text:p>
          </table:table-cell>
          <table:table-cell office:value-type="string">
            <text:p>good, blessed</text:p>
          </table:table-cell>
          <table:table-cell office:value-type="string">
            <text:p>PE17/14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office:value-type="string">
            <text:p>(L)ALAM</text:p>
          </table:table-cell>
          <table:table-cell office:value-type="string">
            <text:p>elm-tree</text:p>
          </table:table-cell>
          <table:table-cell office:value-type="string">
            <text:p>Ety/ÁLAM</text:p>
          </table:table-cell>
          <table:table-cell office:value-type="string">
            <text:p>ALAB</text:p>
          </table:table-cell>
          <table:table-cell office:value-type="string">
            <text:p>elm</text:p>
          </table:table-cell>
          <table:table-cell office:value-type="string">
            <text:p>PE17/153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Q. alqua</text:p>
          </table:table-cell>
          <table:table-cell office:value-type="string">
            <text:p>swan</text:p>
          </table:table-cell>
          <table:table-cell office:value-type="string">
            <text:p>(I)ḶKḶ</text:p>
          </table:table-cell>
          <table:table-cell office:value-type="string">
            <text:p>*appearance</text:p>
          </table:table-cell>
          <table:table-cell office:value-type="string">
            <text:p>QL/30</text:p>
          </table:table-cell>
          <table:table-cell office:value-type="string">
            <text:p>(A)LAK</text:p>
          </table:table-cell>
          <table:table-cell office:value-type="string">
            <text:p>swift, rushing</text:p>
          </table:table-cell>
          <table:table-cell office:value-type="string">
            <text:p>Ety/ÁLAK, LAK²</text:p>
          </table:table-cell>
          <table:table-cell office:value-type="string">
            <text:p>ALAK</text:p>
          </table:table-cell>
          <table:table-cell office:value-type="string">
            <text:p>?</text:p>
          </table:table-cell>
          <table:table-cell office:value-type="string">
            <text:p>PE18/100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  <table:table-cell office:value-type="string">
            <text:p>ALAT</text:p>
          </table:table-cell>
          <table:table-cell office:value-type="string">
            <text:p>large, great in size</text:p>
          </table:table-cell>
          <table:table-cell office:value-type="string">
            <text:p>Ety/ÁLA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ALU</text:p>
          </table:table-cell>
          <table:table-cell office:value-type="string">
            <text:p>cleanse, dress</text:p>
          </table:table-cell>
          <table:table-cell office:value-type="string">
            <text:p>QL/3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Q. amil(le)</text:p>
          </table:table-cell>
          <table:table-cell office:value-type="string">
            <text:p>mother</text:p>
          </table:table-cell>
          <table:table-cell office:value-type="string">
            <text:p>AMA</text:p>
          </table:table-cell>
          <table:table-cell office:value-type="string">
            <text:p>*mother</text:p>
          </table:table-cell>
          <table:table-cell office:value-type="string">
            <text:p>QL/30</text:p>
          </table:table-cell>
          <table:table-cell office:value-type="string">
            <text:p>AM¹</text:p>
          </table:table-cell>
          <table:table-cell office:value-type="string">
            <text:p>mother</text:p>
          </table:table-cell>
          <table:table-cell office:value-type="string">
            <text:p>Ety/AM¹</text:p>
          </table:table-cell>
          <table:table-cell office:value-type="string">
            <text:p>AM/EM</text:p>
          </table:table-cell>
          <table:table-cell office:value-type="string">
            <text:p>mother</text:p>
          </table:table-cell>
          <table:table-cell office:value-type="string">
            <text:p>VT48/17, 1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office:value-type="string">
            <text:p>AM(U)</text:p>
          </table:table-cell>
          <table:table-cell office:value-type="string">
            <text:p>up(wards)</text:p>
          </table:table-cell>
          <table:table-cell office:value-type="string">
            <text:p>QL/30</text:p>
          </table:table-cell>
          <table:table-cell office:value-type="string">
            <text:p>AM²</text:p>
          </table:table-cell>
          <table:table-cell office:value-type="string">
            <text:p>up</text:p>
          </table:table-cell>
          <table:table-cell office:value-type="string">
            <text:p>Ety/AM²</text:p>
          </table:table-cell>
          <table:table-cell office:value-type="string">
            <text:p>AM</text:p>
          </table:table-cell>
          <table:table-cell office:value-type="string">
            <text:p>go up</text:p>
          </table:table-cell>
          <table:table-cell office:value-type="string">
            <text:p>PE17/15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office:value-type="string">
            <text:p>AMA</text:p>
          </table:table-cell>
          <table:table-cell office:value-type="string">
            <text:p>addition, increase</text:p>
          </table:table-cell>
          <table:table-cell office:value-type="string">
            <text:p>PE17/9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Q. anda</text:p>
          </table:table-cell>
          <table:table-cell office:value-type="string">
            <text:p>long</text:p>
          </table:table-cell>
          <table:table-cell office:value-type="string">
            <text:p>NÐN</text:p>
          </table:table-cell>
          <table:table-cell office:value-type="string">
            <text:p>stretch</text:p>
          </table:table-cell>
          <table:table-cell office:value-type="string">
            <text:p>QL/31</text:p>
          </table:table-cell>
          <table:table-cell office:value-type="string">
            <text:p>ANAD</text:p>
          </table:table-cell>
          <table:table-cell office:value-type="string">
            <text:p>*long</text:p>
          </table:table-cell>
          <table:table-cell office:value-type="string">
            <text:p>Ety/ÁNAD</text:p>
          </table:table-cell>
          <table:table-cell office:value-type="string">
            <text:p>ANAD</text:p>
          </table:table-cell>
          <table:table-cell office:value-type="string">
            <text:p>long</text:p>
          </table:table-cell>
          <table:table-cell office:value-type="string">
            <text:p>PE17/40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. anta</text:p>
          </table:table-cell>
          <table:table-cell office:value-type="string">
            <text:p>face</text:p>
          </table:table-cell>
          <table:table-cell table:number-columns-repeated="3"/>
          <table:table-cell office:value-type="string">
            <text:p>ANAT</text:p>
          </table:table-cell>
          <table:table-cell office:value-type="string">
            <text:p>*face</text:p>
          </table:table-cell>
          <table:table-cell office:value-type="string">
            <text:p>EtyAC/ANA¹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. ang</text:p>
          </table:table-cell>
          <table:table-cell office:value-type="string">
            <text:p>iron</text:p>
          </table:table-cell>
          <table:table-cell office:value-type="string">
            <text:p>ANGA</text:p>
          </table:table-cell>
          <table:table-cell office:value-type="string">
            <text:p>iron</text:p>
          </table:table-cell>
          <table:table-cell office:value-type="string">
            <text:p>QL/31</text:p>
          </table:table-cell>
          <table:table-cell office:value-type="string">
            <text:p>ANGĀ</text:p>
          </table:table-cell>
          <table:table-cell office:value-type="string">
            <text:p>iron</text:p>
          </table:table-cell>
          <table:table-cell office:value-type="string">
            <text:p>Ety/ANGĀ</text:p>
          </table:table-cell>
          <table:table-cell office:value-type="string">
            <text:p>ANGA</text:p>
          </table:table-cell>
          <table:table-cell office:value-type="string">
            <text:p>iron</text:p>
          </table:table-cell>
          <table:table-cell office:value-type="string">
            <text:p>PM/36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  <table:table-cell office:value-type="string">
            <text:p>ANGWA</text:p>
          </table:table-cell>
          <table:table-cell office:value-type="string">
            <text:p>snake</text:p>
          </table:table-cell>
          <table:table-cell office:value-type="string">
            <text:p>Ety/ANGWA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office:value-type="string">
            <text:p>AP</text:p>
          </table:table-cell>
          <table:table-cell office:value-type="string">
            <text:p>cook</text:p>
          </table:table-cell>
          <table:table-cell office:value-type="string">
            <text:p>Ety/AP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AQA</text:p>
          </table:table-cell>
          <table:table-cell office:value-type="string">
            <text:p>*seize</text:p>
          </table:table-cell>
          <table:table-cell office:value-type="string">
            <text:p>QL/3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office:value-type="string">
            <text:p>AR¹</text:p>
          </table:table-cell>
          <table:table-cell office:value-type="string">
            <text:p>day</text:p>
          </table:table-cell>
          <table:table-cell office:value-type="string">
            <text:p>Ety/AR¹</text:p>
          </table:table-cell>
          <table:table-cell office:value-type="string">
            <text:p>AS</text:p>
          </table:table-cell>
          <table:table-cell office:value-type="string">
            <text:p>warmth</text:p>
          </table:table-cell>
          <table:table-cell office:value-type="string">
            <text:p>MR/380; PE17/145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  <table:table-cell office:value-type="string">
            <text:p>(Ʒ)ARA</text:p>
          </table:table-cell>
          <table:table-cell office:value-type="string">
            <text:p>spread, wide places</text:p>
          </table:table-cell>
          <table:table-cell office:value-type="string">
            <text:p>QL/32</text:p>
          </table:table-cell>
          <table:table-cell office:value-type="string">
            <text:p>AR²</text:p>
          </table:table-cell>
          <table:table-cell office:value-type="string">
            <text:p>beside, outside</text:p>
          </table:table-cell>
          <table:table-cell office:value-type="string">
            <text:p>Ety/AR²</text:p>
          </table:table-cell>
          <table:table-cell office:value-type="string">
            <text:p>AR</text:p>
          </table:table-cell>
          <table:table-cell office:value-type="string">
            <text:p>beyond, further than; along side</text:p>
          </table:table-cell>
          <table:table-cell office:value-type="string">
            <text:p>PE17/147; VT43/33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ARA</text:p>
          </table:table-cell>
          <table:table-cell office:value-type="string">
            <text:p>(be) dry</text:p>
          </table:table-cell>
          <table:table-cell office:value-type="string">
            <text:p>QL/3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8"/>
          <table:table-cell office:value-type="string">
            <text:p>ARAN</text:p>
          </table:table-cell>
          <table:table-cell office:value-type="string">
            <text:p>good, excellent, noble</text:p>
          </table:table-cell>
          <table:table-cell office:value-type="string">
            <text:p>PE17/14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8"/>
          <table:table-cell office:value-type="string">
            <text:p>ARAT</text:p>
          </table:table-cell>
          <table:table-cell office:value-type="string">
            <text:p>good, excellent, noble</text:p>
          </table:table-cell>
          <table:table-cell office:value-type="string">
            <text:p>PE17/14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8"/>
          <table:table-cell office:value-type="string">
            <text:p>ARI</text:p>
          </table:table-cell>
          <table:table-cell office:value-type="string">
            <text:p>good, excellent, noble</text:p>
          </table:table-cell>
          <table:table-cell office:value-type="string">
            <text:p>PE17/14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ASA</text:p>
          </table:table-cell>
          <table:table-cell office:value-type="string">
            <text:p>*beside</text:p>
          </table:table-cell>
          <table:table-cell office:value-type="string">
            <text:p>QL/33; GL/48</text:p>
          </table:table-cell>
          <table:table-cell table:number-columns-repeated="3"/>
          <table:table-cell office:value-type="string">
            <text:p>AS²</text:p>
          </table:table-cell>
          <table:table-cell office:value-type="string">
            <text:p>beside</text:p>
          </table:table-cell>
          <table:table-cell office:value-type="string">
            <text:p>VT47/31; VT48/25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ASAKA</text:p>
          </table:table-cell>
          <table:table-cell office:value-type="string">
            <text:p>*waterfall</text:p>
          </table:table-cell>
          <table:table-cell office:value-type="string">
            <text:p>QL/29; GL/1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office:value-type="string">
            <text:p>ASAT</text:p>
          </table:table-cell>
          <table:table-cell office:value-type="string">
            <text:p>*dust</text:p>
          </table:table-cell>
          <table:table-cell office:value-type="string">
            <text:p>Ety/ÁS-A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. atta</text:p>
          </table:table-cell>
          <table:table-cell office:value-type="string">
            <text:p>two</text:p>
          </table:table-cell>
          <table:table-cell office:value-type="string">
            <text:p>ATA</text:p>
          </table:table-cell>
          <table:table-cell office:value-type="string">
            <text:p>dual</text:p>
          </table:table-cell>
          <table:table-cell office:value-type="string">
            <text:p>QL/33</text:p>
          </table:table-cell>
          <table:table-cell office:value-type="string">
            <text:p>AT(AT)</text:p>
          </table:table-cell>
          <table:table-cell office:value-type="string">
            <text:p>again, back</text:p>
          </table:table-cell>
          <table:table-cell office:value-type="string">
            <text:p>Ety/AT</text:p>
          </table:table-cell>
          <table:table-cell office:value-type="string">
            <text:p>AT</text:p>
          </table:table-cell>
          <table:table-cell office:value-type="string">
            <text:p>back; two</text:p>
          </table:table-cell>
          <table:table-cell office:value-type="string">
            <text:p>PE17/148; VT42/2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Q. atar</text:p>
          </table:table-cell>
          <table:table-cell office:value-type="string">
            <text:p>father</text:p>
          </table:table-cell>
          <table:table-cell office:value-type="string">
            <text:p>Q. atar</text:p>
          </table:table-cell>
          <table:table-cell office:value-type="string">
            <text:p>father</text:p>
          </table:table-cell>
          <table:table-cell office:value-type="string">
            <text:p>QL/33</text:p>
          </table:table-cell>
          <table:table-cell office:value-type="string">
            <text:p>ATA</text:p>
          </table:table-cell>
          <table:table-cell office:value-type="string">
            <text:p>father</text:p>
          </table:table-cell>
          <table:table-cell office:value-type="string">
            <text:p>Ety/ATA</text:p>
          </table:table-cell>
          <table:table-cell office:value-type="string">
            <text:p>AT(AR)</text:p>
          </table:table-cell>
          <table:table-cell office:value-type="string">
            <text:p>father</text:p>
          </table:table-cell>
          <table:table-cell office:value-type="string">
            <text:p>VT48/19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office:value-type="string">
            <text:p>AW̯A</text:p>
          </table:table-cell>
          <table:table-cell office:value-type="string">
            <text:p>*wealth</text:p>
          </table:table-cell>
          <table:table-cell office:value-type="string">
            <text:p>QL/33</text:p>
          </table:table-cell>
          <table:table-cell table:number-columns-repeated="3"/>
          <table:table-cell office:value-type="string">
            <text:p>AW</text:p>
          </table:table-cell>
          <table:table-cell office:value-type="string">
            <text:p>possess, own, keep</text:p>
          </table:table-cell>
          <table:table-cell office:value-type="string">
            <text:p>PE22/151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AWA</text:p>
          </table:table-cell>
          <table:table-cell office:value-type="string">
            <text:p>burn; be parched</text:p>
          </table:table-cell>
          <table:table-cell office:value-type="string">
            <text:p>QL/3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Q. aiqa</text:p>
          </table:table-cell>
          <table:table-cell office:value-type="string">
            <text:p>steep</text:p>
          </table:table-cell>
          <table:table-cell office:value-type="string">
            <text:p>Q. aiko</text:p>
          </table:table-cell>
          <table:table-cell office:value-type="string">
            <text:p>cliff</text:p>
          </table:table-cell>
          <table:table-cell office:value-type="string">
            <text:p>QL/29</text:p>
          </table:table-cell>
          <table:table-cell office:value-type="string">
            <text:p>AYAK</text:p>
          </table:table-cell>
          <table:table-cell office:value-type="string">
            <text:p>sharp, pointed</text:p>
          </table:table-cell>
          <table:table-cell office:value-type="string">
            <text:p>Ety/AYAK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Q. Ainu</text:p>
          </table:table-cell>
          <table:table-cell/>
          <table:table-cell office:value-type="string">
            <text:p>AY̯A</text:p>
          </table:table-cell>
          <table:table-cell office:value-type="string">
            <text:p>honour, revere</text:p>
          </table:table-cell>
          <table:table-cell office:value-type="string">
            <text:p>QL/34</text:p>
          </table:table-cell>
          <table:table-cell office:value-type="string">
            <text:p>(A)YAN</text:p>
          </table:table-cell>
          <table:table-cell office:value-type="string">
            <text:p>*holy</text:p>
          </table:table-cell>
          <table:table-cell office:value-type="string">
            <text:p>Ety/AYAN, YAN</text:p>
          </table:table-cell>
          <table:table-cell office:value-type="string">
            <text:p>AYA(N)</text:p>
          </table:table-cell>
          <table:table-cell office:value-type="string">
            <text:p>blessed; treat with awe</text:p>
          </table:table-cell>
          <table:table-cell office:value-type="string">
            <text:p>PE17/27, 149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office:value-type="string">
            <text:p>AB</text:p>
          </table:table-cell>
          <table:table-cell office:value-type="string">
            <text:p>refuse, deny, say no</text:p>
          </table:table-cell>
          <table:table-cell office:value-type="string">
            <text:p>Ety/AB</text:p>
          </table:table-cell>
          <table:table-cell office:value-type="string">
            <text:p>BĀ/ABA</text:p>
          </table:table-cell>
          <table:table-cell office:value-type="string">
            <text:p>refuse, forbid</text:p>
          </table:table-cell>
          <table:table-cell office:value-type="string">
            <text:p>WJ/37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5"/>
          <table:table-cell office:value-type="string">
            <text:p>BAD</text:p>
          </table:table-cell>
          <table:table-cell office:value-type="string">
            <text:p>judge</text:p>
          </table:table-cell>
          <table:table-cell office:value-type="string">
            <text:p>Ety/BA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Q. Vala</text:p>
          </table:table-cell>
          <table:table-cell/>
          <table:table-cell office:value-type="string">
            <text:p>VALA</text:p>
          </table:table-cell>
          <table:table-cell office:value-type="string">
            <text:p>fortune, happiness</text:p>
          </table:table-cell>
          <table:table-cell office:value-type="string">
            <text:p>QL/99</text:p>
          </table:table-cell>
          <table:table-cell office:value-type="string">
            <text:p>BAL</text:p>
          </table:table-cell>
          <table:table-cell office:value-type="string">
            <text:p>*power</text:p>
          </table:table-cell>
          <table:table-cell office:value-type="string">
            <text:p>Ety/BAL</text:p>
          </table:table-cell>
          <table:table-cell office:value-type="string">
            <text:p>BAL</text:p>
          </table:table-cell>
          <table:table-cell office:value-type="string">
            <text:p>powerful; have power</text:p>
          </table:table-cell>
          <table:table-cell office:value-type="string">
            <text:p>PE17/48, 154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2"/>
          <table:table-cell office:value-type="string">
            <text:p>VAHA</text:p>
          </table:table-cell>
          <table:table-cell office:value-type="string">
            <text:p>*depart, travel</text:p>
          </table:table-cell>
          <table:table-cell office:value-type="string">
            <text:p>QL/99</text:p>
          </table:table-cell>
          <table:table-cell office:value-type="string">
            <text:p>WAN</text:p>
          </table:table-cell>
          <table:table-cell office:value-type="string">
            <text:p>depart, go away</text:p>
          </table:table-cell>
          <table:table-cell office:value-type="string">
            <text:p>Ety/WAN</text:p>
          </table:table-cell>
          <table:table-cell office:value-type="string">
            <text:p>BA(N)</text:p>
          </table:table-cell>
          <table:table-cell office:value-type="string">
            <text:p>go; meet</text:p>
          </table:table-cell>
          <table:table-cell office:value-type="string">
            <text:p>PE17/16, 149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Q. Vána</text:p>
          </table:table-cell>
          <table:table-cell/>
          <table:table-cell office:value-type="string">
            <text:p>VANA</text:p>
          </table:table-cell>
          <table:table-cell office:value-type="string">
            <text:p>*beauty</text:p>
          </table:table-cell>
          <table:table-cell office:value-type="string">
            <text:p>QL/99</text:p>
          </table:table-cell>
          <table:table-cell office:value-type="string">
            <text:p>BAN</text:p>
          </table:table-cell>
          <table:table-cell office:value-type="string">
            <text:p>*beauty</text:p>
          </table:table-cell>
          <table:table-cell office:value-type="string">
            <text:p>Ety/BAN</text:p>
          </table:table-cell>
          <table:table-cell office:value-type="string">
            <text:p>BAN</text:p>
          </table:table-cell>
          <table:table-cell office:value-type="string">
            <text:p>beauty</text:p>
          </table:table-cell>
          <table:table-cell office:value-type="string">
            <text:p>PE17/150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office:value-type="string">
            <text:p>BAR</text:p>
          </table:table-cell>
          <table:table-cell office:value-type="string">
            <text:p>raise; uplift, save</text:p>
          </table:table-cell>
          <table:table-cell office:value-type="string">
            <text:p>Ety/BAR</text:p>
          </table:table-cell>
          <table:table-cell office:value-type="string">
            <text:p>BAR</text:p>
          </table:table-cell>
          <table:table-cell office:value-type="string">
            <text:p>*lofty</text:p>
          </table:table-cell>
          <table:table-cell office:value-type="string">
            <text:p>PE17/65-6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Q. Varda</text:p>
          </table:table-cell>
          <table:table-cell/>
          <table:table-cell office:value-type="string">
            <text:p>VṚÐṚ</text:p>
          </table:table-cell>
          <table:table-cell office:value-type="string">
            <text:p>*rule</text:p>
          </table:table-cell>
          <table:table-cell office:value-type="string">
            <text:p>QL/102</text:p>
          </table:table-cell>
          <table:table-cell office:value-type="string">
            <text:p>BARAD</text:p>
          </table:table-cell>
          <table:table-cell office:value-type="string">
            <text:p>*lofty, noble</text:p>
          </table:table-cell>
          <table:table-cell office:value-type="string">
            <text:p>Ety/BARÁD</text:p>
          </table:table-cell>
          <table:table-cell office:value-type="string">
            <text:p>BARAD</text:p>
          </table:table-cell>
          <table:table-cell office:value-type="string">
            <text:p>lofty, high</text:p>
          </table:table-cell>
          <table:table-cell office:value-type="string">
            <text:p>PE17/22, 66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. baran</text:p>
          </table:table-cell>
          <table:table-cell office:value-type="string">
            <text:p>brown</text:p>
          </table:table-cell>
          <table:table-cell table:number-columns-repeated="3"/>
          <table:table-cell office:value-type="string">
            <text:p>BARAN</text:p>
          </table:table-cell>
          <table:table-cell office:value-type="string">
            <text:p>russet, brown</text:p>
          </table:table-cell>
          <table:table-cell office:value-type="string">
            <text:p>Ety/BARÁN</text:p>
          </table:table-cell>
          <table:table-cell office:value-type="string">
            <text:p>S. baran</text:p>
          </table:table-cell>
          <table:table-cell office:value-type="string">
            <text:p>golden brown</text:p>
          </table:table-cell>
          <table:table-cell office:value-type="string">
            <text:p>LotR/1138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office:value-type="string">
            <text:p>BARAS</text:p>
          </table:table-cell>
          <table:table-cell office:value-type="string">
            <text:p>*heat</text:p>
          </table:table-cell>
          <table:table-cell office:value-type="string">
            <text:p>Ety/BARA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8"/>
          <table:table-cell office:value-type="string">
            <text:p>BARAS</text:p>
          </table:table-cell>
          <table:table-cell office:value-type="string">
            <text:p>height</text:p>
          </table:table-cell>
          <table:table-cell office:value-type="string">
            <text:p>PE17/2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. barad</text:p>
          </table:table-cell>
          <table:table-cell office:value-type="string">
            <text:p>tower</text:p>
          </table:table-cell>
          <table:table-cell table:number-columns-repeated="3"/>
          <table:table-cell office:value-type="string">
            <text:p>BARAT</text:p>
          </table:table-cell>
          <table:table-cell office:value-type="string">
            <text:p>*tower</text:p>
          </table:table-cell>
          <table:table-cell office:value-type="string">
            <text:p>Ety/BARAT</text:p>
          </table:table-cell>
          <table:table-cell office:value-type="string">
            <text:p>BARAT</text:p>
          </table:table-cell>
          <table:table-cell office:value-type="string">
            <text:p>height; high</text:p>
          </table:table-cell>
          <table:table-cell office:value-type="string">
            <text:p>PE17/22, 6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S. Elbereth</text:p>
          </table:table-cell>
          <table:table-cell table:number-columns-repeated="4"/>
          <table:table-cell office:value-type="string">
            <text:p>BARATH</text:p>
          </table:table-cell>
          <table:table-cell office:value-type="string">
            <text:p>*queen</text:p>
          </table:table-cell>
          <table:table-cell office:value-type="string">
            <text:p>Ety/BARATH</text:p>
          </table:table-cell>
          <table:table-cell office:value-type="string">
            <text:p>BARATH</text:p>
          </table:table-cell>
          <table:table-cell office:value-type="string">
            <text:p>height</text:p>
          </table:table-cell>
          <table:table-cell office:value-type="string">
            <text:p>PE17/22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office:value-type="string">
            <text:p>BAT</text:p>
          </table:table-cell>
          <table:table-cell office:value-type="string">
            <text:p>tread</text:p>
          </table:table-cell>
          <table:table-cell office:value-type="string">
            <text:p>Ety/BA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. beleg</text:p>
          </table:table-cell>
          <table:table-cell office:value-type="string">
            <text:p>mighty, great</text:p>
          </table:table-cell>
          <table:table-cell office:value-type="string">
            <text:p>G. beleg</text:p>
          </table:table-cell>
          <table:table-cell office:value-type="string">
            <text:p>mighty, great</text:p>
          </table:table-cell>
          <table:table-cell office:value-type="string">
            <text:p>GL/22</text:p>
          </table:table-cell>
          <table:table-cell office:value-type="string">
            <text:p>BEL</text:p>
          </table:table-cell>
          <table:table-cell office:value-type="string">
            <text:p>strong</text:p>
          </table:table-cell>
          <table:table-cell office:value-type="string">
            <text:p>Ety/BEL</text:p>
          </table:table-cell>
          <table:table-cell office:value-type="string">
            <text:p>(M)BEL</text:p>
          </table:table-cell>
          <table:table-cell office:value-type="string">
            <text:p>*strong</text:p>
          </table:table-cell>
          <table:table-cell office:value-type="string">
            <text:p>PE17/115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number-columns-repeated="2"/>
          <table:table-cell office:value-type="string">
            <text:p>VENE</text:p>
          </table:table-cell>
          <table:table-cell office:value-type="string">
            <text:p>shape, cut out, scoop</text:p>
          </table:table-cell>
          <table:table-cell office:value-type="string">
            <text:p>QL/100</text:p>
          </table:table-cell>
          <table:table-cell office:value-type="string">
            <text:p>BEN</text:p>
          </table:table-cell>
          <table:table-cell office:value-type="string">
            <text:p>corner, angle</text:p>
          </table:table-cell>
          <table:table-cell office:value-type="string">
            <text:p>Ety/BEN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. Beren</text:p>
          </table:table-cell>
          <table:table-cell table:number-columns-repeated="4"/>
          <table:table-cell office:value-type="string">
            <text:p>BER</text:p>
          </table:table-cell>
          <table:table-cell office:value-type="string">
            <text:p>valiant</text:p>
          </table:table-cell>
          <table:table-cell office:value-type="string">
            <text:p>Ety/BE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Q. veru/veri</text:p>
          </table:table-cell>
          <table:table-cell office:value-type="string">
            <text:p>husband/wife</text:p>
          </table:table-cell>
          <table:table-cell office:value-type="string">
            <text:p>VEŘE</text:p>
          </table:table-cell>
          <table:table-cell office:value-type="string">
            <text:p>*marriage</text:p>
          </table:table-cell>
          <table:table-cell office:value-type="string">
            <text:p>QL/101</text:p>
          </table:table-cell>
          <table:table-cell office:value-type="string">
            <text:p>{BED}/BES</text:p>
          </table:table-cell>
          <table:table-cell office:value-type="string">
            <text:p>wed</text:p>
          </table:table-cell>
          <table:table-cell office:value-type="string">
            <text:p>Ety/BES, LEP</text:p>
          </table:table-cell>
          <table:table-cell office:value-type="string">
            <text:p>BER</text:p>
          </table:table-cell>
          <table:table-cell office:value-type="string">
            <text:p>mate, marriage</text:p>
          </table:table-cell>
          <table:table-cell office:value-type="string">
            <text:p>VT49/45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office:value-type="string">
            <text:p>BEREK</text:p>
          </table:table-cell>
          <table:table-cell office:value-type="string">
            <text:p>*sudden, fierce</text:p>
          </table:table-cell>
          <table:table-cell office:value-type="string">
            <text:p>Ety/BERÉ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5"/>
          <table:table-cell office:value-type="string">
            <text:p>BERETH</text:p>
          </table:table-cell>
          <table:table-cell office:value-type="string">
            <text:p>beech</text:p>
          </table:table-cell>
          <table:table-cell office:value-type="string">
            <text:p>Ety/BERÉTH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  <table:table-cell office:value-type="string">
            <text:p>BEW</text:p>
          </table:table-cell>
          <table:table-cell office:value-type="string">
            <text:p>follow, serve</text:p>
          </table:table-cell>
          <table:table-cell office:value-type="string">
            <text:p>Ety/BEW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office:value-type="string">
            <text:p>BIRIT</text:p>
          </table:table-cell>
          <table:table-cell office:value-type="string">
            <text:p>*gravel</text:p>
          </table:table-cell>
          <table:table-cell office:value-type="string">
            <text:p>Ety/BIRÍ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string">
            <text:p>BOÐO</text:p>
          </table:table-cell>
          <table:table-cell office:value-type="string">
            <text:p>*gate, door</text:p>
          </table:table-cell>
          <table:table-cell office:value-type="string">
            <text:p>QL/7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Q. Voronwe</text:p>
          </table:table-cell>
          <table:table-cell/>
          <table:table-cell office:value-type="string">
            <text:p>VORO</text:p>
          </table:table-cell>
          <table:table-cell office:value-type="string">
            <text:p>*ever, always</text:p>
          </table:table-cell>
          <table:table-cell office:value-type="string">
            <text:p>QL/102</text:p>
          </table:table-cell>
          <table:table-cell office:value-type="string">
            <text:p>BOR(ON)</text:p>
          </table:table-cell>
          <table:table-cell office:value-type="string">
            <text:p>endure</text:p>
          </table:table-cell>
          <table:table-cell office:value-type="string">
            <text:p>Ety/BOR, BORÓN</text:p>
          </table:table-cell>
          <table:table-cell office:value-type="string">
            <text:p>Q. Voronwe</text:p>
          </table:table-cell>
          <table:table-cell office:value-type="string">
            <text:p>Steadfast</text:p>
          </table:table-cell>
          <table:table-cell office:value-type="string">
            <text:p>LotR/103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string">
            <text:p>BUZBU</text:p>
          </table:table-cell>
          <table:table-cell office:value-type="string">
            <text:p>*large fly</text:p>
          </table:table-cell>
          <table:table-cell office:value-type="string">
            <text:p>PE18/43</text:p>
          </table:table-cell>
          <table:table-cell office:value-type="string">
            <text:p>BUZBU</text:p>
          </table:table-cell>
          <table:table-cell office:value-type="string">
            <text:p>*large fly</text:p>
          </table:table-cell>
          <table:table-cell office:value-type="string">
            <text:p>PE18/9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office:value-type="string">
            <text:p>DAB</text:p>
          </table:table-cell>
          <table:table-cell office:value-type="string">
            <text:p>permit, allow</text:p>
          </table:table-cell>
          <table:table-cell office:value-type="string">
            <text:p>Ety/DAB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. dalath</text:p>
          </table:table-cell>
          <table:table-cell office:value-type="string">
            <text:p>plain</text:p>
          </table:table-cell>
          <table:table-cell table:number-columns-repeated="3"/>
          <table:table-cell office:value-type="string">
            <text:p>DAL</text:p>
          </table:table-cell>
          <table:table-cell office:value-type="string">
            <text:p>flat</text:p>
          </table:table-cell>
          <table:table-cell office:value-type="string">
            <text:p>Ety/DAL</text:p>
          </table:table-cell>
          <table:table-cell office:value-type="string">
            <text:p>DAL</text:p>
          </table:table-cell>
          <table:table-cell office:value-type="string">
            <text:p>bottom, ground</text:p>
          </table:table-cell>
          <table:table-cell office:value-type="string">
            <text:p>PE17/15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. dar-</text:p>
          </table:table-cell>
          <table:table-cell office:value-type="string">
            <text:p>stop</text:p>
          </table:table-cell>
          <table:table-cell table:number-columns-repeated="3"/>
          <table:table-cell office:value-type="string">
            <text:p>DAR</text:p>
          </table:table-cell>
          <table:table-cell office:value-type="string">
            <text:p>wait, stop</text:p>
          </table:table-cell>
          <table:table-cell office:value-type="string">
            <text:p>Ety/DAR</text:p>
          </table:table-cell>
          <table:table-cell office:value-type="string">
            <text:p>S. daro</text:p>
          </table:table-cell>
          <table:table-cell office:value-type="string">
            <text:p>*stop!</text:p>
          </table:table-cell>
          <table:table-cell office:value-type="string">
            <text:p>LotR/34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S. draug</text:p>
          </table:table-cell>
          <table:table-cell office:value-type="string">
            <text:p>wolf</text:p>
          </table:table-cell>
          <table:table-cell table:number-columns-repeated="3"/>
          <table:table-cell office:value-type="string">
            <text:p>DARAK</text:p>
          </table:table-cell>
          <table:table-cell office:value-type="string">
            <text:p>*wolf</text:p>
          </table:table-cell>
          <table:table-cell office:value-type="string">
            <text:p>Ety/DARÁ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G. Dramborleg</text:p>
          </table:table-cell>
          <table:table-cell office:value-type="string">
            <text:p>Thudder-sharp</text:p>
          </table:table-cell>
          <table:table-cell office:value-type="string">
            <text:p>TARA(MA)</text:p>
          </table:table-cell>
          <table:table-cell office:value-type="string">
            <text:p>batter, thud, beat</text:p>
          </table:table-cell>
          <table:table-cell office:value-type="string">
            <text:p>QL/89</text:p>
          </table:table-cell>
          <table:table-cell office:value-type="string">
            <text:p>DARAM</text:p>
          </table:table-cell>
          <table:table-cell office:value-type="string">
            <text:p>beat, hew</text:p>
          </table:table-cell>
          <table:table-cell office:value-type="string">
            <text:p>Ety/DARÁM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Q. lanta-</text:p>
          </table:table-cell>
          <table:table-cell office:value-type="string">
            <text:p>fall</text:p>
          </table:table-cell>
          <table:table-cell office:value-type="string">
            <text:p>LANTAN</text:p>
          </table:table-cell>
          <table:table-cell office:value-type="string">
            <text:p>*fall</text:p>
          </table:table-cell>
          <table:table-cell office:value-type="string">
            <text:p>QL/51</text:p>
          </table:table-cell>
          <table:table-cell office:value-type="string">
            <text:p>DAT/DANT</text:p>
          </table:table-cell>
          <table:table-cell office:value-type="string">
            <text:p>fall down</text:p>
          </table:table-cell>
          <table:table-cell office:value-type="string">
            <text:p>Ety/DAT</text:p>
          </table:table-cell>
          <table:table-cell office:value-type="string">
            <text:p>DAT</text:p>
          </table:table-cell>
          <table:table-cell office:value-type="string">
            <text:p>fall (down)</text:p>
          </table:table-cell>
          <table:table-cell office:value-type="string">
            <text:p>VT47/29; VT48/24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number-columns-repeated="5"/>
          <table:table-cell office:value-type="string">
            <text:p>{DAƷ}</text:p>
          </table:table-cell>
          <table:table-cell office:value-type="string">
            <text:p>great</text:p>
          </table:table-cell>
          <table:table-cell office:value-type="string">
            <text:p>EtyAC/DAƷ</text:p>
          </table:table-cell>
          <table:table-cell office:value-type="string">
            <text:p>DAY</text:p>
          </table:table-cell>
          <table:table-cell office:value-type="string">
            <text:p>*great</text:p>
          </table:table-cell>
          <table:table-cell office:value-type="string">
            <text:p>VT42/11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number-columns-repeated="5"/>
          <table:table-cell office:value-type="string">
            <text:p>DAY</text:p>
          </table:table-cell>
          <table:table-cell office:value-type="string">
            <text:p>shadow</text:p>
          </table:table-cell>
          <table:table-cell office:value-type="string">
            <text:p>Ety/DAY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8"/>
          <table:table-cell office:value-type="string">
            <text:p>DEL</text:p>
          </table:table-cell>
          <table:table-cell office:value-type="string">
            <text:p>fair</text:p>
          </table:table-cell>
          <table:table-cell office:value-type="string">
            <text:p>PE17/15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number-columns-repeated="5"/>
          <table:table-cell office:value-type="string">
            <text:p>{EDE(L)}</text:p>
          </table:table-cell>
          <table:table-cell office:value-type="string">
            <text:p>precede, come forward</text:p>
          </table:table-cell>
          <table:table-cell office:value-type="string">
            <text:p>EtyAC/EDE</text:p>
          </table:table-cell>
          <table:table-cell office:value-type="string">
            <text:p>DELE</text:p>
          </table:table-cell>
          <table:table-cell office:value-type="string">
            <text:p>walk, go, proceed</text:p>
          </table:table-cell>
          <table:table-cell office:value-type="string">
            <text:p>WJ/360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8"/>
          <table:table-cell office:value-type="string">
            <text:p>DEL</text:p>
          </table:table-cell>
          <table:table-cell office:value-type="string">
            <text:p>will</text:p>
          </table:table-cell>
          <table:table-cell office:value-type="string">
            <text:p>NM/23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number-columns-repeated="5"/>
          <table:table-cell office:value-type="string">
            <text:p>DEM</text:p>
          </table:table-cell>
          <table:table-cell office:value-type="string">
            <text:p>sad, gloomy</text:p>
          </table:table-cell>
          <table:table-cell office:value-type="string">
            <text:p>Ety/DEM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5"/>
          <table:table-cell office:value-type="string">
            <text:p>DEN</text:p>
          </table:table-cell>
          <table:table-cell office:value-type="string">
            <text:p>hole, gap</text:p>
          </table:table-cell>
          <table:table-cell office:value-type="string">
            <text:p>Ety/DE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8"/>
          <table:table-cell office:value-type="string">
            <text:p>DER</text:p>
          </table:table-cell>
          <table:table-cell office:value-type="string">
            <text:p>hard, difficult</text:p>
          </table:table-cell>
          <table:table-cell office:value-type="string">
            <text:p>PE17/15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8"/>
          <table:table-cell office:value-type="string">
            <text:p>DEWE</text:p>
          </table:table-cell>
          <table:table-cell office:value-type="string">
            <text:p>go wrong, fail</text:p>
          </table:table-cell>
          <table:table-cell office:value-type="string">
            <text:p>PE17/15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5"/>
          <table:table-cell office:value-type="string">
            <text:p>DIL</text:p>
          </table:table-cell>
          <table:table-cell office:value-type="string">
            <text:p>fill up hole</text:p>
          </table:table-cell>
          <table:table-cell office:value-type="string">
            <text:p>Ety/DI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. Belthronding</text:p>
          </table:table-cell>
          <table:table-cell table:number-columns-repeated="4"/>
          <table:table-cell office:value-type="string">
            <text:p>DING</text:p>
          </table:table-cell>
          <table:table-cell office:value-type="string">
            <text:p>onomatopoeic</text:p>
          </table:table-cell>
          <table:table-cell office:value-type="string">
            <text:p>Ety/DIN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  <table:table-cell office:value-type="string">
            <text:p>DO</text:p>
          </table:table-cell>
          <table:table-cell office:value-type="string">
            <text:p>*interrogatives</text:p>
          </table:table-cell>
          <table:table-cell office:value-type="string">
            <text:p>GL/3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number-columns-repeated="5"/>
          <table:table-cell office:value-type="string">
            <text:p>DOƷ/DŌ</text:p>
          </table:table-cell>
          <table:table-cell office:value-type="string">
            <text:p>night</text:p>
          </table:table-cell>
          <table:table-cell office:value-type="string">
            <text:p>Ety/DOƷ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Q. lóme</text:p>
          </table:table-cell>
          <table:table-cell office:value-type="string">
            <text:p>night</text:p>
          </table:table-cell>
          <table:table-cell office:value-type="string">
            <text:p>LOMO</text:p>
          </table:table-cell>
          <table:table-cell office:value-type="string">
            <text:p>*lurk; shadow</text:p>
          </table:table-cell>
          <table:table-cell office:value-type="string">
            <text:p>QL/55</text:p>
          </table:table-cell>
          <table:table-cell office:value-type="string">
            <text:p>DOMO</text:p>
          </table:table-cell>
          <table:table-cell office:value-type="string">
            <text:p>faint, dim</text:p>
          </table:table-cell>
          <table:table-cell office:value-type="string">
            <text:p>Ety/DOMO</text:p>
          </table:table-cell>
          <table:table-cell office:value-type="string">
            <text:p>DOM</text:p>
          </table:table-cell>
          <table:table-cell office:value-type="string">
            <text:p>dark</text:p>
          </table:table-cell>
          <table:table-cell office:value-type="string">
            <text:p>PE17/152; PE22/15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Q. norno</text:p>
          </table:table-cell>
          <table:table-cell office:value-type="string">
            <text:p>oak</text:p>
          </table:table-cell>
          <table:table-cell office:value-type="string">
            <text:p>NOŘO</text:p>
          </table:table-cell>
          <table:table-cell office:value-type="string">
            <text:p>*oak</text:p>
          </table:table-cell>
          <table:table-cell office:value-type="string">
            <text:p>QL/67</text:p>
          </table:table-cell>
          <table:table-cell office:value-type="string">
            <text:p>DORON</text:p>
          </table:table-cell>
          <table:table-cell office:value-type="string">
            <text:p>oak</text:p>
          </table:table-cell>
          <table:table-cell office:value-type="string">
            <text:p>Ety/DÓRON</text:p>
          </table:table-cell>
          <table:table-cell office:value-type="string">
            <text:p>DOR</text:p>
          </table:table-cell>
          <table:table-cell office:value-type="string">
            <text:p>hard, tough</text:p>
          </table:table-cell>
          <table:table-cell office:value-type="string">
            <text:p>PE17/181; WJ/41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S. Glamdring</text:p>
          </table:table-cell>
          <table:table-cell office:value-type="string">
            <text:p>Foe-hammer</text:p>
          </table:table-cell>
          <table:table-cell table:number-columns-repeated="3"/>
          <table:table-cell office:value-type="string">
            <text:p>DRING</text:p>
          </table:table-cell>
          <table:table-cell office:value-type="string">
            <text:p>beat, strike</text:p>
          </table:table-cell>
          <table:table-cell office:value-type="string">
            <text:p>Ety/DRIN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8"/>
          <table:table-cell office:value-type="string">
            <text:p>(D)ROB</text:p>
          </table:table-cell>
          <table:table-cell office:value-type="string">
            <text:p>*wild</text:p>
          </table:table-cell>
          <table:table-cell office:value-type="string">
            <text:p>PE17/9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5"/>
          <table:table-cell office:value-type="string">
            <text:p>DUB</text:p>
          </table:table-cell>
          <table:table-cell office:value-type="string">
            <text:p>lie heavy, loom</text:p>
          </table:table-cell>
          <table:table-cell office:value-type="string">
            <text:p>Ety/DUB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5"/>
          <table:table-cell office:value-type="string">
            <text:p>DUN</text:p>
          </table:table-cell>
          <table:table-cell office:value-type="string">
            <text:p>dark (of colour)</text:p>
          </table:table-cell>
          <table:table-cell office:value-type="string">
            <text:p>Ety/DU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number-columns-repeated="5"/>
          <table:table-cell office:value-type="string">
            <text:p>DUS</text:p>
          </table:table-cell>
          <table:table-cell office:value-type="string">
            <text:p>burn</text:p>
          </table:table-cell>
          <table:table-cell office:value-type="string">
            <text:p>EtyAC/DU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2"/>
          <table:table-cell office:value-type="string">
            <text:p>DUI</text:p>
          </table:table-cell>
          <table:table-cell office:value-type="string">
            <text:p>*flow</text:p>
          </table:table-cell>
          <table:table-cell office:value-type="string">
            <text:p>GL/45</text:p>
          </table:table-cell>
          <table:table-cell office:value-type="string">
            <text:p>DUI̯</text:p>
          </table:table-cell>
          <table:table-cell office:value-type="string">
            <text:p>*flow</text:p>
          </table:table-cell>
          <table:table-cell office:value-type="string">
            <text:p>Ety/DUI</text:p>
          </table:table-cell>
          <table:table-cell office:value-type="string">
            <text:p>DUY</text:p>
          </table:table-cell>
          <table:table-cell office:value-type="string">
            <text:p>flood, flow</text:p>
          </table:table-cell>
          <table:table-cell office:value-type="string">
            <text:p>VT48/23-2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office:value-type="string">
            <text:p>DYĒ¹</text:p>
          </table:table-cell>
          <table:table-cell office:value-type="string">
            <text:p>*gaze</text:p>
          </table:table-cell>
          <table:table-cell office:value-type="string">
            <text:p>QL/10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office:value-type="string">
            <text:p>DYĒ²</text:p>
          </table:table-cell>
          <table:table-cell office:value-type="string">
            <text:p>behind, back</text:p>
          </table:table-cell>
          <table:table-cell office:value-type="string">
            <text:p>QL/10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number-columns-repeated="5"/>
          <table:table-cell office:value-type="string">
            <text:p>DYEL</text:p>
          </table:table-cell>
          <table:table-cell office:value-type="string">
            <text:p>feel fear; abhor</text:p>
          </table:table-cell>
          <table:table-cell office:value-type="string">
            <text:p>Ety/DYE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  <table:table-cell office:value-type="string">
            <text:p>DẎELE</text:p>
          </table:table-cell>
          <table:table-cell office:value-type="string">
            <text:p>*cold</text:p>
          </table:table-cell>
          <table:table-cell office:value-type="string">
            <text:p>QL/10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office:value-type="string">
            <text:p>DẎṆTṆ</text:p>
          </table:table-cell>
          <table:table-cell office:value-type="string">
            <text:p>*enlarge</text:p>
          </table:table-cell>
          <table:table-cell office:value-type="string">
            <text:p>QL/10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office:value-type="string">
            <text:p>DYULU</text:p>
          </table:table-cell>
          <table:table-cell office:value-type="string">
            <text:p>*carry, bear</text:p>
          </table:table-cell>
          <table:table-cell office:value-type="string">
            <text:p>GL/3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office:value-type="string">
            <text:p>ÐANA</text:p>
          </table:table-cell>
          <table:table-cell office:value-type="string">
            <text:p>day</text:p>
          </table:table-cell>
          <table:table-cell office:value-type="string">
            <text:p>GL/6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number-columns-repeated="5"/>
          <table:table-cell office:value-type="string">
            <text:p>Ē</text:p>
          </table:table-cell>
          <table:table-cell office:value-type="string">
            <text:p>indeed</text:p>
          </table:table-cell>
          <table:table-cell office:value-type="string">
            <text:p>EtyAC/Ē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office:value-type="string">
            <text:p>EI̯KA</text:p>
          </table:table-cell>
          <table:table-cell office:value-type="string">
            <text:p>*far, broad</text:p>
          </table:table-cell>
          <table:table-cell office:value-type="string">
            <text:p>QL/2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number-columns-repeated="2"/>
          <table:table-cell office:value-type="string">
            <text:p>EKE/EHE</text:p>
          </table:table-cell>
          <table:table-cell office:value-type="string">
            <text:p>*point</text:p>
          </table:table-cell>
          <table:table-cell office:value-type="string">
            <text:p>QL/35</text:p>
          </table:table-cell>
          <table:table-cell office:value-type="string">
            <text:p>EK</text:p>
          </table:table-cell>
          <table:table-cell office:value-type="string">
            <text:p>spear</text:p>
          </table:table-cell>
          <table:table-cell office:value-type="string">
            <text:p>Ety/EK</text:p>
          </table:table-cell>
          <table:table-cell office:value-type="string">
            <text:p>EK</text:p>
          </table:table-cell>
          <table:table-cell office:value-type="string">
            <text:p>sharp point</text:p>
          </table:table-cell>
          <table:table-cell office:value-type="string">
            <text:p>VT48/25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8"/>
          <table:table-cell office:value-type="string">
            <text:p>EJE</text:p>
          </table:table-cell>
          <table:table-cell office:value-type="string">
            <text:p>feminine</text:p>
          </table:table-cell>
          <table:table-cell office:value-type="string">
            <text:p>PE21/8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Q. elen</text:p>
          </table:table-cell>
          <table:table-cell office:value-type="string">
            <text:p>star</text:p>
          </table:table-cell>
          <table:table-cell table:number-columns-repeated="3"/>
          <table:table-cell office:value-type="string">
            <text:p>EL</text:p>
          </table:table-cell>
          <table:table-cell office:value-type="string">
            <text:p>star</text:p>
          </table:table-cell>
          <table:table-cell office:value-type="string">
            <text:p>Ety/EL</text:p>
          </table:table-cell>
          <table:table-cell office:value-type="string">
            <text:p>EL</text:p>
          </table:table-cell>
          <table:table-cell office:value-type="string">
            <text:p>star</text:p>
          </table:table-cell>
          <table:table-cell office:value-type="string">
            <text:p>RGEO/6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office:value-type="string">
            <text:p>ELE</text:p>
          </table:table-cell>
          <table:table-cell office:value-type="string">
            <text:p>drive, push, thrust</text:p>
          </table:table-cell>
          <table:table-cell office:value-type="string">
            <text:p>QL/3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Q. Elda</text:p>
          </table:table-cell>
          <table:table-cell office:value-type="string">
            <text:p>Elf</text:p>
          </table:table-cell>
          <table:table-cell table:number-columns-repeated="3"/>
          <table:table-cell office:value-type="string">
            <text:p>ELED</text:p>
          </table:table-cell>
          <table:table-cell office:value-type="string">
            <text:p>{depart}, Elf</text:p>
          </table:table-cell>
          <table:table-cell office:value-type="string">
            <text:p>Ety/ELED</text:p>
          </table:table-cell>
          <table:table-cell office:value-type="string">
            <text:p>ELED</text:p>
          </table:table-cell>
          <table:table-cell office:value-type="string">
            <text:p>*Elf</text:p>
          </table:table-cell>
          <table:table-cell office:value-type="string">
            <text:p>PE18/8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8"/>
          <table:table-cell office:value-type="string">
            <text:p>EM</text:p>
          </table:table-cell>
          <table:table-cell office:value-type="string">
            <text:p>depict, portray</text:p>
          </table:table-cell>
          <table:table-cell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Q. en</text:p>
          </table:table-cell>
          <table:table-cell office:value-type="string">
            <text:p>yonder</text:p>
          </table:table-cell>
          <table:table-cell office:value-type="string">
            <text:p>E</text:p>
          </table:table-cell>
          <table:table-cell office:value-type="string">
            <text:p>*that (by you)</text:p>
          </table:table-cell>
          <table:table-cell office:value-type="string">
            <text:p>QL/34</text:p>
          </table:table-cell>
          <table:table-cell office:value-type="string">
            <text:p>EN</text:p>
          </table:table-cell>
          <table:table-cell office:value-type="string">
            <text:p>over there, yonder</text:p>
          </table:table-cell>
          <table:table-cell office:value-type="string">
            <text:p>Ety/EN</text:p>
          </table:table-cell>
          <table:table-cell office:value-type="string">
            <text:p>EN</text:p>
          </table:table-cell>
          <table:table-cell office:value-type="string">
            <text:p>further, beyond; again</text:p>
          </table:table-cell>
          <table:table-cell office:value-type="string">
            <text:p>VT41/16; VT47/1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office:value-type="string">
            <text:p>ENE¹</text:p>
          </table:table-cell>
          <table:table-cell office:value-type="string">
            <text:p>*idea, invention</text:p>
          </table:table-cell>
          <table:table-cell office:value-type="string">
            <text:p>QL/3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number-columns-repeated="2"/>
          <table:table-cell office:value-type="string">
            <text:p>ENE³</text:p>
          </table:table-cell>
          <table:table-cell office:value-type="string">
            <text:p>*name</text:p>
          </table:table-cell>
          <table:table-cell office:value-type="string">
            <text:p>QL/35</text:p>
          </table:table-cell>
          <table:table-cell table:number-columns-repeated="3"/>
          <table:table-cell office:value-type="string">
            <text:p>S. eneth</text:p>
          </table:table-cell>
          <table:table-cell office:value-type="string">
            <text:p>name</text:p>
          </table:table-cell>
          <table:table-cell office:value-type="string">
            <text:p>VT44/24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  <table:table-cell office:value-type="string">
            <text:p>ENE</text:p>
          </table:table-cell>
          <table:table-cell office:value-type="string">
            <text:p>*genitive</text:p>
          </table:table-cell>
          <table:table-cell office:value-type="string">
            <text:p>PE21/59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Q. Endóre</text:p>
          </table:table-cell>
          <table:table-cell office:value-type="string">
            <text:p>Middle Earth</text:p>
          </table:table-cell>
          <table:table-cell table:number-columns-repeated="3"/>
          <table:table-cell office:value-type="string">
            <text:p>(E)NED</text:p>
          </table:table-cell>
          <table:table-cell office:value-type="string">
            <text:p>centre</text:p>
          </table:table-cell>
          <table:table-cell office:value-type="string">
            <text:p>Ety/ÉNED, NÉD</text:p>
          </table:table-cell>
          <table:table-cell office:value-type="string">
            <text:p>ENED</text:p>
          </table:table-cell>
          <table:table-cell office:value-type="string">
            <text:p>middle</text:p>
          </table:table-cell>
          <table:table-cell office:value-type="string">
            <text:p>VT47/2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Q. enque</text:p>
          </table:table-cell>
          <table:table-cell office:value-type="string">
            <text:p>six</text:p>
          </table:table-cell>
          <table:table-cell office:value-type="string">
            <text:p>ENE²</text:p>
          </table:table-cell>
          <table:table-cell office:value-type="string">
            <text:p>six</text:p>
          </table:table-cell>
          <table:table-cell office:value-type="string">
            <text:p>QL/35</text:p>
          </table:table-cell>
          <table:table-cell office:value-type="string">
            <text:p>ENEK</text:p>
          </table:table-cell>
          <table:table-cell office:value-type="string">
            <text:p>six</text:p>
          </table:table-cell>
          <table:table-cell office:value-type="string">
            <text:p>Ety/ÉNEK</text:p>
          </table:table-cell>
          <table:table-cell office:value-type="string">
            <text:p>ENEK</text:p>
          </table:table-cell>
          <table:table-cell office:value-type="string">
            <text:p>six</text:p>
          </table:table-cell>
          <table:table-cell office:value-type="string">
            <text:p>VT47/12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8"/>
          <table:table-cell office:value-type="string">
            <text:p>ENET</text:p>
          </table:table-cell>
          <table:table-cell office:value-type="string">
            <text:p>*one more</text:p>
          </table:table-cell>
          <table:table-cell office:value-type="string">
            <text:p>VT47/1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office:value-type="string">
            <text:p>ENU</text:p>
          </table:table-cell>
          <table:table-cell office:value-type="string">
            <text:p>origin</text:p>
          </table:table-cell>
          <table:table-cell office:value-type="string">
            <text:p>QL/3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office:value-type="string">
            <text:p>EŊE</text:p>
          </table:table-cell>
          <table:table-cell office:value-type="string">
            <text:p>*plane, level</text:p>
          </table:table-cell>
          <table:table-cell office:value-type="string">
            <text:p>QL/3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office:value-type="string">
            <text:p>EƷ</text:p>
          </table:table-cell>
          <table:table-cell office:value-type="string">
            <text:p>be</text:p>
          </table:table-cell>
          <table:table-cell office:value-type="string">
            <text:p>PE19/48</text:p>
          </table:table-cell>
          <table:table-cell office:value-type="string">
            <text:p>EÑ</text:p>
          </table:table-cell>
          <table:table-cell office:value-type="string">
            <text:p>be, exist</text:p>
          </table:table-cell>
          <table:table-cell office:value-type="string">
            <text:p>PE19/96; PE22/147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  <table:table-cell office:value-type="string">
            <text:p>{EPH}</text:p>
          </table:table-cell>
          <table:table-cell office:value-type="string">
            <text:p>emerge</text:p>
          </table:table-cell>
          <table:table-cell office:value-type="string">
            <text:p>PE22/127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Q. eressea</text:p>
          </table:table-cell>
          <table:table-cell office:value-type="string">
            <text:p>lonely</text:p>
          </table:table-cell>
          <table:table-cell office:value-type="string">
            <text:p>ERE</text:p>
          </table:table-cell>
          <table:table-cell office:value-type="string">
            <text:p>remain alone</text:p>
          </table:table-cell>
          <table:table-cell office:value-type="string">
            <text:p>QL/36</text:p>
          </table:table-cell>
          <table:table-cell office:value-type="string">
            <text:p>ERE</text:p>
          </table:table-cell>
          <table:table-cell office:value-type="string">
            <text:p>be alone</text:p>
          </table:table-cell>
          <table:table-cell office:value-type="string">
            <text:p>Ety/ERE</text:p>
          </table:table-cell>
          <table:table-cell office:value-type="string">
            <text:p>ER</text:p>
          </table:table-cell>
          <table:table-cell office:value-type="string">
            <text:p>one, alone</text:p>
          </table:table-cell>
          <table:table-cell office:value-type="string">
            <text:p>VT42/10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. Eregion</text:p>
          </table:table-cell>
          <table:table-cell office:value-type="string">
            <text:p>Hollin</text:p>
          </table:table-cell>
          <table:table-cell table:number-columns-repeated="3"/>
          <table:table-cell office:value-type="string">
            <text:p>EREK</text:p>
          </table:table-cell>
          <table:table-cell office:value-type="string">
            <text:p>thorn</text:p>
          </table:table-cell>
          <table:table-cell office:value-type="string">
            <text:p>Ety/ERÉK</text:p>
          </table:table-cell>
          <table:table-cell office:value-type="string">
            <text:p>S. Eregion</text:p>
          </table:table-cell>
          <table:table-cell office:value-type="string">
            <text:p>Hollin</text:p>
          </table:table-cell>
          <table:table-cell office:value-type="string">
            <text:p>LotR/30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Q. esse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ES</text:p>
          </table:table-cell>
          <table:table-cell office:value-type="string">
            <text:p>indicate, name</text:p>
          </table:table-cell>
          <table:table-cell office:value-type="string">
            <text:p>Ety/ES</text:p>
          </table:table-cell>
          <table:table-cell office:value-type="string">
            <text:p>Q. esse</text:p>
          </table:table-cell>
          <table:table-cell office:value-type="string">
            <text:p>name</text:p>
          </table:table-cell>
          <table:table-cell office:value-type="string">
            <text:p>LotR/112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number-columns-repeated="5"/>
          <table:table-cell office:value-type="string">
            <text:p>ESEK</text:p>
          </table:table-cell>
          <table:table-cell office:value-type="string">
            <text:p>*sedge, reed</text:p>
          </table:table-cell>
          <table:table-cell office:value-type="string">
            <text:p>Ety/ESE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number-columns-repeated="5"/>
          <table:table-cell office:value-type="string">
            <text:p>ESE(T)</text:p>
          </table:table-cell>
          <table:table-cell office:value-type="string">
            <text:p>precede</text:p>
          </table:table-cell>
          <table:table-cell office:value-type="string">
            <text:p>Ety/ESE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Q. et</text:p>
          </table:table-cell>
          <table:table-cell office:value-type="string">
            <text:p>out</text:p>
          </table:table-cell>
          <table:table-cell office:value-type="string">
            <text:p>EŘE/ESE</text:p>
          </table:table-cell>
          <table:table-cell office:value-type="string">
            <text:p>out</text:p>
          </table:table-cell>
          <table:table-cell office:value-type="string">
            <text:p>QL/36</text:p>
          </table:table-cell>
          <table:table-cell office:value-type="string">
            <text:p>ET</text:p>
          </table:table-cell>
          <table:table-cell office:value-type="string">
            <text:p>out, forth</text:p>
          </table:table-cell>
          <table:table-cell office:value-type="string">
            <text:p>Ety/ET</text:p>
          </table:table-cell>
          <table:table-cell office:value-type="string">
            <text:p>ET</text:p>
          </table:table-cell>
          <table:table-cell office:value-type="string">
            <text:p>out</text:p>
          </table:table-cell>
          <table:table-cell office:value-type="string">
            <text:p>VT48/2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office:value-type="string">
            <text:p>ETE</text:p>
          </table:table-cell>
          <table:table-cell office:value-type="string">
            <text:p>cling together</text:p>
          </table:table-cell>
          <table:table-cell office:value-type="string">
            <text:p>QL/3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S. edra-</text:p>
          </table:table-cell>
          <table:table-cell office:value-type="string">
            <text:p>open</text:p>
          </table:table-cell>
          <table:table-cell table:number-columns-repeated="3"/>
          <table:table-cell office:value-type="string">
            <text:p>ETER</text:p>
          </table:table-cell>
          <table:table-cell office:value-type="string">
            <text:p>open, come out</text:p>
          </table:table-cell>
          <table:table-cell office:value-type="string">
            <text:p>Ety/ETER</text:p>
          </table:table-cell>
          <table:table-cell office:value-type="string">
            <text:p>S. edro</text:p>
          </table:table-cell>
          <table:table-cell office:value-type="string">
            <text:p>open!</text:p>
          </table:table-cell>
          <table:table-cell office:value-type="string">
            <text:p>LotR/30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office:value-type="string">
            <text:p>EWE</text:p>
          </table:table-cell>
          <table:table-cell office:value-type="string">
            <text:p>*lamb</text:p>
          </table:table-cell>
          <table:table-cell office:value-type="string">
            <text:p>QL/3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office:value-type="string">
            <text:p>FAɃA</text:p>
          </table:table-cell>
          <table:table-cell office:value-type="string">
            <text:p>*fat</text:p>
          </table:table-cell>
          <table:table-cell office:value-type="string">
            <text:p>QL/3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office:value-type="string">
            <text:p>FALA</text:p>
          </table:table-cell>
          <table:table-cell office:value-type="string">
            <text:p>bare, nude</text:p>
          </table:table-cell>
          <table:table-cell office:value-type="string">
            <text:p>QL/3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  <table:table-cell office:value-type="string">
            <text:p>FAWA</text:p>
          </table:table-cell>
          <table:table-cell office:value-type="string">
            <text:p>smell</text:p>
          </table:table-cell>
          <table:table-cell office:value-type="string">
            <text:p>QL/3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  <table:table-cell office:value-type="string">
            <text:p>FAẎA</text:p>
          </table:table-cell>
          <table:table-cell office:value-type="string">
            <text:p>*free</text:p>
          </table:table-cell>
          <table:table-cell office:value-type="string">
            <text:p>QL/3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number-columns-repeated="2"/>
          <table:table-cell office:value-type="string">
            <text:p>FELE/FELU</text:p>
          </table:table-cell>
          <table:table-cell office:value-type="string">
            <text:p>bad magic</text:p>
          </table:table-cell>
          <table:table-cell office:value-type="string">
            <text:p>QL/3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2"/>
          <table:table-cell office:value-type="string">
            <text:p>FEŊE</text:p>
          </table:table-cell>
          <table:table-cell office:value-type="string">
            <text:p>*cut</text:p>
          </table:table-cell>
          <table:table-cell office:value-type="string">
            <text:p>QL/3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number-columns-repeated="2"/>
          <table:table-cell office:value-type="string">
            <text:p>FILI</text:p>
          </table:table-cell>
          <table:table-cell office:value-type="string">
            <text:p>fine, thin</text:p>
          </table:table-cell>
          <table:table-cell office:value-type="string">
            <text:p>QL/3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2"/>
          <table:table-cell office:value-type="string">
            <text:p>FIŊI</text:p>
          </table:table-cell>
          <table:table-cell office:value-type="string">
            <text:p>*narrow</text:p>
          </table:table-cell>
          <table:table-cell office:value-type="string">
            <text:p>QL/3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/>
          <table:table-cell office:value-type="string">
            <text:p>FḶKḶ</text:p>
          </table:table-cell>
          <table:table-cell office:value-type="string">
            <text:p>cleave, hew</text:p>
          </table:table-cell>
          <table:table-cell office:value-type="string">
            <text:p>QL/3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number-columns-repeated="2"/>
          <table:table-cell office:value-type="string">
            <text:p>FṆÐṆ</text:p>
          </table:table-cell>
          <table:table-cell office:value-type="string">
            <text:p>*omen</text:p>
          </table:table-cell>
          <table:table-cell office:value-type="string">
            <text:p>QL/3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/>
          <table:table-cell office:value-type="string">
            <text:p>FṆT</text:p>
          </table:table-cell>
          <table:table-cell office:value-type="string">
            <text:p>*crooked</text:p>
          </table:table-cell>
          <table:table-cell office:value-type="string">
            <text:p>GL/3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number-columns-repeated="2"/>
          <table:table-cell office:value-type="string">
            <text:p>FOƷO</text:p>
          </table:table-cell>
          <table:table-cell office:value-type="string">
            <text:p>hide, hoard</text:p>
          </table:table-cell>
          <table:table-cell office:value-type="string">
            <text:p>QL/3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number-columns-repeated="2"/>
          <table:table-cell office:value-type="string">
            <text:p>FOL</text:p>
          </table:table-cell>
          <table:table-cell office:value-type="string">
            <text:p>*smoke, reek</text:p>
          </table:table-cell>
          <table:table-cell office:value-type="string">
            <text:p>GL/3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  <table:table-cell office:value-type="string">
            <text:p>FUMU</text:p>
          </table:table-cell>
          <table:table-cell office:value-type="string">
            <text:p>sleep</text:p>
          </table:table-cell>
          <table:table-cell office:value-type="string">
            <text:p>QL/3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S. gala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GAL</text:p>
          </table:table-cell>
          <table:table-cell office:value-type="string">
            <text:p>shine</text:p>
          </table:table-cell>
          <table:table-cell office:value-type="string">
            <text:p>Ety/GAL</text:p>
          </table:table-cell>
          <table:table-cell office:value-type="string">
            <text:p>GAL</text:p>
          </table:table-cell>
          <table:table-cell office:value-type="string">
            <text:p>light, be bright</text:p>
          </table:table-cell>
          <table:table-cell office:value-type="string">
            <text:p>PE17/59, 14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S. gala-</text:p>
          </table:table-cell>
          <table:table-cell office:value-type="string">
            <text:p>grow</text:p>
          </table:table-cell>
          <table:table-cell office:value-type="string">
            <text:p>KALA</text:p>
          </table:table-cell>
          <table:table-cell office:value-type="string">
            <text:p>*grow (of plants)</text:p>
          </table:table-cell>
          <table:table-cell office:value-type="string">
            <text:p>GL/26</text:p>
          </table:table-cell>
          <table:table-cell office:value-type="string">
            <text:p>GALA</text:p>
          </table:table-cell>
          <table:table-cell office:value-type="string">
            <text:p>grow, thrive</text:p>
          </table:table-cell>
          <table:table-cell office:value-type="string">
            <text:p>Ety/GALA; PE22/113</text:p>
          </table:table-cell>
          <table:table-cell office:value-type="string">
            <text:p>GAL</text:p>
          </table:table-cell>
          <table:table-cell office:value-type="string">
            <text:p>grow, flourish</text:p>
          </table:table-cell>
          <table:table-cell office:value-type="string">
            <text:p>PE17/15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. alda</text:p>
          </table:table-cell>
          <table:table-cell office:value-type="string">
            <text:p>tree</text:p>
          </table:table-cell>
          <table:table-cell office:value-type="string">
            <text:p>ALA²</text:p>
          </table:table-cell>
          <table:table-cell office:value-type="string">
            <text:p>spread</text:p>
          </table:table-cell>
          <table:table-cell office:value-type="string">
            <text:p>QL/29</text:p>
          </table:table-cell>
          <table:table-cell office:value-type="string">
            <text:p>GALAD</text:p>
          </table:table-cell>
          <table:table-cell office:value-type="string">
            <text:p>tree</text:p>
          </table:table-cell>
          <table:table-cell office:value-type="string">
            <text:p>Ety/GALAD</text:p>
          </table:table-cell>
          <table:table-cell office:value-type="string">
            <text:p>S. galadh</text:p>
          </table:table-cell>
          <table:table-cell office:value-type="string">
            <text:p>tree</text:p>
          </table:table-cell>
          <table:table-cell office:value-type="string">
            <text:p>LotR/1113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number-columns-repeated="5"/>
          <table:table-cell office:value-type="string">
            <text:p>GALAN</text:p>
          </table:table-cell>
          <table:table-cell office:value-type="string">
            <text:p>bright</text:p>
          </table:table-cell>
          <table:table-cell office:value-type="string">
            <text:p>EtyAC/GAL¹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. alasse</text:p>
          </table:table-cell>
          <table:table-cell office:value-type="string">
            <text:p>happiness</text:p>
          </table:table-cell>
          <table:table-cell table:number-columns-repeated="3"/>
          <table:table-cell office:value-type="string">
            <text:p>GALAS</text:p>
          </table:table-cell>
          <table:table-cell office:value-type="string">
            <text:p>joy, be glad</text:p>
          </table:table-cell>
          <table:table-cell office:value-type="string">
            <text:p>Ety/GALÁS</text:p>
          </table:table-cell>
          <table:table-cell office:value-type="string">
            <text:p>Q. alasse</text:p>
          </table:table-cell>
          <table:table-cell office:value-type="string">
            <text:p>happiness</text:p>
          </table:table-cell>
          <table:table-cell office:value-type="string">
            <text:p>Merin Sentence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/>
          <table:table-cell office:value-type="string">
            <text:p>ƷALAST</text:p>
          </table:table-cell>
          <table:table-cell office:value-type="string">
            <text:p>*marble</text:p>
          </table:table-cell>
          <table:table-cell office:value-type="string">
            <text:p>QL/3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. ampa</text:p>
          </table:table-cell>
          <table:table-cell office:value-type="string">
            <text:p>hook</text:p>
          </table:table-cell>
          <table:table-cell table:number-columns-repeated="3"/>
          <table:table-cell office:value-type="string">
            <text:p>GAP</text:p>
          </table:table-cell>
          <table:table-cell office:value-type="string">
            <text:p>*hook</text:p>
          </table:table-cell>
          <table:table-cell office:value-type="string">
            <text:p>Ety/GAP</text:p>
          </table:table-cell>
          <table:table-cell office:value-type="string">
            <text:p>GAP</text:p>
          </table:table-cell>
          <table:table-cell office:value-type="string">
            <text:p>bend</text:p>
          </table:table-cell>
          <table:table-cell office:value-type="string">
            <text:p>VT47/2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number-columns-repeated="5"/>
          <table:table-cell office:value-type="string">
            <text:p>GAR</text:p>
          </table:table-cell>
          <table:table-cell office:value-type="string">
            <text:p>keep, hold</text:p>
          </table:table-cell>
          <table:table-cell office:value-type="string">
            <text:p>Ety/G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number-columns-repeated="5"/>
          <table:table-cell office:value-type="string">
            <text:p>GARAT</text:p>
          </table:table-cell>
          <table:table-cell office:value-type="string">
            <text:p>*defend</text:p>
          </table:table-cell>
          <table:table-cell office:value-type="string">
            <text:p>Ety/Ʒ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number-columns-repeated="5"/>
          <table:table-cell office:value-type="string">
            <text:p>GAS</text:p>
          </table:table-cell>
          <table:table-cell office:value-type="string">
            <text:p>yawn, gape</text:p>
          </table:table-cell>
          <table:table-cell office:value-type="string">
            <text:p>Ety/GA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number-columns-repeated="5"/>
          <table:table-cell office:value-type="string">
            <text:p>GAT</text:p>
          </table:table-cell>
          <table:table-cell office:value-type="string">
            <text:p>*catch</text:p>
          </table:table-cell>
          <table:table-cell office:value-type="string">
            <text:p>Ety/GA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number-columns-repeated="5"/>
          <table:table-cell office:value-type="string">
            <text:p>GAT(H)</text:p>
          </table:table-cell>
          <table:table-cell office:value-type="string">
            <text:p>*cave</text:p>
          </table:table-cell>
          <table:table-cell office:value-type="string">
            <text:p>Ety/GAT(H)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number-columns-repeated="5"/>
          <table:table-cell office:value-type="string">
            <text:p>GAWA/GOWO</text:p>
          </table:table-cell>
          <table:table-cell office:value-type="string">
            <text:p>devise, contrive</text:p>
          </table:table-cell>
          <table:table-cell office:value-type="string">
            <text:p>Ety/GAWA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number-columns-repeated="5"/>
          <table:table-cell office:value-type="string">
            <text:p>GAY</text:p>
          </table:table-cell>
          <table:table-cell office:value-type="string">
            <text:p>*copper-coloured</text:p>
          </table:table-cell>
          <table:table-cell office:value-type="string">
            <text:p>Ety/GAY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. ear</text:p>
          </table:table-cell>
          <table:table-cell office:value-type="string">
            <text:p>sea</text:p>
          </table:table-cell>
          <table:table-cell table:number-columns-repeated="3"/>
          <table:table-cell office:value-type="string">
            <text:p>AY(AR)</text:p>
          </table:table-cell>
          <table:table-cell office:value-type="string">
            <text:p>sea</text:p>
          </table:table-cell>
          <table:table-cell office:value-type="string">
            <text:p>Ety/AY</text:p>
          </table:table-cell>
          <table:table-cell office:value-type="string">
            <text:p>GAY(AR)</text:p>
          </table:table-cell>
          <table:table-cell office:value-type="string">
            <text:p>sea; awe</text:p>
          </table:table-cell>
          <table:table-cell office:value-type="string">
            <text:p>PE17/149; PM/363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number-columns-repeated="5"/>
          <table:table-cell office:value-type="string">
            <text:p>GAYAS</text:p>
          </table:table-cell>
          <table:table-cell office:value-type="string">
            <text:p>fear</text:p>
          </table:table-cell>
          <table:table-cell office:value-type="string">
            <text:p>Ety/GÁYA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number-columns-repeated="5"/>
          <table:table-cell office:value-type="string">
            <text:p>GENGWA</text:p>
          </table:table-cell>
          <table:table-cell office:value-type="string">
            <text:p>sick</text:p>
          </table:table-cell>
          <table:table-cell office:value-type="string">
            <text:p>Ety/GENG-WĀ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number-columns-repeated="5"/>
          <table:table-cell office:value-type="string">
            <text:p>GIR</text:p>
          </table:table-cell>
          <table:table-cell office:value-type="string">
            <text:p>quiver, shudder</text:p>
          </table:table-cell>
          <table:table-cell office:value-type="string">
            <text:p>Ety/GI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number-columns-repeated="2"/>
          <table:table-cell office:value-type="string">
            <text:p>GIWI</text:p>
          </table:table-cell>
          <table:table-cell office:value-type="string">
            <text:p>*germinate</text:p>
          </table:table-cell>
          <table:table-cell office:value-type="string">
            <text:p>GL/4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S. glamhoth</text:p>
          </table:table-cell>
          <table:table-cell office:value-type="string">
            <text:p>din-horde</text:p>
          </table:table-cell>
          <table:table-cell table:number-columns-repeated="3"/>
          <table:table-cell office:value-type="string">
            <text:p>GLAM</text:p>
          </table:table-cell>
          <table:table-cell office:value-type="string">
            <text:p>*noise, echo</text:p>
          </table:table-cell>
          <table:table-cell office:value-type="string">
            <text:p>Ety/GLAM</text:p>
          </table:table-cell>
          <table:table-cell office:value-type="string">
            <text:p>S. glam</text:p>
          </table:table-cell>
          <table:table-cell office:value-type="string">
            <text:p>din, uproar</text:p>
          </table:table-cell>
          <table:table-cell office:value-type="string">
            <text:p>WJ/39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number-columns-repeated="8"/>
          <table:table-cell office:value-type="string">
            <text:p>(G)LAN</text:p>
          </table:table-cell>
          <table:table-cell office:value-type="string">
            <text:p>edge, border</text:p>
          </table:table-cell>
          <table:table-cell office:value-type="string">
            <text:p>VT42/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Q. laure</text:p>
          </table:table-cell>
          <table:table-cell office:value-type="string">
            <text:p>gold</text:p>
          </table:table-cell>
          <table:table-cell office:value-type="string">
            <text:p>LOU̯RI</text:p>
          </table:table-cell>
          <table:table-cell office:value-type="string">
            <text:p>*gold</text:p>
          </table:table-cell>
          <table:table-cell office:value-type="string">
            <text:p>QL/51</text:p>
          </table:table-cell>
          <table:table-cell office:value-type="string">
            <text:p>(G)LAWAR</text:p>
          </table:table-cell>
          <table:table-cell office:value-type="string">
            <text:p>*gold</text:p>
          </table:table-cell>
          <table:table-cell office:value-type="string">
            <text:p>Ety/GLAW(-R), LAWAR</text:p>
          </table:table-cell>
          <table:table-cell office:value-type="string">
            <text:p>(G)LAWAR</text:p>
          </table:table-cell>
          <table:table-cell office:value-type="string">
            <text:p>golden light</text:p>
          </table:table-cell>
          <table:table-cell office:value-type="string">
            <text:p>NM/351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number-columns-repeated="8"/>
          <table:table-cell office:value-type="string">
            <text:p>GLAY</text:p>
          </table:table-cell>
          <table:table-cell office:value-type="string">
            <text:p>light [substance]</text:p>
          </table:table-cell>
          <table:table-cell office:value-type="string">
            <text:p>NM/28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number-columns-repeated="5"/>
          <table:table-cell office:value-type="string">
            <text:p>(G)LIB</text:p>
          </table:table-cell>
          <table:table-cell office:value-type="string">
            <text:p>*ointment</text:p>
          </table:table-cell>
          <table:table-cell office:value-type="string">
            <text:p>Ety/LIB², EtyAC/GLIB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number-columns-repeated="8"/>
          <table:table-cell office:value-type="string">
            <text:p>GLIM</text:p>
          </table:table-cell>
          <table:table-cell office:value-type="string">
            <text:p>gleam, glint</text:p>
          </table:table-cell>
          <table:table-cell office:value-type="string">
            <text:p>WJ/33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S. Glingal</text:p>
          </table:table-cell>
          <table:table-cell office:value-type="string">
            <text:p>Hanging Flame</text:p>
          </table:table-cell>
          <table:table-cell office:value-type="string">
            <text:p>Q. kinka-</text:p>
          </table:table-cell>
          <table:table-cell office:value-type="string">
            <text:p>hang</text:p>
          </table:table-cell>
          <table:table-cell office:value-type="string">
            <text:p>QL/47</text:p>
          </table:table-cell>
          <table:table-cell office:value-type="string">
            <text:p>(G)LINGI</text:p>
          </table:table-cell>
          <table:table-cell office:value-type="string">
            <text:p>hang</text:p>
          </table:table-cell>
          <table:table-cell office:value-type="string">
            <text:p>Ety/GLING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S. gloss</text:p>
          </table:table-cell>
          <table:table-cell office:value-type="string">
            <text:p>white</text:p>
          </table:table-cell>
          <table:table-cell office:value-type="string">
            <text:p>G. gloss</text:p>
          </table:table-cell>
          <table:table-cell office:value-type="string">
            <text:p>white</text:p>
          </table:table-cell>
          <table:table-cell office:value-type="string">
            <text:p>GL/40</text:p>
          </table:table-cell>
          <table:table-cell office:value-type="string">
            <text:p>GOLOS</text:p>
          </table:table-cell>
          <table:table-cell office:value-type="string">
            <text:p>*snow, white</text:p>
          </table:table-cell>
          <table:table-cell office:value-type="string">
            <text:p>Ety/GOLÓS</text:p>
          </table:table-cell>
          <table:table-cell office:value-type="string">
            <text:p>(G)LOS</text:p>
          </table:table-cell>
          <table:table-cell office:value-type="string">
            <text:p>snow, white</text:p>
          </table:table-cell>
          <table:table-cell office:value-type="string">
            <text:p>PE17/69; VT42/1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Q. ondo</text:p>
          </table:table-cell>
          <table:table-cell office:value-type="string">
            <text:p>stone</text:p>
          </table:table-cell>
          <table:table-cell office:value-type="string">
            <text:p>ONO¹</text:p>
          </table:table-cell>
          <table:table-cell office:value-type="string">
            <text:p>hard</text:p>
          </table:table-cell>
          <table:table-cell office:value-type="string">
            <text:p>QL/70</text:p>
          </table:table-cell>
          <table:table-cell office:value-type="string">
            <text:p>GOND</text:p>
          </table:table-cell>
          <table:table-cell office:value-type="string">
            <text:p>stone</text:p>
          </table:table-cell>
          <table:table-cell office:value-type="string">
            <text:p>Ety/GOND</text:p>
          </table:table-cell>
          <table:table-cell office:value-type="string">
            <text:p>GON(DO)</text:p>
          </table:table-cell>
          <table:table-cell office:value-type="string">
            <text:p>stone, rock</text:p>
          </table:table-cell>
          <table:table-cell office:value-type="string">
            <text:p>PM/374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number-columns-repeated="5"/>
          <table:table-cell office:value-type="string">
            <text:p>GOR</text:p>
          </table:table-cell>
          <table:table-cell office:value-type="string">
            <text:p>violence, impetus, haste</text:p>
          </table:table-cell>
          <table:table-cell office:value-type="string">
            <text:p>Ety/GOR</text:p>
          </table:table-cell>
          <table:table-cell office:value-type="string">
            <text:p>GOR/HOR</text:p>
          </table:table-cell>
          <table:table-cell office:value-type="string">
            <text:p>urge, impel, move</text:p>
          </table:table-cell>
          <table:table-cell office:value-type="string">
            <text:p>NM/176; VT41/13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S. Gothmog</text:p>
          </table:table-cell>
          <table:table-cell/>
          <table:table-cell office:value-type="string">
            <text:p>GOÞ</text:p>
          </table:table-cell>
          <table:table-cell office:value-type="string">
            <text:p>angry</text:p>
          </table:table-cell>
          <table:table-cell office:value-type="string">
            <text:p>PE13/105</text:p>
          </table:table-cell>
          <table:table-cell office:value-type="string">
            <text:p>GOS/GOTH</text:p>
          </table:table-cell>
          <table:table-cell office:value-type="string">
            <text:p>dread</text:p>
          </table:table-cell>
          <table:table-cell office:value-type="string">
            <text:p>Ety/GOS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  <table:table-cell office:value-type="string">
            <text:p>GRAD</text:p>
          </table:table-cell>
          <table:table-cell office:value-type="string">
            <text:p>flatten</text:p>
          </table:table-cell>
          <table:table-cell office:value-type="string">
            <text:p>PE22/127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number-columns-repeated="5"/>
          <table:table-cell office:value-type="string">
            <text:p>GRAWA</text:p>
          </table:table-cell>
          <table:table-cell office:value-type="string">
            <text:p>dark, swart</text:p>
          </table:table-cell>
          <table:table-cell office:value-type="string">
            <text:p>EtyAC/GRAWA</text:p>
          </table:table-cell>
          <table:table-cell office:value-type="string">
            <text:p>GRĀW</text:p>
          </table:table-cell>
          <table:table-cell office:value-type="string">
            <text:p>?dog, bear</text:p>
          </table:table-cell>
          <table:table-cell office:value-type="string">
            <text:p>VT47/35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number-columns-repeated="2"/>
          <table:table-cell office:value-type="string">
            <text:p>GṚÞ</text:p>
          </table:table-cell>
          <table:table-cell office:value-type="string">
            <text:p>*admire</text:p>
          </table:table-cell>
          <table:table-cell office:value-type="string">
            <text:p>GL/4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8"/>
          <table:table-cell office:value-type="string">
            <text:p>GUR</text:p>
          </table:table-cell>
          <table:table-cell office:value-type="string">
            <text:p>hard, difficult</text:p>
          </table:table-cell>
          <table:table-cell office:value-type="string">
            <text:p>PE17/15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8"/>
          <table:table-cell office:value-type="string">
            <text:p>GWAL</text:p>
          </table:table-cell>
          <table:table-cell office:value-type="string">
            <text:p>excited; emotion</text:p>
          </table:table-cell>
          <table:table-cell office:value-type="string">
            <text:p>PE17/14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number-columns-repeated="2"/>
          <table:table-cell office:value-type="string">
            <text:p>GWALA</text:p>
          </table:table-cell>
          <table:table-cell office:value-type="string">
            <text:p>*brown</text:p>
          </table:table-cell>
          <table:table-cell office:value-type="string">
            <text:p>QL/10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number-columns-repeated="8"/>
          <table:table-cell office:value-type="string">
            <text:p>(G)WAN</text:p>
          </table:table-cell>
          <table:table-cell office:value-type="string">
            <text:p>fair</text:p>
          </table:table-cell>
          <table:table-cell office:value-type="string">
            <text:p>PE17/154; WJ/38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number-columns-repeated="2"/>
          <table:table-cell office:value-type="string">
            <text:p>GWASA</text:p>
          </table:table-cell>
          <table:table-cell office:value-type="string">
            <text:p>*rush</text:p>
          </table:table-cell>
          <table:table-cell office:value-type="string">
            <text:p>QL/10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number-columns-repeated="2"/>
          <table:table-cell office:value-type="string">
            <text:p>GWAṘA</text:p>
          </table:table-cell>
          <table:table-cell office:value-type="string">
            <text:p>rub</text:p>
          </table:table-cell>
          <table:table-cell office:value-type="string">
            <text:p>QL/10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2"/>
          <table:table-cell office:value-type="string">
            <text:p>GWEÐE</text:p>
          </table:table-cell>
          <table:table-cell office:value-type="string">
            <text:p>*bend, loop</text:p>
          </table:table-cell>
          <table:table-cell office:value-type="string">
            <text:p>QL/10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number-columns-repeated="2"/>
          <table:table-cell office:value-type="string">
            <text:p>GWELE</text:p>
          </table:table-cell>
          <table:table-cell office:value-type="string">
            <text:p>*boil, bubble</text:p>
          </table:table-cell>
          <table:table-cell office:value-type="string">
            <text:p>QL/10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number-columns-repeated="5"/>
          <table:table-cell office:value-type="string">
            <text:p>GWEN</text:p>
          </table:table-cell>
          <table:table-cell office:value-type="string">
            <text:p>*fresh, green</text:p>
          </table:table-cell>
          <table:table-cell office:value-type="string">
            <text:p>Ety/GWEN</text:p>
          </table:table-cell>
          <table:table-cell office:value-type="string">
            <text:p>{GWEN}</text:p>
          </table:table-cell>
          <table:table-cell office:value-type="string">
            <text:p>beautiful; fresh, fair</text:p>
          </table:table-cell>
          <table:table-cell office:value-type="string">
            <text:p>PE17/191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number-columns-repeated="2"/>
          <table:table-cell office:value-type="string">
            <text:p>GWENE</text:p>
          </table:table-cell>
          <table:table-cell office:value-type="string">
            <text:p>*large, wide</text:p>
          </table:table-cell>
          <table:table-cell office:value-type="string">
            <text:p>GL/4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number-columns-repeated="2"/>
          <table:table-cell office:value-type="string">
            <text:p>GWES</text:p>
          </table:table-cell>
          <table:table-cell office:value-type="string">
            <text:p>greet, welcome</text:p>
          </table:table-cell>
          <table:table-cell office:value-type="string">
            <text:p>GL/4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number-columns-repeated="2"/>
          <table:table-cell office:value-type="string">
            <text:p>GU̯ET</text:p>
          </table:table-cell>
          <table:table-cell office:value-type="string">
            <text:p>*wind, turn</text:p>
          </table:table-cell>
          <table:table-cell office:value-type="string">
            <text:p>GL/4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number-columns-repeated="8"/>
          <table:table-cell office:value-type="string">
            <text:p>GWETH</text:p>
          </table:table-cell>
          <table:table-cell office:value-type="string">
            <text:p>report</text:p>
          </table:table-cell>
          <table:table-cell office:value-type="string">
            <text:p>PM/39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number-columns-repeated="2"/>
          <table:table-cell office:value-type="string">
            <text:p>GWEVE</text:p>
          </table:table-cell>
          <table:table-cell office:value-type="string">
            <text:p>*worm</text:p>
          </table:table-cell>
          <table:table-cell office:value-type="string">
            <text:p>QL/10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  <table:table-cell office:value-type="string">
            <text:p>GWIÐI</text:p>
          </table:table-cell>
          <table:table-cell office:value-type="string">
            <text:p>*plait, weave</text:p>
          </table:table-cell>
          <table:table-cell office:value-type="string">
            <text:p>QL/10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GWIL²</text:p>
          </table:table-cell>
          <table:table-cell office:value-type="string">
            <text:p>*peace, quiet</text:p>
          </table:table-cell>
          <table:table-cell office:value-type="string">
            <text:p>GL/4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  <table:table-cell office:value-type="string">
            <text:p>GWIMI/GWINI</text:p>
          </table:table-cell>
          <table:table-cell office:value-type="string">
            <text:p>sparkle</text:p>
          </table:table-cell>
          <table:table-cell office:value-type="string">
            <text:p>QL/10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Q. miruvórë</text:p>
          </table:table-cell>
          <table:table-cell/>
          <table:table-cell office:value-type="string">
            <text:p>GWORI</text:p>
          </table:table-cell>
          <table:table-cell office:value-type="string">
            <text:p>*wine</text:p>
          </table:table-cell>
          <table:table-cell office:value-type="string">
            <text:p>QL/104</text:p>
          </table:table-cell>
          <table:table-cell table:number-columns-repeated="3"/>
          <table:table-cell office:value-type="string">
            <text:p>{WOR}</text:p>
          </table:table-cell>
          <table:table-cell office:value-type="string">
            <text:p>cause to exude</text:p>
          </table:table-cell>
          <table:table-cell office:value-type="string">
            <text:p>PE17/37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number-columns-repeated="5"/>
          <table:table-cell office:value-type="string">
            <text:p>GYEL</text:p>
          </table:table-cell>
          <table:table-cell office:value-type="string">
            <text:p>*cry of joy</text:p>
          </table:table-cell>
          <table:table-cell office:value-type="string">
            <text:p>Ety/GYEL</text:p>
          </table:table-cell>
          <table:table-cell office:value-type="string">
            <text:p>GYEL/GYOL</text:p>
          </table:table-cell>
          <table:table-cell office:value-type="string">
            <text:p>ringing</text:p>
          </table:table-cell>
          <table:table-cell office:value-type="string">
            <text:p>PE17/138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number-columns-repeated="5"/>
          <table:table-cell office:value-type="string">
            <text:p>GYER</text:p>
          </table:table-cell>
          <table:table-cell office:value-type="string">
            <text:p>*old, worn out</text:p>
          </table:table-cell>
          <table:table-cell office:value-type="string">
            <text:p>Ety/GYE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number-columns-repeated="8"/>
          <table:table-cell office:value-type="string">
            <text:p>ƷAN/HAN</text:p>
          </table:table-cell>
          <table:table-cell office:value-type="string">
            <text:p>adorn; enhance</text:p>
          </table:table-cell>
          <table:table-cell office:value-type="string">
            <text:p>VT47/26; PE22/16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number-columns-repeated="2"/>
          <table:table-cell office:value-type="string">
            <text:p>HALA</text:p>
          </table:table-cell>
          <table:table-cell office:value-type="string">
            <text:p>*leap</text:p>
          </table:table-cell>
          <table:table-cell office:value-type="string">
            <text:p>QL/3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number-columns-repeated="8"/>
          <table:table-cell office:value-type="string">
            <text:p>HATH</text:p>
          </table:table-cell>
          <table:table-cell office:value-type="string">
            <text:p>treat kindly; cure</text:p>
          </table:table-cell>
          <table:table-cell office:value-type="string">
            <text:p>PE22/16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number-columns-repeated="2"/>
          <table:table-cell office:value-type="string">
            <text:p>ǶEHE</text:p>
          </table:table-cell>
          <table:table-cell office:value-type="string">
            <text:p>breath; die, expire</text:p>
          </table:table-cell>
          <table:table-cell office:value-type="string">
            <text:p>QL/4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number-columns-repeated="8"/>
          <table:table-cell office:value-type="string">
            <text:p>HEKE</text:p>
          </table:table-cell>
          <table:table-cell office:value-type="string">
            <text:p>aside, apart, separate</text:p>
          </table:table-cell>
          <table:table-cell office:value-type="string">
            <text:p>WJ/36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number-columns-repeated="8"/>
          <table:table-cell office:value-type="string">
            <text:p>HEN(ET)</text:p>
          </table:table-cell>
          <table:table-cell office:value-type="string">
            <text:p>again; middle</text:p>
          </table:table-cell>
          <table:table-cell office:value-type="string">
            <text:p>VT41/1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number-columns-repeated="2"/>
          <table:table-cell office:value-type="string">
            <text:p>HEN+U</text:p>
          </table:table-cell>
          <table:table-cell office:value-type="string">
            <text:p>*poison</text:p>
          </table:table-cell>
          <table:table-cell office:value-type="string">
            <text:p>QL/4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number-columns-repeated="2"/>
          <table:table-cell office:value-type="string">
            <text:p>HESE/HETH</text:p>
          </table:table-cell>
          <table:table-cell office:value-type="string">
            <text:p>brother or sister</text:p>
          </table:table-cell>
          <table:table-cell office:value-type="string">
            <text:p>QL/40; GL/4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number-columns-repeated="2"/>
          <table:table-cell office:value-type="string">
            <text:p>HESE/HETH</text:p>
          </table:table-cell>
          <table:table-cell office:value-type="string">
            <text:p>wither</text:p>
          </table:table-cell>
          <table:table-cell office:value-type="string">
            <text:p>QL/40; GL/4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number-columns-repeated="5"/>
          <table:table-cell office:value-type="string">
            <text:p>ƷO</text:p>
          </table:table-cell>
          <table:table-cell office:value-type="string">
            <text:p>from, away</text:p>
          </table:table-cell>
          <table:table-cell office:value-type="string">
            <text:p>Ety/ƷŌ̆</text:p>
          </table:table-cell>
          <table:table-cell office:value-type="string">
            <text:p>HO</text:p>
          </table:table-cell>
          <table:table-cell office:value-type="string">
            <text:p>(coming) from</text:p>
          </table:table-cell>
          <table:table-cell office:value-type="string">
            <text:p>WJ/36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number-columns-repeated="2"/>
          <table:table-cell office:value-type="string">
            <text:p>HOTYO</text:p>
          </table:table-cell>
          <table:table-cell office:value-type="string">
            <text:p>sneeze</text:p>
          </table:table-cell>
          <table:table-cell office:value-type="string">
            <text:p>QL/4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number-columns-repeated="2"/>
          <table:table-cell office:value-type="string">
            <text:p>HUHU</text:p>
          </table:table-cell>
          <table:table-cell office:value-type="string">
            <text:p>whoop</text:p>
          </table:table-cell>
          <table:table-cell office:value-type="string">
            <text:p>QL/4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number-columns-repeated="2"/>
          <table:table-cell office:value-type="string">
            <text:p>HULU</text:p>
          </table:table-cell>
          <table:table-cell office:value-type="string">
            <text:p>strip</text:p>
          </table:table-cell>
          <table:table-cell office:value-type="string">
            <text:p>QL/4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number-columns-repeated="2"/>
          <table:table-cell office:value-type="string">
            <text:p>HUNU</text:p>
          </table:table-cell>
          <table:table-cell office:value-type="string">
            <text:p>lie low</text:p>
          </table:table-cell>
          <table:table-cell office:value-type="string">
            <text:p>QL/4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number-columns-repeated="2"/>
          <table:table-cell office:value-type="string">
            <text:p>HYA</text:p>
          </table:table-cell>
          <table:table-cell office:value-type="string">
            <text:p>this by us</text:p>
          </table:table-cell>
          <table:table-cell office:value-type="string">
            <text:p>QL/4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number-columns-repeated="5"/>
          <table:table-cell office:value-type="string">
            <text:p>ƷAN</text:p>
          </table:table-cell>
          <table:table-cell office:value-type="string">
            <text:p>male</text:p>
          </table:table-cell>
          <table:table-cell office:value-type="string">
            <text:p>Ety/ƷA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number-columns-repeated="5"/>
          <table:table-cell office:value-type="string">
            <text:p>ƷAR</text:p>
          </table:table-cell>
          <table:table-cell office:value-type="string">
            <text:p>have, hold</text:p>
          </table:table-cell>
          <table:table-cell office:value-type="string">
            <text:p>Ety/ƷAR</text:p>
          </table:table-cell>
          <table:table-cell office:value-type="string">
            <text:p>Q. haryalye</text:p>
          </table:table-cell>
          <table:table-cell office:value-type="string">
            <text:p>you have</text:p>
          </table:table-cell>
          <table:table-cell office:value-type="string">
            <text:p>Merin Sentence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number-columns-repeated="5"/>
          <table:table-cell office:value-type="string">
            <text:p>ƷEL</text:p>
          </table:table-cell>
          <table:table-cell office:value-type="string">
            <text:p>sky</text:p>
          </table:table-cell>
          <table:table-cell office:value-type="string">
            <text:p>Ety/ƷE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Q./S. i</text:p>
          </table:table-cell>
          <table:table-cell office:value-type="string">
            <text:p>the</text:p>
          </table:table-cell>
          <table:table-cell office:value-type="string">
            <text:p>I</text:p>
          </table:table-cell>
          <table:table-cell office:value-type="string">
            <text:p>here it is</text:p>
          </table:table-cell>
          <table:table-cell office:value-type="string">
            <text:p>QL/41</text:p>
          </table:table-cell>
          <table:table-cell office:value-type="string">
            <text:p>I¹</text:p>
          </table:table-cell>
          <table:table-cell office:value-type="string">
            <text:p>that (deictic particle)</text:p>
          </table:table-cell>
          <table:table-cell office:value-type="string">
            <text:p>Ety/I¹</text:p>
          </table:table-cell>
          <table:table-cell office:value-type="string">
            <text:p>Q./S. i</text:p>
          </table:table-cell>
          <table:table-cell office:value-type="string">
            <text:p>the</text:p>
          </table:table-cell>
          <table:table-cell office:value-type="string">
            <text:p>XXX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number-columns-repeated="8"/>
          <table:table-cell office:value-type="string">
            <text:p>IBI</text:p>
          </table:table-cell>
          <table:table-cell office:value-type="string">
            <text:p>*cliff, sheer descent</text:p>
          </table:table-cell>
          <table:table-cell office:value-type="string">
            <text:p>PE17/9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number-columns-repeated="2"/>
          <table:table-cell office:value-type="string">
            <text:p>IɃI</text:p>
          </table:table-cell>
          <table:table-cell office:value-type="string">
            <text:p>to swarm</text:p>
          </table:table-cell>
          <table:table-cell office:value-type="string">
            <text:p>QL/4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number-columns-repeated="2"/>
          <table:table-cell office:value-type="string">
            <text:p>IŘI/IÐ</text:p>
          </table:table-cell>
          <table:table-cell office:value-type="string">
            <text:p>dwell</text:p>
          </table:table-cell>
          <table:table-cell office:value-type="string">
            <text:p>QL/43; GL/5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Q. Iluvatar</text:p>
          </table:table-cell>
          <table:table-cell/>
          <table:table-cell office:value-type="string">
            <text:p>ILU</text:p>
          </table:table-cell>
          <table:table-cell office:value-type="string">
            <text:p>ether</text:p>
          </table:table-cell>
          <table:table-cell office:value-type="string">
            <text:p>QL/42</text:p>
          </table:table-cell>
          <table:table-cell office:value-type="string">
            <text:p>IL</text:p>
          </table:table-cell>
          <table:table-cell office:value-type="string">
            <text:p>all</text:p>
          </table:table-cell>
          <table:table-cell office:value-type="string">
            <text:p>Ety/IL</text:p>
          </table:table-cell>
          <table:table-cell office:value-type="string">
            <text:p>IL</text:p>
          </table:table-cell>
          <table:table-cell office:value-type="string">
            <text:p>all</text:p>
          </table:table-cell>
          <table:table-cell office:value-type="string">
            <text:p>VT48/25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number-columns-repeated="2"/>
          <table:table-cell office:value-type="string">
            <text:p>ILI¹</text:p>
          </table:table-cell>
          <table:table-cell office:value-type="string">
            <text:p>shine oily</text:p>
          </table:table-cell>
          <table:table-cell office:value-type="string">
            <text:p>QL/4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number-columns-repeated="2"/>
          <table:table-cell office:value-type="string">
            <text:p>ᴵLTᴵL</text:p>
          </table:table-cell>
          <table:table-cell office:value-type="string">
            <text:p>thrust in</text:p>
          </table:table-cell>
          <table:table-cell office:value-type="string">
            <text:p>QL/4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number-columns-repeated="2"/>
          <table:table-cell office:value-type="string">
            <text:p>IMI¹</text:p>
          </table:table-cell>
          <table:table-cell office:value-type="string">
            <text:p>same, alike</text:p>
          </table:table-cell>
          <table:table-cell office:value-type="string">
            <text:p>QL/42</text:p>
          </table:table-cell>
          <table:table-cell table:number-columns-repeated="3"/>
          <table:table-cell office:value-type="string">
            <text:p>Q. im-</text:p>
          </table:table-cell>
          <table:table-cell office:value-type="string">
            <text:p>same</text:p>
          </table:table-cell>
          <table:table-cell office:value-type="string">
            <text:p>VT47/37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number-columns-repeated="5"/>
          <table:table-cell office:value-type="string">
            <text:p>IMBE</text:p>
          </table:table-cell>
          <table:table-cell office:value-type="string">
            <text:p>dell, deep vale</text:p>
          </table:table-cell>
          <table:table-cell office:value-type="string">
            <text:p>EtyAC/IMBE</text:p>
          </table:table-cell>
          <table:table-cell office:value-type="string">
            <text:p>Q. imbe</text:p>
          </table:table-cell>
          <table:table-cell office:value-type="string">
            <text:p>deep valley</text:p>
          </table:table-cell>
          <table:table-cell office:value-type="string">
            <text:p>PE17/9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Q. Ingwe</text:p>
          </table:table-cell>
          <table:table-cell/>
          <table:table-cell office:value-type="string">
            <text:p>INI</text:p>
          </table:table-cell>
          <table:table-cell office:value-type="string">
            <text:p>small</text:p>
          </table:table-cell>
          <table:table-cell office:value-type="string">
            <text:p>QL/42</text:p>
          </table:table-cell>
          <table:table-cell office:value-type="string">
            <text:p>ING</text:p>
          </table:table-cell>
          <table:table-cell office:value-type="string">
            <text:p>first, foremost</text:p>
          </table:table-cell>
          <table:table-cell office:value-type="string">
            <text:p>Ety/ING</text:p>
          </table:table-cell>
          <table:table-cell office:value-type="string">
            <text:p>ING</text:p>
          </table:table-cell>
          <table:table-cell office:value-type="string">
            <text:p>*highest</text:p>
          </table:table-cell>
          <table:table-cell office:value-type="string">
            <text:p>PM/340</text:p>
          </table:table-cell>
          <table:table-cell office:value-type="string">
            <text:p>Full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number-columns-repeated="5"/>
          <table:table-cell office:value-type="string">
            <text:p>INK/INIK</text:p>
          </table:table-cell>
          <table:table-cell office:value-type="string">
            <text:p>*idea</text:p>
          </table:table-cell>
          <table:table-cell office:value-type="string">
            <text:p>Ety/INK</text:p>
          </table:table-cell>
          <table:table-cell office:value-type="string">
            <text:p>IN(ID)</text:p>
          </table:table-cell>
          <table:table-cell office:value-type="string">
            <text:p>mind, (inner) thought</text:p>
          </table:table-cell>
          <table:table-cell office:value-type="string">
            <text:p>PE17/155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Q. íre</text:p>
          </table:table-cell>
          <table:table-cell office:value-type="string">
            <text:p>desire</text:p>
          </table:table-cell>
          <table:table-cell table:number-columns-repeated="3"/>
          <table:table-cell office:value-type="string">
            <text:p>ID</text:p>
          </table:table-cell>
          <table:table-cell office:value-type="string">
            <text:p>*desire</text:p>
          </table:table-cell>
          <table:table-cell office:value-type="string">
            <text:p>Ety/ID</text:p>
          </table:table-cell>
          <table:table-cell office:value-type="string">
            <text:p>IR</text:p>
          </table:table-cell>
          <table:table-cell office:value-type="string">
            <text:p>desire, long for</text:p>
          </table:table-cell>
          <table:table-cell office:value-type="string">
            <text:p>PE17/155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/>
          <table:table-cell office:value-type="string">
            <text:p>ᴵRTYᴵR</text:p>
          </table:table-cell>
          <table:table-cell office:value-type="string">
            <text:p>peck, prick</text:p>
          </table:table-cell>
          <table:table-cell office:value-type="string">
            <text:p>QL/4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number-columns-repeated="2"/>
          <table:table-cell office:value-type="string">
            <text:p>ISI/(G)ITH</text:p>
          </table:table-cell>
          <table:table-cell office:value-type="string">
            <text:p>*(light) snow</text:p>
          </table:table-cell>
          <table:table-cell office:value-type="string">
            <text:p>QL/4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number-columns-repeated="2"/>
          <table:table-cell office:value-type="string">
            <text:p>ISI/GIS</text:p>
          </table:table-cell>
          <table:table-cell office:value-type="string">
            <text:p>*know</text:p>
          </table:table-cell>
          <table:table-cell office:value-type="string">
            <text:p>QL/43</text:p>
          </table:table-cell>
          <table:table-cell office:value-type="string">
            <text:p>IS</text:p>
          </table:table-cell>
          <table:table-cell office:value-type="string">
            <text:p>*know</text:p>
          </table:table-cell>
          <table:table-cell office:value-type="string">
            <text:p>Ety/IS</text:p>
          </table:table-cell>
          <table:table-cell office:value-type="string">
            <text:p>IS</text:p>
          </table:table-cell>
          <table:table-cell office:value-type="string">
            <text:p>know</text:p>
          </table:table-cell>
          <table:table-cell office:value-type="string">
            <text:p>VT48/2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8"/>
          <table:table-cell office:value-type="string">
            <text:p>IT</text:p>
          </table:table-cell>
          <table:table-cell office:value-type="string">
            <text:p>glitter</text:p>
          </table:table-cell>
          <table:table-cell office:value-type="string">
            <text:p>PE17/15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number-columns-repeated="8"/>
          <table:table-cell office:value-type="string">
            <text:p>IT</text:p>
          </table:table-cell>
          <table:table-cell office:value-type="string">
            <text:p>repeat, multiply</text:p>
          </table:table-cell>
          <table:table-cell office:value-type="string">
            <text:p>PE17/11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number-columns-repeated="2"/>
          <table:table-cell office:value-type="string">
            <text:p>ITI</text:p>
          </table:table-cell>
          <table:table-cell office:value-type="string">
            <text:p>peck, bite, annoy</text:p>
          </table:table-cell>
          <table:table-cell office:value-type="string">
            <text:p>QL/4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number-columns-repeated="5"/>
          <table:table-cell office:value-type="string">
            <text:p>Q. kata, N. cad</text:p>
          </table:table-cell>
          <table:table-cell office:value-type="string">
            <text:p>after</text:p>
          </table:table-cell>
          <table:table-cell office:value-type="string">
            <text:p>PE22/124; PM/136</text:p>
          </table:table-cell>
          <table:table-cell office:value-type="string">
            <text:p>KĀ, KATA</text:p>
          </table:table-cell>
          <table:table-cell office:value-type="string">
            <text:p>after of time</text:p>
          </table:table-cell>
          <table:table-cell office:value-type="string">
            <text:p>PE22/14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S. cam</text:p>
          </table:table-cell>
          <table:table-cell office:value-type="string">
            <text:p>hand</text:p>
          </table:table-cell>
          <table:table-cell table:number-columns-repeated="3"/>
          <table:table-cell office:value-type="string">
            <text:p>KAB</text:p>
          </table:table-cell>
          <table:table-cell office:value-type="string">
            <text:p>hollow</text:p>
          </table:table-cell>
          <table:table-cell office:value-type="string">
            <text:p>Ety/KAB</text:p>
          </table:table-cell>
          <table:table-cell office:value-type="string">
            <text:p>KAB</text:p>
          </table:table-cell>
          <table:table-cell office:value-type="string">
            <text:p>hold, contain</text:p>
          </table:table-cell>
          <table:table-cell office:value-type="string">
            <text:p>VT47/7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number-columns-repeated="5"/>
          <table:table-cell office:value-type="string">
            <text:p>KAB</text:p>
          </table:table-cell>
          <table:table-cell office:value-type="string">
            <text:p>be able</text:p>
          </table:table-cell>
          <table:table-cell office:value-type="string">
            <text:p>PE22/127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number-columns-repeated="2"/>
          <table:table-cell office:value-type="string">
            <text:p>KAHA</text:p>
          </table:table-cell>
          <table:table-cell office:value-type="string">
            <text:p>cause</text:p>
          </table:table-cell>
          <table:table-cell office:value-type="string">
            <text:p>QL/4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number-columns-repeated="2"/>
          <table:table-cell office:value-type="string">
            <text:p>KAKA</text:p>
          </table:table-cell>
          <table:table-cell office:value-type="string">
            <text:p>laugh</text:p>
          </table:table-cell>
          <table:table-cell office:value-type="string">
            <text:p>QL/4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Q. calma</text:p>
          </table:table-cell>
          <table:table-cell office:value-type="string">
            <text:p>lamp, light</text:p>
          </table:table-cell>
          <table:table-cell office:value-type="string">
            <text:p>ḶK/KALA</text:p>
          </table:table-cell>
          <table:table-cell office:value-type="string">
            <text:p>shine golden</text:p>
          </table:table-cell>
          <table:table-cell office:value-type="string">
            <text:p>QL/30, 44</text:p>
          </table:table-cell>
          <table:table-cell office:value-type="string">
            <text:p>KAL</text:p>
          </table:table-cell>
          <table:table-cell office:value-type="string">
            <text:p>shine</text:p>
          </table:table-cell>
          <table:table-cell office:value-type="string">
            <text:p>Ety/KAL</text:p>
          </table:table-cell>
          <table:table-cell office:value-type="string">
            <text:p>KAL</text:p>
          </table:table-cell>
          <table:table-cell office:value-type="string">
            <text:p>shine; light</text:p>
          </table:table-cell>
          <table:table-cell office:value-type="string">
            <text:p>PE17/15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number-columns-repeated="2"/>
          <table:table-cell office:value-type="string">
            <text:p>KAIL(I)K</text:p>
          </table:table-cell>
          <table:table-cell office:value-type="string">
            <text:p>*glass</text:p>
          </table:table-cell>
          <table:table-cell office:value-type="string">
            <text:p>GL/25</text:p>
          </table:table-cell>
          <table:table-cell table:number-columns-repeated="3"/>
          <table:table-cell office:value-type="string">
            <text:p>KALAK</text:p>
          </table:table-cell>
          <table:table-cell office:value-type="string">
            <text:p>glass</text:p>
          </table:table-cell>
          <table:table-cell office:value-type="string">
            <text:p>VT47/35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S. aglar</text:p>
          </table:table-cell>
          <table:table-cell office:value-type="string">
            <text:p>glory</text:p>
          </table:table-cell>
          <table:table-cell table:number-columns-repeated="3"/>
          <table:table-cell office:value-type="string">
            <text:p>KALAR</text:p>
          </table:table-cell>
          <table:table-cell office:value-type="string">
            <text:p>be radiant</text:p>
          </table:table-cell>
          <table:table-cell office:value-type="string">
            <text:p>PE18/62</text:p>
          </table:table-cell>
          <table:table-cell office:value-type="string">
            <text:p>KALAR</text:p>
          </table:table-cell>
          <table:table-cell office:value-type="string">
            <text:p>*radiant</text:p>
          </table:table-cell>
          <table:table-cell office:value-type="string">
            <text:p>PE18/8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number-columns-repeated="5"/>
          <table:table-cell office:value-type="string">
            <text:p>N. calad</text:p>
          </table:table-cell>
          <table:table-cell office:value-type="string">
            <text:p>light</text:p>
          </table:table-cell>
          <table:table-cell office:value-type="string">
            <text:p>Ety/KAL</text:p>
          </table:table-cell>
          <table:table-cell office:value-type="string">
            <text:p>KALAT</text:p>
          </table:table-cell>
          <table:table-cell office:value-type="string">
            <text:p>*light</text:p>
          </table:table-cell>
          <table:table-cell office:value-type="string">
            <text:p>PE18/8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Q. kalpa</text:p>
          </table:table-cell>
          <table:table-cell office:value-type="string">
            <text:p>bucket</text:p>
          </table:table-cell>
          <table:table-cell office:value-type="string">
            <text:p>KḶPḶ</text:p>
          </table:table-cell>
          <table:table-cell office:value-type="string">
            <text:p>hold, contain</text:p>
          </table:table-cell>
          <table:table-cell office:value-type="string">
            <text:p>QL/47</text:p>
          </table:table-cell>
          <table:table-cell office:value-type="string">
            <text:p>KALPA</text:p>
          </table:table-cell>
          <table:table-cell office:value-type="string">
            <text:p>water-vessel</text:p>
          </table:table-cell>
          <table:table-cell office:value-type="string">
            <text:p>Ety/KALPA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5"/>
          <table:table-cell office:value-type="string">
            <text:p>KAM</text:p>
          </table:table-cell>
          <table:table-cell office:value-type="string">
            <text:p>bind, join</text:p>
          </table:table-cell>
          <table:table-cell office:value-type="string">
            <text:p>VT44/13</text:p>
          </table:table-cell>
          <table:table-cell office:value-type="string">
            <text:p>KAM</text:p>
          </table:table-cell>
          <table:table-cell office:value-type="string">
            <text:p>fit, suit, agree</text:p>
          </table:table-cell>
          <table:table-cell office:value-type="string">
            <text:p>VT44/14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  <table:table-cell office:value-type="string">
            <text:p>KAMA¹</text:p>
          </table:table-cell>
          <table:table-cell office:value-type="string">
            <text:p>lie down</text:p>
          </table:table-cell>
          <table:table-cell office:value-type="string">
            <text:p>QL/4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  <table:table-cell office:value-type="string">
            <text:p>KAMA²</text:p>
          </table:table-cell>
          <table:table-cell office:value-type="string">
            <text:p>*red flower</text:p>
          </table:table-cell>
          <table:table-cell office:value-type="string">
            <text:p>QL/4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number-columns-repeated="5"/>
          <table:table-cell office:value-type="string">
            <text:p>KAN</text:p>
          </table:table-cell>
          <table:table-cell office:value-type="string">
            <text:p>dare</text:p>
          </table:table-cell>
          <table:table-cell office:value-type="string">
            <text:p>Ety/KAN</text:p>
          </table:table-cell>
          <table:table-cell office:value-type="string">
            <text:p>KAN</text:p>
          </table:table-cell>
          <table:table-cell office:value-type="string">
            <text:p>cry aloud; command</text:p>
          </table:table-cell>
          <table:table-cell office:value-type="string">
            <text:p>PM/361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  <table:table-cell office:value-type="string">
            <text:p>KANA¹</text:p>
          </table:table-cell>
          <table:table-cell office:value-type="string">
            <text:p>*lead (metal)</text:p>
          </table:table-cell>
          <table:table-cell office:value-type="string">
            <text:p>QL/4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  <table:table-cell office:value-type="string">
            <text:p>KANGA/KAŊA</text:p>
          </table:table-cell>
          <table:table-cell office:value-type="string">
            <text:p>weave, twine</text:p>
          </table:table-cell>
          <table:table-cell office:value-type="string">
            <text:p>QL/45, 9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Q. canta</text:p>
          </table:table-cell>
          <table:table-cell office:value-type="string">
            <text:p>four</text:p>
          </table:table-cell>
          <table:table-cell office:value-type="string">
            <text:p>Q. kanta</text:p>
          </table:table-cell>
          <table:table-cell office:value-type="string">
            <text:p>four</text:p>
          </table:table-cell>
          <table:table-cell office:value-type="string">
            <text:p>PE14/82</text:p>
          </table:table-cell>
          <table:table-cell office:value-type="string">
            <text:p>KANAT</text:p>
          </table:table-cell>
          <table:table-cell office:value-type="string">
            <text:p>four</text:p>
          </table:table-cell>
          <table:table-cell office:value-type="string">
            <text:p>Ety/KÁNAT</text:p>
          </table:table-cell>
          <table:table-cell office:value-type="string">
            <text:p>KANAT</text:p>
          </table:table-cell>
          <table:table-cell office:value-type="string">
            <text:p>four</text:p>
          </table:table-cell>
          <table:table-cell office:value-type="string">
            <text:p>VT47/1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number-columns-repeated="2"/>
          <table:table-cell office:value-type="string">
            <text:p>KAPA</text:p>
          </table:table-cell>
          <table:table-cell office:value-type="string">
            <text:p>leap, spring</text:p>
          </table:table-cell>
          <table:table-cell office:value-type="string">
            <text:p>QL/45</text:p>
          </table:table-cell>
          <table:table-cell office:value-type="string">
            <text:p>KAP</text:p>
          </table:table-cell>
          <table:table-cell office:value-type="string">
            <text:p>leap</text:p>
          </table:table-cell>
          <table:table-cell office:value-type="string">
            <text:p>Ety/KAP</text:p>
          </table:table-cell>
          <table:table-cell office:value-type="string">
            <text:p>S. cabed</text:p>
          </table:table-cell>
          <table:table-cell office:value-type="string">
            <text:p>leap</text:p>
          </table:table-cell>
          <table:table-cell office:value-type="string">
            <text:p>S/22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number-columns-repeated="2"/>
          <table:table-cell office:value-type="string">
            <text:p>KARA</text:p>
          </table:table-cell>
          <table:table-cell office:value-type="string">
            <text:p>do, make</text:p>
          </table:table-cell>
          <table:table-cell office:value-type="string">
            <text:p>QL/45</text:p>
          </table:table-cell>
          <table:table-cell office:value-type="string">
            <text:p>KAR</text:p>
          </table:table-cell>
          <table:table-cell office:value-type="string">
            <text:p>make, build, construct</text:p>
          </table:table-cell>
          <table:table-cell office:value-type="string">
            <text:p>Ety/KAR</text:p>
          </table:table-cell>
          <table:table-cell office:value-type="string">
            <text:p>KAR</text:p>
          </table:table-cell>
          <table:table-cell office:value-type="string">
            <text:p>do, make</text:p>
          </table:table-cell>
          <table:table-cell office:value-type="string">
            <text:p>PE17/11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Q. Helcaraxë</text:p>
          </table:table-cell>
          <table:table-cell office:value-type="string">
            <text:p>Grinding Ice</text:p>
          </table:table-cell>
          <table:table-cell office:value-type="string">
            <text:p>KṚKṚ</text:p>
          </table:table-cell>
          <table:table-cell office:value-type="string">
            <text:p>*point, bend</text:p>
          </table:table-cell>
          <table:table-cell office:value-type="string">
            <text:p>QL/48</text:p>
          </table:table-cell>
          <table:table-cell office:value-type="string">
            <text:p>KARAK</text:p>
          </table:table-cell>
          <table:table-cell office:value-type="string">
            <text:p>sharp fang, spike</text:p>
          </table:table-cell>
          <table:table-cell office:value-type="string">
            <text:p>Ety/KARAK</text:p>
          </table:table-cell>
          <table:table-cell office:value-type="string">
            <text:p>S. carach</text:p>
          </table:table-cell>
          <table:table-cell office:value-type="string">
            <text:p>rows of teeth</text:p>
          </table:table-cell>
          <table:table-cell office:value-type="string">
            <text:p>RC/607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Q. carne</text:p>
          </table:table-cell>
          <table:table-cell office:value-type="string">
            <text:p>red</text:p>
          </table:table-cell>
          <table:table-cell office:value-type="string">
            <text:p>KṚNṚ</text:p>
          </table:table-cell>
          <table:table-cell office:value-type="string">
            <text:p>*red</text:p>
          </table:table-cell>
          <table:table-cell office:value-type="string">
            <text:p>QL/48</text:p>
          </table:table-cell>
          <table:table-cell office:value-type="string">
            <text:p>KARAN</text:p>
          </table:table-cell>
          <table:table-cell office:value-type="string">
            <text:p>red</text:p>
          </table:table-cell>
          <table:table-cell office:value-type="string">
            <text:p>Ety/KARÁN</text:p>
          </table:table-cell>
          <table:table-cell office:value-type="string">
            <text:p>S. caran</text:p>
          </table:table-cell>
          <table:table-cell office:value-type="string">
            <text:p>red</text:p>
          </table:table-cell>
          <table:table-cell office:value-type="string">
            <text:p>PE17/3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8"/>
          <table:table-cell office:value-type="string">
            <text:p>KARAP</text:p>
          </table:table-cell>
          <table:table-cell office:value-type="string">
            <text:p>*talk, speech</text:p>
          </table:table-cell>
          <table:table-cell office:value-type="string">
            <text:p>PE17/12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Q. cas</text:p>
          </table:table-cell>
          <table:table-cell office:value-type="string">
            <text:p>head</text:p>
          </table:table-cell>
          <table:table-cell office:value-type="string">
            <text:p>KASA</text:p>
          </table:table-cell>
          <table:table-cell office:value-type="string">
            <text:p>head</text:p>
          </table:table-cell>
          <table:table-cell office:value-type="string">
            <text:p>QL/45</text:p>
          </table:table-cell>
          <table:table-cell office:value-type="string">
            <text:p>KAS</text:p>
          </table:table-cell>
          <table:table-cell office:value-type="string">
            <text:p>head</text:p>
          </table:table-cell>
          <table:table-cell office:value-type="string">
            <text:p>Ety/KAS</text:p>
          </table:table-cell>
          <table:table-cell office:value-type="string">
            <text:p>KAS</text:p>
          </table:table-cell>
          <table:table-cell office:value-type="string">
            <text:p>head</text:p>
          </table:table-cell>
          <table:table-cell office:value-type="string">
            <text:p>PE17/11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S. echad-</text:p>
          </table:table-cell>
          <table:table-cell office:value-type="string">
            <text:p>make</text:p>
          </table:table-cell>
          <table:table-cell table:number-columns-repeated="3"/>
          <table:table-cell office:value-type="string">
            <text:p>KAT</text:p>
          </table:table-cell>
          <table:table-cell office:value-type="string">
            <text:p>shape</text:p>
          </table:table-cell>
          <table:table-cell office:value-type="string">
            <text:p>Ety/KAT</text:p>
          </table:table-cell>
          <table:table-cell office:value-type="string">
            <text:p>KAT</text:p>
          </table:table-cell>
          <table:table-cell office:value-type="string">
            <text:p>shape</text:p>
          </table:table-cell>
          <table:table-cell office:value-type="string">
            <text:p>PE18/8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  <table:table-cell office:value-type="string">
            <text:p>KATYA</text:p>
          </table:table-cell>
          <table:table-cell office:value-type="string">
            <text:p>*gleam</text:p>
          </table:table-cell>
          <table:table-cell office:value-type="string">
            <text:p>QL/4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  <table:table-cell office:value-type="string">
            <text:p>KAVA</text:p>
          </table:table-cell>
          <table:table-cell office:value-type="string">
            <text:p>*dig</text:p>
          </table:table-cell>
          <table:table-cell office:value-type="string">
            <text:p>QL/4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8"/>
          <table:table-cell office:value-type="string">
            <text:p>KAW</text:p>
          </table:table-cell>
          <table:table-cell office:value-type="string">
            <text:p>shelter</text:p>
          </table:table-cell>
          <table:table-cell office:value-type="string">
            <text:p>PE17/10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  <table:table-cell office:value-type="string">
            <text:p>KAẆA</text:p>
          </table:table-cell>
          <table:table-cell office:value-type="string">
            <text:p>stoop</text:p>
          </table:table-cell>
          <table:table-cell office:value-type="string">
            <text:p>QL/4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  <table:table-cell office:value-type="string">
            <text:p>QAHA</text:p>
          </table:table-cell>
          <table:table-cell office:value-type="string">
            <text:p>*quack</text:p>
          </table:table-cell>
          <table:table-cell office:value-type="string">
            <text:p>QL/76</text:p>
          </table:table-cell>
          <table:table-cell table:number-columns-repeated="3"/>
          <table:table-cell office:value-type="string">
            <text:p>KAWAK</text:p>
          </table:table-cell>
          <table:table-cell office:value-type="string">
            <text:p>*croak</text:p>
          </table:table-cell>
          <table:table-cell office:value-type="string">
            <text:p>WJ/395; VT47/36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Q. caita-</text:p>
          </table:table-cell>
          <table:table-cell office:value-type="string">
            <text:p>lie (down)</text:p>
          </table:table-cell>
          <table:table-cell office:value-type="string">
            <text:p>KAYA</text:p>
          </table:table-cell>
          <table:table-cell office:value-type="string">
            <text:p>lie, rest; dwell</text:p>
          </table:table-cell>
          <table:table-cell office:value-type="string">
            <text:p>QL/46</text:p>
          </table:table-cell>
          <table:table-cell office:value-type="string">
            <text:p>KAY</text:p>
          </table:table-cell>
          <table:table-cell office:value-type="string">
            <text:p>lie down</text:p>
          </table:table-cell>
          <table:table-cell office:value-type="string">
            <text:p>Ety/KAY</text:p>
          </table:table-cell>
          <table:table-cell office:value-type="string">
            <text:p>KAY</text:p>
          </table:table-cell>
          <table:table-cell office:value-type="string">
            <text:p>lie</text:p>
          </table:table-cell>
          <table:table-cell office:value-type="string">
            <text:p>PE22/15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  <table:table-cell office:value-type="string">
            <text:p>KAẎA</text:p>
          </table:table-cell>
          <table:table-cell office:value-type="string">
            <text:p>*throat</text:p>
          </table:table-cell>
          <table:table-cell office:value-type="string">
            <text:p>QL/4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Q. cainen</text:p>
          </table:table-cell>
          <table:table-cell office:value-type="string">
            <text:p>ten</text:p>
          </table:table-cell>
          <table:table-cell office:value-type="string">
            <text:p>Q. kainen</text:p>
          </table:table-cell>
          <table:table-cell office:value-type="string">
            <text:p>ten</text:p>
          </table:table-cell>
          <table:table-cell office:value-type="string">
            <text:p>PE14/49</text:p>
          </table:table-cell>
          <table:table-cell office:value-type="string">
            <text:p>KAYAN/KAYAR</text:p>
          </table:table-cell>
          <table:table-cell office:value-type="string">
            <text:p>ten</text:p>
          </table:table-cell>
          <table:table-cell office:value-type="string">
            <text:p>Ety/KAYAN</text:p>
          </table:table-cell>
          <table:table-cell office:value-type="string">
            <text:p>KAYAN</text:p>
          </table:table-cell>
          <table:table-cell office:value-type="string">
            <text:p>ten</text:p>
          </table:table-cell>
          <table:table-cell office:value-type="string">
            <text:p>VT48/1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8"/>
          <table:table-cell office:value-type="string">
            <text:p>KE/EKE</text:p>
          </table:table-cell>
          <table:table-cell office:value-type="string">
            <text:p>have a chance</text:p>
          </table:table-cell>
          <table:table-cell office:value-type="string">
            <text:p>VT49/2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  <table:table-cell office:value-type="string">
            <text:p>KEKE¹</text:p>
          </table:table-cell>
          <table:table-cell office:value-type="string">
            <text:p>to bubble up</text:p>
          </table:table-cell>
          <table:table-cell office:value-type="string">
            <text:p>QL/4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  <table:table-cell office:value-type="string">
            <text:p>KEKE²</text:p>
          </table:table-cell>
          <table:table-cell office:value-type="string">
            <text:p>cluck</text:p>
          </table:table-cell>
          <table:table-cell office:value-type="string">
            <text:p>QL/4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Q. ehtele</text:p>
          </table:table-cell>
          <table:table-cell office:value-type="string">
            <text:p>spring</text:p>
          </table:table-cell>
          <table:table-cell office:value-type="string">
            <text:p>KELE/KELU</text:p>
          </table:table-cell>
          <table:table-cell office:value-type="string">
            <text:p>flow, run; ooze, trickle</text:p>
          </table:table-cell>
          <table:table-cell office:value-type="string">
            <text:p>QL/46</text:p>
          </table:table-cell>
          <table:table-cell office:value-type="string">
            <text:p>KEL</text:p>
          </table:table-cell>
          <table:table-cell office:value-type="string">
            <text:p>run, flow away</text:p>
          </table:table-cell>
          <table:table-cell office:value-type="string">
            <text:p>Ety/KEL</text:p>
          </table:table-cell>
          <table:table-cell office:value-type="string">
            <text:p>KEL</text:p>
          </table:table-cell>
          <table:table-cell office:value-type="string">
            <text:p>flow away</text:p>
          </table:table-cell>
          <table:table-cell office:value-type="string">
            <text:p>PE18/10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Q. cemen</text:p>
          </table:table-cell>
          <table:table-cell office:value-type="string">
            <text:p>earth</text:p>
          </table:table-cell>
          <table:table-cell office:value-type="string">
            <text:p>KEME</text:p>
          </table:table-cell>
          <table:table-cell office:value-type="string">
            <text:p>soil</text:p>
          </table:table-cell>
          <table:table-cell office:value-type="string">
            <text:p>QL/46</text:p>
          </table:table-cell>
          <table:table-cell office:value-type="string">
            <text:p>KEM</text:p>
          </table:table-cell>
          <table:table-cell office:value-type="string">
            <text:p>soil, earth</text:p>
          </table:table-cell>
          <table:table-cell office:value-type="string">
            <text:p>Ety/KEM</text:p>
          </table:table-cell>
          <table:table-cell office:value-type="string">
            <text:p>KEMEN</text:p>
          </table:table-cell>
          <table:table-cell office:value-type="string">
            <text:p>earth</text:p>
          </table:table-cell>
          <table:table-cell office:value-type="string">
            <text:p>PE21/71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Q. cen-</text:p>
          </table:table-cell>
          <table:table-cell office:value-type="string">
            <text:p>see</text:p>
          </table:table-cell>
          <table:table-cell table:number-columns-repeated="3"/>
          <table:table-cell office:value-type="string">
            <text:p>KEN</text:p>
          </table:table-cell>
          <table:table-cell office:value-type="string">
            <text:p>see, perceive</text:p>
          </table:table-cell>
          <table:table-cell office:value-type="string">
            <text:p>PE22/103</text:p>
          </table:table-cell>
          <table:table-cell office:value-type="string">
            <text:p>KEN</text:p>
          </table:table-cell>
          <table:table-cell office:value-type="string">
            <text:p>see</text:p>
          </table:table-cell>
          <table:table-cell office:value-type="string">
            <text:p>PE22/15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/>
          <table:table-cell office:value-type="string">
            <text:p>KENYE</text:p>
          </table:table-cell>
          <table:table-cell office:value-type="string">
            <text:p>prick</text:p>
          </table:table-cell>
          <table:table-cell office:value-type="string">
            <text:p>QL/4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number-columns-repeated="2"/>
          <table:table-cell office:value-type="string">
            <text:p>KEREK</text:p>
          </table:table-cell>
          <table:table-cell office:value-type="string">
            <text:p>*spit</text:p>
          </table:table-cell>
          <table:table-cell office:value-type="string">
            <text:p>GL/2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number-columns-repeated="8"/>
          <table:table-cell office:value-type="string">
            <text:p>KES</text:p>
          </table:table-cell>
          <table:table-cell office:value-type="string">
            <text:p>other</text:p>
          </table:table-cell>
          <table:table-cell office:value-type="string">
            <text:p>VT47/4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8"/>
          <table:table-cell office:value-type="string">
            <text:p>KEÞ</text:p>
          </table:table-cell>
          <table:table-cell office:value-type="string">
            <text:p>enquire of</text:p>
          </table:table-cell>
          <table:table-cell office:value-type="string">
            <text:p>PE17/15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number-columns-repeated="8"/>
          <table:table-cell office:value-type="string">
            <text:p>KEWE</text:p>
          </table:table-cell>
          <table:table-cell office:value-type="string">
            <text:p>new, fresh</text:p>
          </table:table-cell>
          <table:table-cell office:value-type="string">
            <text:p>VT48/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number-columns-repeated="8"/>
          <table:table-cell office:value-type="string">
            <text:p>KEYE</text:p>
          </table:table-cell>
          <table:table-cell office:value-type="string">
            <text:p>suppose</text:p>
          </table:table-cell>
          <table:table-cell office:value-type="string">
            <text:p>VT49/1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S. haudh</text:p>
          </table:table-cell>
          <table:table-cell office:value-type="string">
            <text:p>(funeral) mound</text:p>
          </table:table-cell>
          <table:table-cell table:number-columns-repeated="3"/>
          <table:table-cell office:value-type="string">
            <text:p>KHAG</text:p>
          </table:table-cell>
          <table:table-cell office:value-type="string">
            <text:p>pile up</text:p>
          </table:table-cell>
          <table:table-cell office:value-type="string">
            <text:p>Ety/KHAG; PE19/45</text:p>
          </table:table-cell>
          <table:table-cell office:value-type="string">
            <text:p>KHAB</text:p>
          </table:table-cell>
          <table:table-cell office:value-type="string">
            <text:p>heap up</text:p>
          </table:table-cell>
          <table:table-cell office:value-type="string">
            <text:p>PE19/91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number-columns-repeated="8"/>
          <table:table-cell office:value-type="string">
            <text:p>KHAG</text:p>
          </table:table-cell>
          <table:table-cell office:value-type="string">
            <text:p>stake</text:p>
          </table:table-cell>
          <table:table-cell office:value-type="string">
            <text:p>PE19/9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Q. har-</text:p>
          </table:table-cell>
          <table:table-cell office:value-type="string">
            <text:p>sit, stay</text:p>
          </table:table-cell>
          <table:table-cell office:value-type="string">
            <text:p>HAŘA</text:p>
          </table:table-cell>
          <table:table-cell office:value-type="string">
            <text:p>cleave, remain</text:p>
          </table:table-cell>
          <table:table-cell office:value-type="string">
            <text:p>QL/39</text:p>
          </table:table-cell>
          <table:table-cell office:value-type="string">
            <text:p>KHAD</text:p>
          </table:table-cell>
          <table:table-cell office:value-type="string">
            <text:p>*sit, remain</text:p>
          </table:table-cell>
          <table:table-cell office:value-type="string">
            <text:p>EtyAC/KHAM; PE22/125</text:p>
          </table:table-cell>
          <table:table-cell office:value-type="string">
            <text:p>KHAD</text:p>
          </table:table-cell>
          <table:table-cell office:value-type="string">
            <text:p>sit</text:p>
          </table:table-cell>
          <table:table-cell office:value-type="string">
            <text:p>PE18/9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Q. halla</text:p>
          </table:table-cell>
          <table:table-cell office:value-type="string">
            <text:p>tall</text:p>
          </table:table-cell>
          <table:table-cell table:number-columns-repeated="3"/>
          <table:table-cell office:value-type="string">
            <text:p>KHAL²</text:p>
          </table:table-cell>
          <table:table-cell office:value-type="string">
            <text:p>uplift</text:p>
          </table:table-cell>
          <table:table-cell office:value-type="string">
            <text:p>Ety/KHAL²</text:p>
          </table:table-cell>
          <table:table-cell office:value-type="string">
            <text:p>KHAL</text:p>
          </table:table-cell>
          <table:table-cell office:value-type="string">
            <text:p>lift up</text:p>
          </table:table-cell>
          <table:table-cell office:value-type="string">
            <text:p>PE17/18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number-columns-repeated="2"/>
          <table:table-cell office:value-type="string">
            <text:p>HAM</text:p>
          </table:table-cell>
          <table:table-cell office:value-type="string">
            <text:p>*ground</text:p>
          </table:table-cell>
          <table:table-cell office:value-type="string">
            <text:p>QL/39</text:p>
          </table:table-cell>
          <table:table-cell office:value-type="string">
            <text:p>KHAM¹</text:p>
          </table:table-cell>
          <table:table-cell office:value-type="string">
            <text:p>sit</text:p>
          </table:table-cell>
          <table:table-cell office:value-type="string">
            <text:p>Ety/KHAM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number-columns-repeated="5"/>
          <table:table-cell office:value-type="string">
            <text:p>KHAM²</text:p>
          </table:table-cell>
          <table:table-cell office:value-type="string">
            <text:p>summon</text:p>
          </table:table-cell>
          <table:table-cell office:value-type="string">
            <text:p>Ety/KHAM²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number-columns-repeated="5"/>
          <table:table-cell office:value-type="string">
            <text:p>KHAN</text:p>
          </table:table-cell>
          <table:table-cell office:value-type="string">
            <text:p>understand</text:p>
          </table:table-cell>
          <table:table-cell office:value-type="string">
            <text:p>Ety/KHA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number-columns-repeated="8"/>
          <table:table-cell office:value-type="string">
            <text:p>KHAN</text:p>
          </table:table-cell>
          <table:table-cell office:value-type="string">
            <text:p>back</text:p>
          </table:table-cell>
          <table:table-cell office:value-type="string">
            <text:p>PE17/16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number-columns-repeated="8"/>
          <table:table-cell office:value-type="string">
            <text:p>KHAN</text:p>
          </table:table-cell>
          <table:table-cell office:value-type="string">
            <text:p>brother</text:p>
          </table:table-cell>
          <table:table-cell office:value-type="string">
            <text:p>VT47/1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number-columns-repeated="5"/>
          <table:table-cell office:value-type="string">
            <text:p>KHAP</text:p>
          </table:table-cell>
          <table:table-cell office:value-type="string">
            <text:p>enfold</text:p>
          </table:table-cell>
          <table:table-cell office:value-type="string">
            <text:p>Ety/KHAP</text:p>
          </table:table-cell>
          <table:table-cell office:value-type="string">
            <text:p>KHAP</text:p>
          </table:table-cell>
          <table:table-cell office:value-type="string">
            <text:p>retain, keep</text:p>
          </table:table-cell>
          <table:table-cell office:value-type="string">
            <text:p>PE17/68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number-columns-repeated="5"/>
          <table:table-cell office:value-type="string">
            <text:p>KHAR</text:p>
          </table:table-cell>
          <table:table-cell office:value-type="string">
            <text:p>helmet</text:p>
          </table:table-cell>
          <table:table-cell office:value-type="string">
            <text:p>EtyAC/KH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number-columns-repeated="5"/>
          <table:table-cell office:value-type="string">
            <text:p>KHARAS</text:p>
          </table:table-cell>
          <table:table-cell office:value-type="string">
            <text:p>*precipice</text:p>
          </table:table-cell>
          <table:table-cell office:value-type="string">
            <text:p>Ety/KHARÁ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Q. hat-</text:p>
          </table:table-cell>
          <table:table-cell office:value-type="string">
            <text:p>throw</text:p>
          </table:table-cell>
          <table:table-cell office:value-type="string">
            <text:p>HATA</text:p>
          </table:table-cell>
          <table:table-cell office:value-type="string">
            <text:p>hurl, fling</text:p>
          </table:table-cell>
          <table:table-cell office:value-type="string">
            <text:p>QL/39</text:p>
          </table:table-cell>
          <table:table-cell office:value-type="string">
            <text:p>KHAT</text:p>
          </table:table-cell>
          <table:table-cell office:value-type="string">
            <text:p>hurl</text:p>
          </table:table-cell>
          <table:table-cell office:value-type="string">
            <text:p>Ety/KHAT</text:p>
          </table:table-cell>
          <table:table-cell office:value-type="string">
            <text:p>Q. hatal</text:p>
          </table:table-cell>
          <table:table-cell office:value-type="string">
            <text:p>spear</text:p>
          </table:table-cell>
          <table:table-cell office:value-type="string">
            <text:p>VT49/1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8"/>
          <table:table-cell office:value-type="string">
            <text:p>KHAWA</text:p>
          </table:table-cell>
          <table:table-cell office:value-type="string">
            <text:p>big</text:p>
          </table:table-cell>
          <table:table-cell office:value-type="string">
            <text:p>PE17/11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number-columns-repeated="2"/>
          <table:table-cell office:value-type="string">
            <text:p>HAWA</text:p>
          </table:table-cell>
          <table:table-cell office:value-type="string">
            <text:p>*lie</text:p>
          </table:table-cell>
          <table:table-cell office:value-type="string">
            <text:p>GL/48</text:p>
          </table:table-cell>
          <table:table-cell office:value-type="string">
            <text:p>KHAW</text:p>
          </table:table-cell>
          <table:table-cell office:value-type="string">
            <text:p>rest, lie at ease</text:p>
          </table:table-cell>
          <table:table-cell office:value-type="string">
            <text:p>Ety/KHAW</text:p>
          </table:table-cell>
          <table:table-cell office:value-type="string">
            <text:p>KHAW</text:p>
          </table:table-cell>
          <table:table-cell office:value-type="string">
            <text:p>lay in store</text:p>
          </table:table-cell>
          <table:table-cell office:value-type="string">
            <text:p>PE19/9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number-columns-repeated="8"/>
          <table:table-cell office:value-type="string">
            <text:p>KHAWAD</text:p>
          </table:table-cell>
          <table:table-cell office:value-type="string">
            <text:p>store, hoard</text:p>
          </table:table-cell>
          <table:table-cell office:value-type="string">
            <text:p>PE19/9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S. hae</text:p>
          </table:table-cell>
          <table:table-cell office:value-type="string">
            <text:p>far</text:p>
          </table:table-cell>
          <table:table-cell table:number-columns-repeated="3"/>
          <table:table-cell office:value-type="string">
            <text:p>KHAYA</text:p>
          </table:table-cell>
          <table:table-cell office:value-type="string">
            <text:p>far, distant, remote</text:p>
          </table:table-cell>
          <table:table-cell office:value-type="string">
            <text:p>Ety/KHAYA</text:p>
          </table:table-cell>
          <table:table-cell office:value-type="string">
            <text:p>S. haered</text:p>
          </table:table-cell>
          <table:table-cell office:value-type="string">
            <text:p>remote(ness)</text:p>
          </table:table-cell>
          <table:table-cell office:value-type="string">
            <text:p>LotR/238; PE17/2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Q. helce</text:p>
          </table:table-cell>
          <table:table-cell office:value-type="string">
            <text:p>ice</text:p>
          </table:table-cell>
          <table:table-cell office:value-type="string">
            <text:p>HELE/HḶKḶ</text:p>
          </table:table-cell>
          <table:table-cell office:value-type="string">
            <text:p>*freeze</text:p>
          </table:table-cell>
          <table:table-cell office:value-type="string">
            <text:p>QL/39</text:p>
          </table:table-cell>
          <table:table-cell office:value-type="string">
            <text:p>KHEL(EK)</text:p>
          </table:table-cell>
          <table:table-cell office:value-type="string">
            <text:p>freeze, ice</text:p>
          </table:table-cell>
          <table:table-cell office:value-type="string">
            <text:p>Ety/KHEL</text:p>
          </table:table-cell>
          <table:table-cell office:value-type="string">
            <text:p>KHEL</text:p>
          </table:table-cell>
          <table:table-cell office:value-type="string">
            <text:p>ice</text:p>
          </table:table-cell>
          <table:table-cell office:value-type="string">
            <text:p>PE17/11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Q./S. hen</text:p>
          </table:table-cell>
          <table:table-cell office:value-type="string">
            <text:p>eye</text:p>
          </table:table-cell>
          <table:table-cell office:value-type="string">
            <text:p>SEHE/ÞEΧE</text:p>
          </table:table-cell>
          <table:table-cell office:value-type="string">
            <text:p>*sight</text:p>
          </table:table-cell>
          <table:table-cell office:value-type="string">
            <text:p>QL/82; PE12/21</text:p>
          </table:table-cell>
          <table:table-cell office:value-type="string">
            <text:p>KHEN(DE)</text:p>
          </table:table-cell>
          <table:table-cell office:value-type="string">
            <text:p>look at; eye</text:p>
          </table:table-cell>
          <table:table-cell office:value-type="string">
            <text:p>Ety/KHEN-D-E; EtyAC/KHEN</text:p>
          </table:table-cell>
          <table:table-cell office:value-type="string">
            <text:p>KHEN</text:p>
          </table:table-cell>
          <table:table-cell office:value-type="string">
            <text:p>eye-words</text:p>
          </table:table-cell>
          <table:table-cell office:value-type="string">
            <text:p>PE17/187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number-columns-repeated="2"/>
          <table:table-cell office:value-type="string">
            <text:p>HEPE</text:p>
          </table:table-cell>
          <table:table-cell office:value-type="string">
            <text:p>bind</text:p>
          </table:table-cell>
          <table:table-cell office:value-type="string">
            <text:p>QL/40</text:p>
          </table:table-cell>
          <table:table-cell table:number-columns-repeated="3"/>
          <table:table-cell office:value-type="string">
            <text:p>KHEP</text:p>
          </table:table-cell>
          <table:table-cell office:value-type="string">
            <text:p>retain, keep</text:p>
          </table:table-cell>
          <table:table-cell office:value-type="string">
            <text:p>PE17/157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Q. heru</text:p>
          </table:table-cell>
          <table:table-cell office:value-type="string">
            <text:p>lord</text:p>
          </table:table-cell>
          <table:table-cell office:value-type="string">
            <text:p>HERE</text:p>
          </table:table-cell>
          <table:table-cell office:value-type="string">
            <text:p>rule, have power</text:p>
          </table:table-cell>
          <table:table-cell office:value-type="string">
            <text:p>QL/40</text:p>
          </table:table-cell>
          <table:table-cell office:value-type="string">
            <text:p>KHER</text:p>
          </table:table-cell>
          <table:table-cell office:value-type="string">
            <text:p>rule, govern</text:p>
          </table:table-cell>
          <table:table-cell office:value-type="string">
            <text:p>Ety/KHER</text:p>
          </table:table-cell>
          <table:table-cell office:value-type="string">
            <text:p>KHER</text:p>
          </table:table-cell>
          <table:table-cell office:value-type="string">
            <text:p>possess</text:p>
          </table:table-cell>
          <table:table-cell office:value-type="string">
            <text:p>Let/17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number-columns-repeated="5"/>
          <table:table-cell office:value-type="string">
            <text:p>KHES</text:p>
          </table:table-cell>
          <table:table-cell office:value-type="string">
            <text:p>command</text:p>
          </table:table-cell>
          <table:table-cell office:value-type="string">
            <text:p>EtyAC/KHE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Q. Hildi</text:p>
          </table:table-cell>
          <table:table-cell office:value-type="string">
            <text:p>Mortal Men</text:p>
          </table:table-cell>
          <table:table-cell office:value-type="string">
            <text:p>HIL</text:p>
          </table:table-cell>
          <table:table-cell office:value-type="string">
            <text:p>*youth, offspring</text:p>
          </table:table-cell>
          <table:table-cell office:value-type="string">
            <text:p>QL/40</text:p>
          </table:table-cell>
          <table:table-cell office:value-type="string">
            <text:p>KHIL</text:p>
          </table:table-cell>
          <table:table-cell office:value-type="string">
            <text:p>follow</text:p>
          </table:table-cell>
          <table:table-cell office:value-type="string">
            <text:p>Ety/KHIL</text:p>
          </table:table-cell>
          <table:table-cell office:value-type="string">
            <text:p>KHILI</text:p>
          </table:table-cell>
          <table:table-cell office:value-type="string">
            <text:p>follow</text:p>
          </table:table-cell>
          <table:table-cell office:value-type="string">
            <text:p>WJ/387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number-columns-repeated="5"/>
          <table:table-cell office:value-type="string">
            <text:p>KHIM</text:p>
          </table:table-cell>
          <table:table-cell office:value-type="string">
            <text:p>stick, cleave, adhere</text:p>
          </table:table-cell>
          <table:table-cell office:value-type="string">
            <text:p>Ety/KHIM</text:p>
          </table:table-cell>
          <table:table-cell office:value-type="string">
            <text:p>KHIM</text:p>
          </table:table-cell>
          <table:table-cell office:value-type="string">
            <text:p>adhere</text:p>
          </table:table-cell>
          <table:table-cell office:value-type="string">
            <text:p>PE22/13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number-columns-repeated="8"/>
          <table:table-cell office:value-type="string">
            <text:p>KHIN</text:p>
          </table:table-cell>
          <table:table-cell office:value-type="string">
            <text:p>child</text:p>
          </table:table-cell>
          <table:table-cell office:value-type="string">
            <text:p>WJ/40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number-columns-repeated="8"/>
          <table:table-cell office:value-type="string">
            <text:p>KHIR</text:p>
          </table:table-cell>
          <table:table-cell office:value-type="string">
            <text:p>light on, find</text:p>
          </table:table-cell>
          <table:table-cell office:value-type="string">
            <text:p>PE17/7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Q. híse</text:p>
          </table:table-cell>
          <table:table-cell office:value-type="string">
            <text:p>mist</text:p>
          </table:table-cell>
          <table:table-cell office:value-type="string">
            <text:p>HISI</text:p>
          </table:table-cell>
          <table:table-cell office:value-type="string">
            <text:p>*mist, dimness</text:p>
          </table:table-cell>
          <table:table-cell office:value-type="string">
            <text:p>QL/40</text:p>
          </table:table-cell>
          <table:table-cell office:value-type="string">
            <text:p>KHIS/KHITH</text:p>
          </table:table-cell>
          <table:table-cell office:value-type="string">
            <text:p>mist, fog</text:p>
          </table:table-cell>
          <table:table-cell office:value-type="string">
            <text:p>Ety/KHIS</text:p>
          </table:table-cell>
          <table:table-cell office:value-type="string">
            <text:p>KHIΘ</text:p>
          </table:table-cell>
          <table:table-cell office:value-type="string">
            <text:p>mist</text:p>
          </table:table-cell>
          <table:table-cell office:value-type="string">
            <text:p>PE17/7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number-columns-repeated="2"/>
          <table:table-cell office:value-type="string">
            <text:p>HO/OHO</text:p>
          </table:table-cell>
          <table:table-cell office:value-type="string">
            <text:p>shout, scream</text:p>
          </table:table-cell>
          <table:table-cell office:value-type="string">
            <text:p>QL/40</text:p>
          </table:table-cell>
          <table:table-cell table:number-columns-repeated="3"/>
          <table:table-cell office:value-type="string">
            <text:p>KHOL</text:p>
          </table:table-cell>
          <table:table-cell office:value-type="string">
            <text:p>crow, cry aloud</text:p>
          </table:table-cell>
          <table:table-cell office:value-type="string">
            <text:p>PE21/82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Q. hón</text:p>
          </table:table-cell>
          <table:table-cell office:value-type="string">
            <text:p>heart</text:p>
          </table:table-cell>
          <table:table-cell office:value-type="string">
            <text:p>HONO</text:p>
          </table:table-cell>
          <table:table-cell office:value-type="string">
            <text:p>*heart</text:p>
          </table:table-cell>
          <table:table-cell office:value-type="string">
            <text:p>QL/40</text:p>
          </table:table-cell>
          <table:table-cell office:value-type="string">
            <text:p>KHŌ-N</text:p>
          </table:table-cell>
          <table:table-cell office:value-type="string">
            <text:p>heart (physical)</text:p>
          </table:table-cell>
          <table:table-cell office:value-type="string">
            <text:p>Ety/KHŌ-N</text:p>
          </table:table-cell>
          <table:table-cell office:value-type="string">
            <text:p>KHOM</text:p>
          </table:table-cell>
          <table:table-cell office:value-type="string">
            <text:p>heart (physical organ)</text:p>
          </table:table-cell>
          <table:table-cell office:value-type="string">
            <text:p>NM/17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number-columns-repeated="2"/>
          <table:table-cell office:value-type="string">
            <text:p>KOPO</text:p>
          </table:table-cell>
          <table:table-cell office:value-type="string">
            <text:p>keep, guard</text:p>
          </table:table-cell>
          <table:table-cell office:value-type="string">
            <text:p>QL/47</text:p>
          </table:table-cell>
          <table:table-cell office:value-type="string">
            <text:p>KHOP/{KOP}</text:p>
          </table:table-cell>
          <table:table-cell office:value-type="string">
            <text:p>*harbour, bay</text:p>
          </table:table-cell>
          <table:table-cell office:value-type="string">
            <text:p>Ety/KHOP, KOP</text:p>
          </table:table-cell>
          <table:table-cell office:value-type="string">
            <text:p>{S. côf}</text:p>
          </table:table-cell>
          <table:table-cell office:value-type="string">
            <text:p>bay</text:p>
          </table:table-cell>
          <table:table-cell office:value-type="string">
            <text:p>VT42/15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number-columns-repeated="8"/>
          <table:table-cell office:value-type="string">
            <text:p>KHOL/SKOL</text:p>
          </table:table-cell>
          <table:table-cell office:value-type="string">
            <text:p>shut, close</text:p>
          </table:table-cell>
          <table:table-cell office:value-type="string">
            <text:p>PE17/9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number-columns-repeated="5"/>
          <table:table-cell office:value-type="string">
            <text:p>KHOR</text:p>
          </table:table-cell>
          <table:table-cell office:value-type="string">
            <text:p>put in motion, urge on</text:p>
          </table:table-cell>
          <table:table-cell office:value-type="string">
            <text:p>Ety/KHO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S. hoth</text:p>
          </table:table-cell>
          <table:table-cell office:value-type="string">
            <text:p>host</text:p>
          </table:table-cell>
          <table:table-cell office:value-type="string">
            <text:p>HOSO/ΧOÞ</text:p>
          </table:table-cell>
          <table:table-cell office:value-type="string">
            <text:p>*gather</text:p>
          </table:table-cell>
          <table:table-cell office:value-type="string">
            <text:p>QL/41</text:p>
          </table:table-cell>
          <table:table-cell office:value-type="string">
            <text:p>KHOTH</text:p>
          </table:table-cell>
          <table:table-cell office:value-type="string">
            <text:p>gather</text:p>
          </table:table-cell>
          <table:table-cell office:value-type="string">
            <text:p>Ety/KHOTH</text:p>
          </table:table-cell>
          <table:table-cell office:value-type="string">
            <text:p>KHOT</text:p>
          </table:table-cell>
          <table:table-cell office:value-type="string">
            <text:p>gather</text:p>
          </table:table-cell>
          <table:table-cell office:value-type="string">
            <text:p>PE17/3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S. Huan</text:p>
          </table:table-cell>
          <table:table-cell office:value-type="string">
            <text:p>Hound</text:p>
          </table:table-cell>
          <table:table-cell office:value-type="string">
            <text:p>SAẆA</text:p>
          </table:table-cell>
          <table:table-cell office:value-type="string">
            <text:p>*dog</text:p>
          </table:table-cell>
          <table:table-cell office:value-type="string">
            <text:p>QL/82</text:p>
          </table:table-cell>
          <table:table-cell office:value-type="string">
            <text:p>KHUG</text:p>
          </table:table-cell>
          <table:table-cell office:value-type="string">
            <text:p>bark, bay</text:p>
          </table:table-cell>
          <table:table-cell office:value-type="string">
            <text:p>Ety/KHUGAN</text:p>
          </table:table-cell>
          <table:table-cell office:value-type="string">
            <text:p>S. Huan</text:p>
          </table:table-cell>
          <table:table-cell office:value-type="string">
            <text:p>hound</text:p>
          </table:table-cell>
          <table:table-cell office:value-type="string">
            <text:p>S/142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number-columns-repeated="8"/>
          <table:table-cell office:value-type="string">
            <text:p>KHY-</text:p>
          </table:table-cell>
          <table:table-cell office:value-type="string">
            <text:p>other</text:p>
          </table:table-cell>
          <table:table-cell office:value-type="string">
            <text:p>VT49/1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number-columns-repeated="8"/>
          <table:table-cell office:value-type="string">
            <text:p>KHYĀ</text:p>
          </table:table-cell>
          <table:table-cell office:value-type="string">
            <text:p>before, in front</text:p>
          </table:table-cell>
          <table:table-cell office:value-type="string">
            <text:p>PE22/14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S. harn</text:p>
          </table:table-cell>
          <table:table-cell office:value-type="string">
            <text:p>south</text:p>
          </table:table-cell>
          <table:table-cell table:number-columns-repeated="3"/>
          <table:table-cell office:value-type="string">
            <text:p>KHYAR</text:p>
          </table:table-cell>
          <table:table-cell office:value-type="string">
            <text:p>left hand</text:p>
          </table:table-cell>
          <table:table-cell office:value-type="string">
            <text:p>Ety/KHYAR</text:p>
          </table:table-cell>
          <table:table-cell office:value-type="string">
            <text:p>Q. hyarmen</text:p>
          </table:table-cell>
          <table:table-cell office:value-type="string">
            <text:p>south</text:p>
          </table:table-cell>
          <table:table-cell office:value-type="string">
            <text:p>LotR/104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number-columns-repeated="5"/>
          <table:table-cell office:value-type="string">
            <text:p>KHYEL(ES)</text:p>
          </table:table-cell>
          <table:table-cell office:value-type="string">
            <text:p>glass</text:p>
          </table:table-cell>
          <table:table-cell office:value-type="string">
            <text:p>Ety/KHYEL(ES)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number-columns-repeated="2"/>
          <table:table-cell office:value-type="string">
            <text:p>KILI</text:p>
          </table:table-cell>
          <table:table-cell office:value-type="string">
            <text:p>edge</text:p>
          </table:table-cell>
          <table:table-cell office:value-type="string">
            <text:p>QL/46</text:p>
          </table:table-cell>
          <table:table-cell office:value-type="string">
            <text:p>KIL</text:p>
          </table:table-cell>
          <table:table-cell office:value-type="string">
            <text:p>divide</text:p>
          </table:table-cell>
          <table:table-cell office:value-type="string">
            <text:p>Ety/KIL</text:p>
          </table:table-cell>
          <table:table-cell office:value-type="string">
            <text:p>KIL</text:p>
          </table:table-cell>
          <table:table-cell office:value-type="string">
            <text:p>choose, select</text:p>
          </table:table-cell>
          <table:table-cell office:value-type="string">
            <text:p>PE22/149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number-columns-repeated="5"/>
          <table:table-cell office:value-type="string">
            <text:p>KIM</text:p>
          </table:table-cell>
          <table:table-cell office:value-type="string">
            <text:p>light on, find</text:p>
          </table:table-cell>
          <table:table-cell office:value-type="string">
            <text:p>PE22/103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number-columns-repeated="8"/>
          <table:table-cell office:value-type="string">
            <text:p>KIM</text:p>
          </table:table-cell>
          <table:table-cell office:value-type="string">
            <text:p>edge, brink of</text:p>
          </table:table-cell>
          <table:table-cell office:value-type="string">
            <text:p>PE22/14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Q. cirya</text:p>
          </table:table-cell>
          <table:table-cell office:value-type="string">
            <text:p>ship</text:p>
          </table:table-cell>
          <table:table-cell office:value-type="string">
            <text:p>KIŘI/KISI</text:p>
          </table:table-cell>
          <table:table-cell office:value-type="string">
            <text:p>cut, split</text:p>
          </table:table-cell>
          <table:table-cell office:value-type="string">
            <text:p>QL/47</text:p>
          </table:table-cell>
          <table:table-cell office:value-type="string">
            <text:p>KIR</text:p>
          </table:table-cell>
          <table:table-cell office:value-type="string">
            <text:p>*cleave</text:p>
          </table:table-cell>
          <table:table-cell office:value-type="string">
            <text:p>Ety/KIR; EtyAC/KIR</text:p>
          </table:table-cell>
          <table:table-cell office:value-type="string">
            <text:p>KIR</text:p>
          </table:table-cell>
          <table:table-cell office:value-type="string">
            <text:p>cleave, cut</text:p>
          </table:table-cell>
          <table:table-cell office:value-type="string">
            <text:p>PE17/7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number-columns-repeated="2"/>
          <table:table-cell office:value-type="string">
            <text:p>KḶKḶ</text:p>
          </table:table-cell>
          <table:table-cell office:value-type="string">
            <text:p>gather, collect, reap</text:p>
          </table:table-cell>
          <table:table-cell office:value-type="string">
            <text:p>QL/47</text:p>
          </table:table-cell>
          <table:table-cell office:value-type="string">
            <text:p>KIRIK</text:p>
          </table:table-cell>
          <table:table-cell office:value-type="string">
            <text:p>*reap</text:p>
          </table:table-cell>
          <table:table-cell office:value-type="string">
            <text:p>Ety/KIRIK</text:p>
          </table:table-cell>
          <table:table-cell office:value-type="string">
            <text:p>Q. circa</text:p>
          </table:table-cell>
          <table:table-cell office:value-type="string">
            <text:p>sickle</text:p>
          </table:table-cell>
          <table:table-cell office:value-type="string">
            <text:p>S/48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S. criss</text:p>
          </table:table-cell>
          <table:table-cell office:value-type="string">
            <text:p>cleft</text:p>
          </table:table-cell>
          <table:table-cell office:value-type="string">
            <text:p>KIRISI</text:p>
          </table:table-cell>
          <table:table-cell office:value-type="string">
            <text:p>cut, split</text:p>
          </table:table-cell>
          <table:table-cell office:value-type="string">
            <text:p>QL/47</text:p>
          </table:table-cell>
          <table:table-cell office:value-type="string">
            <text:p>KIRIS</text:p>
          </table:table-cell>
          <table:table-cell office:value-type="string">
            <text:p>cut</text:p>
          </table:table-cell>
          <table:table-cell office:value-type="string">
            <text:p>Ety/KIRIS</text:p>
          </table:table-cell>
          <table:table-cell office:value-type="string">
            <text:p>S. Orcrist</text:p>
          </table:table-cell>
          <table:table-cell office:value-type="string">
            <text:p>Orc-cleaver</text:p>
          </table:table-cell>
          <table:table-cell office:value-type="string">
            <text:p>LotR/28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number-columns-repeated="8"/>
          <table:table-cell office:value-type="string">
            <text:p>KIT</text:p>
          </table:table-cell>
          <table:table-cell office:value-type="string">
            <text:p>*small</text:p>
          </table:table-cell>
          <table:table-cell office:value-type="string">
            <text:p>PE17/15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number-columns-repeated="2"/>
          <table:table-cell office:value-type="string">
            <text:p>KITI</text:p>
          </table:table-cell>
          <table:table-cell office:value-type="string">
            <text:p>*tickle</text:p>
          </table:table-cell>
          <table:table-cell office:value-type="string">
            <text:p>QL/4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number-columns-repeated="2"/>
          <table:table-cell office:value-type="string">
            <text:p>KḶTḶ</text:p>
          </table:table-cell>
          <table:table-cell office:value-type="string">
            <text:p>tilt; fling</text:p>
          </table:table-cell>
          <table:table-cell office:value-type="string">
            <text:p>QL/4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2"/>
          <table:table-cell office:value-type="string">
            <text:p>KṆŘṆ</text:p>
          </table:table-cell>
          <table:table-cell office:value-type="string">
            <text:p>shine</text:p>
          </table:table-cell>
          <table:table-cell office:value-type="string">
            <text:p>QL/47; PME/4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number-columns-repeated="8"/>
          <table:table-cell office:value-type="string">
            <text:p>KOB/KOM</text:p>
          </table:table-cell>
          <table:table-cell office:value-type="string">
            <text:p>gather, collect</text:p>
          </table:table-cell>
          <table:table-cell office:value-type="string">
            <text:p>PE17/15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number-columns-repeated="2"/>
          <table:table-cell office:value-type="string">
            <text:p>KOHO</text:p>
          </table:table-cell>
          <table:table-cell office:value-type="string">
            <text:p>undergo, endure</text:p>
          </table:table-cell>
          <table:table-cell office:value-type="string">
            <text:p>QL/4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number-columns-repeated="8"/>
          <table:table-cell office:value-type="string">
            <text:p>KOL</text:p>
          </table:table-cell>
          <table:table-cell office:value-type="string">
            <text:p>bear, carry</text:p>
          </table:table-cell>
          <table:table-cell office:value-type="string">
            <text:p>PE22/15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number-columns-repeated="2"/>
          <table:table-cell office:value-type="string">
            <text:p>KOLO¹</text:p>
          </table:table-cell>
          <table:table-cell office:value-type="string">
            <text:p>to strain through</text:p>
          </table:table-cell>
          <table:table-cell office:value-type="string">
            <text:p>QL/4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number-columns-repeated="2"/>
          <table:table-cell office:value-type="string">
            <text:p>KOLO²</text:p>
          </table:table-cell>
          <table:table-cell office:value-type="string">
            <text:p>*point</text:p>
          </table:table-cell>
          <table:table-cell office:value-type="string">
            <text:p>QL/4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number-columns-repeated="2"/>
          <table:table-cell office:value-type="string">
            <text:p>KOMO</text:p>
          </table:table-cell>
          <table:table-cell office:value-type="string">
            <text:p>*ball, roll</text:p>
          </table:table-cell>
          <table:table-cell office:value-type="string">
            <text:p>QL/4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number-columns-repeated="2"/>
          <table:table-cell office:value-type="string">
            <text:p>KOŘO¹</text:p>
          </table:table-cell>
          <table:table-cell office:value-type="string">
            <text:p>revere</text:p>
          </table:table-cell>
          <table:table-cell office:value-type="string">
            <text:p>QL/4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number-columns-repeated="2"/>
          <table:table-cell office:value-type="string">
            <text:p>KORO²</text:p>
          </table:table-cell>
          <table:table-cell office:value-type="string">
            <text:p>be round, roll</text:p>
          </table:table-cell>
          <table:table-cell office:value-type="string">
            <text:p>QL/48</text:p>
          </table:table-cell>
          <table:table-cell office:value-type="string">
            <text:p>KOR</text:p>
          </table:table-cell>
          <table:table-cell office:value-type="string">
            <text:p>round</text:p>
          </table:table-cell>
          <table:table-cell office:value-type="string">
            <text:p>Ety/KOR</text:p>
          </table:table-cell>
          <table:table-cell office:value-type="string">
            <text:p>KOR</text:p>
          </table:table-cell>
          <table:table-cell office:value-type="string">
            <text:p>round</text:p>
          </table:table-cell>
          <table:table-cell office:value-type="string">
            <text:p>PE17/18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number-columns-repeated="5"/>
          <table:table-cell office:value-type="string">
            <text:p>KORKA</text:p>
          </table:table-cell>
          <table:table-cell office:value-type="string">
            <text:p>crow</text:p>
          </table:table-cell>
          <table:table-cell office:value-type="string">
            <text:p>Ety/KARKA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S. Morgoth</text:p>
          </table:table-cell>
          <table:table-cell office:value-type="string">
            <text:p>Black Foe</text:p>
          </table:table-cell>
          <table:table-cell office:value-type="string">
            <text:p>KOSO/GOTH</text:p>
          </table:table-cell>
          <table:table-cell office:value-type="string">
            <text:p>strive</text:p>
          </table:table-cell>
          <table:table-cell office:value-type="string">
            <text:p>QL/48</text:p>
          </table:table-cell>
          <table:table-cell office:value-type="string">
            <text:p>KOT(H)</text:p>
          </table:table-cell>
          <table:table-cell office:value-type="string">
            <text:p>strive, quarrel</text:p>
          </table:table-cell>
          <table:table-cell office:value-type="string">
            <text:p>Ety/KOT</text:p>
          </table:table-cell>
          <table:table-cell office:value-type="string">
            <text:p>KHOT</text:p>
          </table:table-cell>
          <table:table-cell office:value-type="string">
            <text:p>hate</text:p>
          </table:table-cell>
          <table:table-cell office:value-type="string">
            <text:p>PE18/87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number-columns-repeated="2"/>
          <table:table-cell office:value-type="string">
            <text:p>KOẎO</text:p>
          </table:table-cell>
          <table:table-cell office:value-type="string">
            <text:p>have life</text:p>
          </table:table-cell>
          <table:table-cell office:value-type="string">
            <text:p>QL/48</text:p>
          </table:table-cell>
          <table:table-cell office:value-type="string">
            <text:p>KOY</text:p>
          </table:table-cell>
          <table:table-cell office:value-type="string">
            <text:p>live, have life</text:p>
          </table:table-cell>
          <table:table-cell office:value-type="string">
            <text:p>PE22/125</text:p>
          </table:table-cell>
          <table:table-cell office:value-type="string">
            <text:p>KOJ</text:p>
          </table:table-cell>
          <table:table-cell office:value-type="string">
            <text:p>*life</text:p>
          </table:table-cell>
          <table:table-cell office:value-type="string">
            <text:p>PE22/13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number-columns-repeated="5"/>
          <table:table-cell office:value-type="string">
            <text:p>KRAB</text:p>
          </table:table-cell>
          <table:table-cell office:value-type="string">
            <text:p>press</text:p>
          </table:table-cell>
          <table:table-cell office:value-type="string">
            <text:p>Ety/KRAB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number-columns-repeated="2"/>
          <table:table-cell office:value-type="string">
            <text:p>KᴬRPᴬR</text:p>
          </table:table-cell>
          <table:table-cell office:value-type="string">
            <text:p>pluck</text:p>
          </table:table-cell>
          <table:table-cell office:value-type="string">
            <text:p>QL/4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number-columns-repeated="5"/>
          <table:table-cell office:value-type="string">
            <text:p>KŪ</text:p>
          </table:table-cell>
          <table:table-cell office:value-type="string">
            <text:p>*coo</text:p>
          </table:table-cell>
          <table:table-cell office:value-type="string">
            <text:p>Ety/KŪ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number-columns-repeated="8"/>
          <table:table-cell office:value-type="string">
            <text:p>KUB</text:p>
          </table:table-cell>
          <table:table-cell office:value-type="string">
            <text:p>hide, secrete</text:p>
          </table:table-cell>
          <table:table-cell office:value-type="string">
            <text:p>PE22/15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N. cûm</text:p>
          </table:table-cell>
          <table:table-cell office:value-type="string">
            <text:p>mound</text:p>
          </table:table-cell>
          <table:table-cell office:value-type="string">
            <text:p>KUMU</text:p>
          </table:table-cell>
          <table:table-cell office:value-type="string">
            <text:p>heap up</text:p>
          </table:table-cell>
          <table:table-cell office:value-type="string">
            <text:p>QL/49</text:p>
          </table:table-cell>
          <table:table-cell office:value-type="string">
            <text:p>KUB</text:p>
          </table:table-cell>
          <table:table-cell office:value-type="string">
            <text:p>*mound, heap</text:p>
          </table:table-cell>
          <table:table-cell office:value-type="string">
            <text:p>Ety/KUB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S. cû</text:p>
          </table:table-cell>
          <table:table-cell office:value-type="string">
            <text:p>bow</text:p>
          </table:table-cell>
          <table:table-cell office:value-type="string">
            <text:p>KUVU</text:p>
          </table:table-cell>
          <table:table-cell office:value-type="string">
            <text:p>bend, bow</text:p>
          </table:table-cell>
          <table:table-cell office:value-type="string">
            <text:p>QL/49</text:p>
          </table:table-cell>
          <table:table-cell office:value-type="string">
            <text:p>KUƷ</text:p>
          </table:table-cell>
          <table:table-cell office:value-type="string">
            <text:p>bow</text:p>
          </table:table-cell>
          <table:table-cell office:value-type="string">
            <text:p>Ety/KUƷ</text:p>
          </table:table-cell>
          <table:table-cell office:value-type="string">
            <text:p>S. cû</text:p>
          </table:table-cell>
          <table:table-cell office:value-type="string">
            <text:p>bow</text:p>
          </table:table-cell>
          <table:table-cell office:value-type="string">
            <text:p>PE17/122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number-columns-repeated="2"/>
          <table:table-cell office:value-type="string">
            <text:p>KULU</text:p>
          </table:table-cell>
          <table:table-cell office:value-type="string">
            <text:p>gold</text:p>
          </table:table-cell>
          <table:table-cell office:value-type="string">
            <text:p>QL/49</text:p>
          </table:table-cell>
          <table:table-cell office:value-type="string">
            <text:p>KUL</text:p>
          </table:table-cell>
          <table:table-cell office:value-type="string">
            <text:p>Golden-red</text:p>
          </table:table-cell>
          <table:table-cell office:value-type="string">
            <text:p>Ety/KUL</text:p>
          </table:table-cell>
          <table:table-cell office:value-type="string">
            <text:p>Q. culumalda</text:p>
          </table:table-cell>
          <table:table-cell office:value-type="string">
            <text:p>laburnum</text:p>
          </table:table-cell>
          <table:table-cell office:value-type="string">
            <text:p>RC/62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number-columns-repeated="5"/>
          <table:table-cell office:value-type="string">
            <text:p>KUM</text:p>
          </table:table-cell>
          <table:table-cell office:value-type="string">
            <text:p>void</text:p>
          </table:table-cell>
          <table:table-cell office:value-type="string">
            <text:p>Ety/KUM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number-columns-repeated="5"/>
          <table:table-cell office:value-type="string">
            <text:p>KUNDU</text:p>
          </table:table-cell>
          <table:table-cell office:value-type="string">
            <text:p>prince</text:p>
          </table:table-cell>
          <table:table-cell office:value-type="string">
            <text:p>Ety/KUNDŪ</text:p>
          </table:table-cell>
          <table:table-cell office:value-type="string">
            <text:p>KON</text:p>
          </table:table-cell>
          <table:table-cell office:value-type="string">
            <text:p>lord</text:p>
          </table:table-cell>
          <table:table-cell office:value-type="string">
            <text:p>PE17/113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number-columns-repeated="2"/>
          <table:table-cell office:value-type="string">
            <text:p>KUPU</text:p>
          </table:table-cell>
          <table:table-cell office:value-type="string">
            <text:p>hump</text:p>
          </table:table-cell>
          <table:table-cell office:value-type="string">
            <text:p>QL/4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. Curufin</text:p>
          </table:table-cell>
          <table:table-cell/>
          <table:table-cell office:value-type="string">
            <text:p>KURU</text:p>
          </table:table-cell>
          <table:table-cell office:value-type="string">
            <text:p>*magic</text:p>
          </table:table-cell>
          <table:table-cell office:value-type="string">
            <text:p>QL/49</text:p>
          </table:table-cell>
          <table:table-cell office:value-type="string">
            <text:p>KUR</text:p>
          </table:table-cell>
          <table:table-cell office:value-type="string">
            <text:p>craft</text:p>
          </table:table-cell>
          <table:table-cell office:value-type="string">
            <text:p>Ety/KUR</text:p>
          </table:table-cell>
          <table:table-cell office:value-type="string">
            <text:p>KURU</text:p>
          </table:table-cell>
          <table:table-cell office:value-type="string">
            <text:p>skill</text:p>
          </table:table-cell>
          <table:table-cell office:value-type="string">
            <text:p>VT41/10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number-columns-repeated="5"/>
          <table:table-cell office:value-type="string">
            <text:p>KURUM</text:p>
          </table:table-cell>
          <table:table-cell office:value-type="string">
            <text:p>left</text:p>
          </table:table-cell>
          <table:table-cell office:value-type="string">
            <text:p>Ety/KURÚM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Q. Cuiviénen</text:p>
          </table:table-cell>
          <table:table-cell office:value-type="string">
            <text:p>Water of Awakening</text:p>
          </table:table-cell>
          <table:table-cell office:value-type="string">
            <text:p>QIV</text:p>
          </table:table-cell>
          <table:table-cell office:value-type="string">
            <text:p>*awake</text:p>
          </table:table-cell>
          <table:table-cell office:value-type="string">
            <text:p>GL/28-29</text:p>
          </table:table-cell>
          <table:table-cell office:value-type="string">
            <text:p>KUY</text:p>
          </table:table-cell>
          <table:table-cell office:value-type="string">
            <text:p>come to life, awake</text:p>
          </table:table-cell>
          <table:table-cell office:value-type="string">
            <text:p>Ety/KUY</text:p>
          </table:table-cell>
          <table:table-cell office:value-type="string">
            <text:p>KUY</text:p>
          </table:table-cell>
          <table:table-cell office:value-type="string">
            <text:p>awake not live; live</text:p>
          </table:table-cell>
          <table:table-cell office:value-type="string">
            <text:p>NM/274; PE22/156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number-columns-repeated="5"/>
          <table:table-cell office:value-type="string">
            <text:p>KWA</text:p>
          </table:table-cell>
          <table:table-cell office:value-type="string">
            <text:p>something</text:p>
          </table:table-cell>
          <table:table-cell office:value-type="string">
            <text:p>EtyAC/KWA</text:p>
          </table:table-cell>
          <table:table-cell office:value-type="string">
            <text:p>KWA</text:p>
          </table:table-cell>
          <table:table-cell office:value-type="string">
            <text:p>full, complete</text:p>
          </table:table-cell>
          <table:table-cell office:value-type="string">
            <text:p>VT42/24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number-columns-repeated="2"/>
          <table:table-cell office:value-type="string">
            <text:p>QALA</text:p>
          </table:table-cell>
          <table:table-cell office:value-type="string">
            <text:p>die</text:p>
          </table:table-cell>
          <table:table-cell office:value-type="string">
            <text:p>QL/76</text:p>
          </table:table-cell>
          <table:table-cell office:value-type="string">
            <text:p>KWAL</text:p>
          </table:table-cell>
          <table:table-cell office:value-type="string">
            <text:p>die in pain</text:p>
          </table:table-cell>
          <table:table-cell office:value-type="string">
            <text:p>Ety/KWAL</text:p>
          </table:table-cell>
          <table:table-cell office:value-type="string">
            <text:p>KWAL</text:p>
          </table:table-cell>
          <table:table-cell office:value-type="string">
            <text:p>pain, die</text:p>
          </table:table-cell>
          <table:table-cell office:value-type="string">
            <text:p>PE18/91, 10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Q. qáme</text:p>
          </table:table-cell>
          <table:table-cell office:value-type="string">
            <text:p>sickness</text:p>
          </table:table-cell>
          <table:table-cell office:value-type="string">
            <text:p>QAMA</text:p>
          </table:table-cell>
          <table:table-cell office:value-type="string">
            <text:p>*sick</text:p>
          </table:table-cell>
          <table:table-cell office:value-type="string">
            <text:p>QL/76</text:p>
          </table:table-cell>
          <table:table-cell office:value-type="string">
            <text:p>KWAM</text:p>
          </table:table-cell>
          <table:table-cell office:value-type="string">
            <text:p>*sick</text:p>
          </table:table-cell>
          <table:table-cell office:value-type="string">
            <text:p>Ety/KWAM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S. Celebrimbor</text:p>
          </table:table-cell>
          <table:table-cell office:value-type="string">
            <text:p>Silver-fist</text:p>
          </table:table-cell>
          <table:table-cell table:number-columns-repeated="3"/>
          <table:table-cell office:value-type="string">
            <text:p>KWAR</text:p>
          </table:table-cell>
          <table:table-cell office:value-type="string">
            <text:p>clutching hand, fist</text:p>
          </table:table-cell>
          <table:table-cell office:value-type="string">
            <text:p>Ety/KWAR</text:p>
          </table:table-cell>
          <table:table-cell office:value-type="string">
            <text:p>KWAR</text:p>
          </table:table-cell>
          <table:table-cell office:value-type="string">
            <text:p>clenched hand, fist</text:p>
          </table:table-cell>
          <table:table-cell office:value-type="string">
            <text:p>VT47/2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Q. quanta</text:p>
          </table:table-cell>
          <table:table-cell office:value-type="string">
            <text:p>full</text:p>
          </table:table-cell>
          <table:table-cell office:value-type="string">
            <text:p>QṆTṆ/QATA</text:p>
          </table:table-cell>
          <table:table-cell office:value-type="string">
            <text:p>*fill; full</text:p>
          </table:table-cell>
          <table:table-cell office:value-type="string">
            <text:p>QL/78</text:p>
          </table:table-cell>
          <table:table-cell office:value-type="string">
            <text:p>KWAT</text:p>
          </table:table-cell>
          <table:table-cell office:value-type="string">
            <text:p>*fill; full</text:p>
          </table:table-cell>
          <table:table-cell office:value-type="string">
            <text:p>Ety/KWAT</text:p>
          </table:table-cell>
          <table:table-cell office:value-type="string">
            <text:p>KWATA</text:p>
          </table:table-cell>
          <table:table-cell office:value-type="string">
            <text:p>fill; full</text:p>
          </table:table-cell>
          <table:table-cell office:value-type="string">
            <text:p>WJ/392, 41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number-columns-repeated="5"/>
          <table:table-cell office:value-type="string">
            <text:p>KWǢ</text:p>
          </table:table-cell>
          <table:table-cell office:value-type="string">
            <text:p>onomatopoetic</text:p>
          </table:table-cell>
          <table:table-cell office:value-type="string">
            <text:p>EtyAC/KWǢ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Q. quel-</text:p>
          </table:table-cell>
          <table:table-cell office:value-type="string">
            <text:p>fade</text:p>
          </table:table-cell>
          <table:table-cell office:value-type="string">
            <text:p>QELE</text:p>
          </table:table-cell>
          <table:table-cell office:value-type="string">
            <text:p>perish, fade</text:p>
          </table:table-cell>
          <table:table-cell office:value-type="string">
            <text:p>QL/76</text:p>
          </table:table-cell>
          <table:table-cell office:value-type="string">
            <text:p>KWEL</text:p>
          </table:table-cell>
          <table:table-cell office:value-type="string">
            <text:p>fade, wither</text:p>
          </table:table-cell>
          <table:table-cell office:value-type="string">
            <text:p>Ety/KWEL</text:p>
          </table:table-cell>
          <table:table-cell office:value-type="string">
            <text:p>KWEL</text:p>
          </table:table-cell>
          <table:table-cell office:value-type="string">
            <text:p>fade, die away</text:p>
          </table:table-cell>
          <table:table-cell office:value-type="string">
            <text:p>PE18/10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Q. Quenya</text:p>
          </table:table-cell>
          <table:table-cell/>
          <table:table-cell office:value-type="string">
            <text:p>Q. Qen(d-)</text:p>
          </table:table-cell>
          <table:table-cell office:value-type="string">
            <text:p>Elf</text:p>
          </table:table-cell>
          <table:table-cell office:value-type="string">
            <text:p>QL/92</text:p>
          </table:table-cell>
          <table:table-cell office:value-type="string">
            <text:p>KWEN(ED)</text:p>
          </table:table-cell>
          <table:table-cell office:value-type="string">
            <text:p>Elf</text:p>
          </table:table-cell>
          <table:table-cell office:value-type="string">
            <text:p>Ety/KWEN(ED)</text:p>
          </table:table-cell>
          <table:table-cell office:value-type="string">
            <text:p>KWEN(ED)</text:p>
          </table:table-cell>
          <table:table-cell office:value-type="string">
            <text:p>spoken, articulate</text:p>
          </table:table-cell>
          <table:table-cell office:value-type="string">
            <text:p>PE19/9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number-columns-repeated="2"/>
          <table:table-cell office:value-type="string">
            <text:p>KERE/KU̯ERE</text:p>
          </table:table-cell>
          <table:table-cell office:value-type="string">
            <text:p>turn</text:p>
          </table:table-cell>
          <table:table-cell office:value-type="string">
            <text:p>QL/46; PE14/65</text:p>
          </table:table-cell>
          <table:table-cell table:number-columns-repeated="3"/>
          <table:table-cell office:value-type="string">
            <text:p>KWER/KWEL</text:p>
          </table:table-cell>
          <table:table-cell office:value-type="string">
            <text:p>revolve</text:p>
          </table:table-cell>
          <table:table-cell office:value-type="string">
            <text:p>PE17/65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Q. quesse</text:p>
          </table:table-cell>
          <table:table-cell office:value-type="string">
            <text:p>feather</text:p>
          </table:table-cell>
          <table:table-cell table:number-columns-repeated="3"/>
          <table:table-cell office:value-type="string">
            <text:p>KWES</text:p>
          </table:table-cell>
          <table:table-cell office:value-type="string">
            <text:p>*feather</text:p>
          </table:table-cell>
          <table:table-cell office:value-type="string">
            <text:p>Ety/KWES</text:p>
          </table:table-cell>
          <table:table-cell office:value-type="string">
            <text:p>Q. quesse</text:p>
          </table:table-cell>
          <table:table-cell office:value-type="string">
            <text:p>feather</text:p>
          </table:table-cell>
          <table:table-cell office:value-type="string">
            <text:p>LotR/112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Q. quet-</text:p>
          </table:table-cell>
          <table:table-cell office:value-type="string">
            <text:p>say, speak</text:p>
          </table:table-cell>
          <table:table-cell office:value-type="string">
            <text:p>QETE</text:p>
          </table:table-cell>
          <table:table-cell office:value-type="string">
            <text:p>*speak</text:p>
          </table:table-cell>
          <table:table-cell office:value-type="string">
            <text:p>QL/77</text:p>
          </table:table-cell>
          <table:table-cell office:value-type="string">
            <text:p>KWET</text:p>
          </table:table-cell>
          <table:table-cell office:value-type="string">
            <text:p>say</text:p>
          </table:table-cell>
          <table:table-cell office:value-type="string">
            <text:p>Ety/KWET</text:p>
          </table:table-cell>
          <table:table-cell office:value-type="string">
            <text:p>KWET</text:p>
          </table:table-cell>
          <table:table-cell office:value-type="string">
            <text:p>speak, say</text:p>
          </table:table-cell>
          <table:table-cell office:value-type="string">
            <text:p>WJ/391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Q. qinga</text:p>
          </table:table-cell>
          <table:table-cell office:value-type="string">
            <text:p>bow</text:p>
          </table:table-cell>
          <table:table-cell office:value-type="string">
            <text:p>QINGI</text:p>
          </table:table-cell>
          <table:table-cell office:value-type="string">
            <text:p>bow</text:p>
          </table:table-cell>
          <table:table-cell office:value-type="string">
            <text:p>QL/77</text:p>
          </table:table-cell>
          <table:table-cell office:value-type="string">
            <text:p>KWIG</text:p>
          </table:table-cell>
          <table:table-cell office:value-type="string">
            <text:p>*bow (for shooting)</text:p>
          </table:table-cell>
          <table:table-cell office:value-type="string">
            <text:p>Ety/KWIG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8"/>
          <table:table-cell office:value-type="string">
            <text:p>KWIN</text:p>
          </table:table-cell>
          <table:table-cell office:value-type="string">
            <text:p>crest, top edge</text:p>
          </table:table-cell>
          <table:table-cell office:value-type="string">
            <text:p>PE17/17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2"/>
          <table:table-cell office:value-type="string">
            <text:p>IQI</text:p>
          </table:table-cell>
          <table:table-cell office:value-type="string">
            <text:p>request, ask for</text:p>
          </table:table-cell>
          <table:table-cell office:value-type="string">
            <text:p>QL/43</text:p>
          </table:table-cell>
          <table:table-cell table:number-columns-repeated="3"/>
          <table:table-cell office:value-type="string">
            <text:p>KWI(S)</text:p>
          </table:table-cell>
          <table:table-cell office:value-type="string">
            <text:p>suppose</text:p>
          </table:table-cell>
          <table:table-cell office:value-type="string">
            <text:p>PE22/158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number-columns-repeated="5"/>
          <table:table-cell office:value-type="string">
            <text:p>KYAR</text:p>
          </table:table-cell>
          <table:table-cell office:value-type="string">
            <text:p>cause</text:p>
          </table:table-cell>
          <table:table-cell office:value-type="string">
            <text:p>Ety/KY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Q. tyav-</text:p>
          </table:table-cell>
          <table:table-cell office:value-type="string">
            <text:p>taste</text:p>
          </table:table-cell>
          <table:table-cell office:value-type="string">
            <text:p>TYAVA</text:p>
          </table:table-cell>
          <table:table-cell office:value-type="string">
            <text:p>to savour, taste</text:p>
          </table:table-cell>
          <table:table-cell office:value-type="string">
            <text:p>QL/49</text:p>
          </table:table-cell>
          <table:table-cell office:value-type="string">
            <text:p>KYAB</text:p>
          </table:table-cell>
          <table:table-cell office:value-type="string">
            <text:p>taste</text:p>
          </table:table-cell>
          <table:table-cell office:value-type="string">
            <text:p>Ety/KYAB</text:p>
          </table:table-cell>
          <table:table-cell office:value-type="string">
            <text:p>KYAW</text:p>
          </table:table-cell>
          <table:table-cell office:value-type="string">
            <text:p>taste, choose</text:p>
          </table:table-cell>
          <table:table-cell office:value-type="string">
            <text:p>PE22/152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number-columns-repeated="8"/>
          <table:table-cell office:value-type="string">
            <text:p>KJEL</text:p>
          </table:table-cell>
          <table:table-cell office:value-type="string">
            <text:p>go down slowly</text:p>
          </table:table-cell>
          <table:table-cell office:value-type="string">
            <text:p>PE17/15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number-columns-repeated="5"/>
          <table:table-cell office:value-type="string">
            <text:p>KYEL</text:p>
          </table:table-cell>
          <table:table-cell office:value-type="string">
            <text:p>come to an end</text:p>
          </table:table-cell>
          <table:table-cell office:value-type="string">
            <text:p>Ety/KYEL</text:p>
          </table:table-cell>
          <table:table-cell office:value-type="string">
            <text:p>KJEL</text:p>
          </table:table-cell>
          <table:table-cell table:style-name="ce3" office:value-type="string">
            <text:p>come to an end</text:p>
          </table:table-cell>
          <table:table-cell office:value-type="string">
            <text:p>PE18/10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S. Celegorm</text:p>
          </table:table-cell>
          <table:table-cell office:value-type="string">
            <text:p>Hasty-riser</text:p>
          </table:table-cell>
          <table:table-cell table:number-columns-repeated="3"/>
          <table:table-cell office:value-type="string">
            <text:p>KYELEK</text:p>
          </table:table-cell>
          <table:table-cell office:value-type="string">
            <text:p>swift, agile</text:p>
          </table:table-cell>
          <table:table-cell office:value-type="string">
            <text:p>Ety/KYELEK</text:p>
          </table:table-cell>
          <table:table-cell office:value-type="string">
            <text:p>KELEKĀ</text:p>
          </table:table-cell>
          <table:table-cell office:value-type="string">
            <text:p>*hasty</text:p>
          </table:table-cell>
          <table:table-cell office:value-type="string">
            <text:p>VT41/10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S./N./G. celeb</text:p>
          </table:table-cell>
          <table:table-cell office:value-type="string">
            <text:p>silver</text:p>
          </table:table-cell>
          <table:table-cell office:value-type="string">
            <text:p>TELEPE</text:p>
          </table:table-cell>
          <table:table-cell office:value-type="string">
            <text:p>*silver</text:p>
          </table:table-cell>
          <table:table-cell office:value-type="string">
            <text:p>QL/91</text:p>
          </table:table-cell>
          <table:table-cell office:value-type="string">
            <text:p>KYELEP</text:p>
          </table:table-cell>
          <table:table-cell office:value-type="string">
            <text:p>silver</text:p>
          </table:table-cell>
          <table:table-cell office:value-type="string">
            <text:p>Ety/KYELEP</text:p>
          </table:table-cell>
          <table:table-cell office:value-type="string">
            <text:p>KYELEP</text:p>
          </table:table-cell>
          <table:table-cell office:value-type="string">
            <text:p>silver</text:p>
          </table:table-cell>
          <table:table-cell office:value-type="string">
            <text:p>PM/36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Q. lá</text:p>
          </table:table-cell>
          <table:table-cell office:value-type="string">
            <text:p>not</text:p>
          </table:table-cell>
          <table:table-cell office:value-type="string">
            <text:p>Ḷ-</text:p>
          </table:table-cell>
          <table:table-cell office:value-type="string">
            <text:p>negative prefix</text:p>
          </table:table-cell>
          <table:table-cell office:value-type="string">
            <text:p>QL/97; PE12/11</text:p>
          </table:table-cell>
          <table:table-cell office:value-type="string">
            <text:p>LA</text:p>
          </table:table-cell>
          <table:table-cell office:value-type="string">
            <text:p>no, not</text:p>
          </table:table-cell>
          <table:table-cell office:value-type="string">
            <text:p>Ety/LA</text:p>
          </table:table-cell>
          <table:table-cell office:value-type="string">
            <text:p>(A)LA</text:p>
          </table:table-cell>
          <table:table-cell office:value-type="string">
            <text:p>negative</text:p>
          </table:table-cell>
          <table:table-cell office:value-type="string">
            <text:p>PE22/156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number-columns-repeated="5"/>
          <table:table-cell office:value-type="string">
            <text:p>{LAƷ}</text:p>
          </table:table-cell>
          <table:table-cell office:value-type="string">
            <text:p>?please</text:p>
          </table:table-cell>
          <table:table-cell office:value-type="string">
            <text:p>EtyAC/LAƷ</text:p>
          </table:table-cell>
          <table:table-cell office:value-type="string">
            <text:p>LĀ</text:p>
          </table:table-cell>
          <table:table-cell office:value-type="string">
            <text:p>pleasure/assent</text:p>
          </table:table-cell>
          <table:table-cell office:value-type="string">
            <text:p>PE17/158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Q. lambe</text:p>
          </table:table-cell>
          <table:table-cell office:value-type="string">
            <text:p>tongue</text:p>
          </table:table-cell>
          <table:table-cell office:value-type="string">
            <text:p>LAVA</text:p>
          </table:table-cell>
          <table:table-cell office:value-type="string">
            <text:p>lick</text:p>
          </table:table-cell>
          <table:table-cell office:value-type="string">
            <text:p>QL/52</text:p>
          </table:table-cell>
          <table:table-cell office:value-type="string">
            <text:p>LAB</text:p>
          </table:table-cell>
          <table:table-cell office:value-type="string">
            <text:p>lick</text:p>
          </table:table-cell>
          <table:table-cell office:value-type="string">
            <text:p>Ety/LAB</text:p>
          </table:table-cell>
          <table:table-cell office:value-type="string">
            <text:p>LABA</text:p>
          </table:table-cell>
          <table:table-cell office:value-type="string">
            <text:p>lick, move tongue</text:p>
          </table:table-cell>
          <table:table-cell office:value-type="string">
            <text:p>WJ/41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S. land</text:p>
          </table:table-cell>
          <table:table-cell office:value-type="string">
            <text:p>wide, broad</text:p>
          </table:table-cell>
          <table:table-cell office:value-type="string">
            <text:p>LAŘA</text:p>
          </table:table-cell>
          <table:table-cell office:value-type="string">
            <text:p>*broad</text:p>
          </table:table-cell>
          <table:table-cell office:value-type="string">
            <text:p>QL/51</text:p>
          </table:table-cell>
          <table:table-cell office:value-type="string">
            <text:p>LAD</text:p>
          </table:table-cell>
          <table:table-cell office:value-type="string">
            <text:p>lie flat, be flat</text:p>
          </table:table-cell>
          <table:table-cell office:value-type="string">
            <text:p>Ety/LAD; PE22/126</text:p>
          </table:table-cell>
          <table:table-cell office:value-type="string">
            <text:p>LAD</text:p>
          </table:table-cell>
          <table:table-cell office:value-type="string">
            <text:p>bottom, ground</text:p>
          </table:table-cell>
          <table:table-cell office:value-type="string">
            <text:p>PE17/150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number-columns-repeated="5"/>
          <table:table-cell office:value-type="string">
            <text:p>LAG</text:p>
          </table:table-cell>
          <table:table-cell office:value-type="string">
            <text:p>*cut</text:p>
          </table:table-cell>
          <table:table-cell office:value-type="string">
            <text:p>Ety/LA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  <table:table-cell office:value-type="string">
            <text:p>LAHA</text:p>
          </table:table-cell>
          <table:table-cell office:value-type="string">
            <text:p>*open, extend</text:p>
          </table:table-cell>
          <table:table-cell office:value-type="string">
            <text:p>QL/5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S. lang</text:p>
          </table:table-cell>
          <table:table-cell office:value-type="string">
            <text:p>neck, throat</text:p>
          </table:table-cell>
          <table:table-cell table:number-columns-repeated="3"/>
          <table:table-cell office:value-type="string">
            <text:p>LAK¹/LANK</text:p>
          </table:table-cell>
          <table:table-cell office:value-type="string">
            <text:p>swallow</text:p>
          </table:table-cell>
          <table:table-cell office:value-type="string">
            <text:p>Ety/LAK¹, LANK</text:p>
          </table:table-cell>
          <table:table-cell office:value-type="string">
            <text:p>LAG</text:p>
          </table:table-cell>
          <table:table-cell office:value-type="string">
            <text:p>*neck</text:p>
          </table:table-cell>
          <table:table-cell table:style-name="ce3" office:value-type="string">
            <text:p>PE17/65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8"/>
          <table:table-cell office:value-type="string">
            <text:p>LAŊ/LAƷA</text:p>
          </table:table-cell>
          <table:table-cell office:value-type="string">
            <text:p>cross, go beyond</text:p>
          </table:table-cell>
          <table:table-cell office:value-type="string">
            <text:p>PE17/65; PE17/9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Q. laika</text:p>
          </table:table-cell>
          <table:table-cell office:value-type="string">
            <text:p>keen, sharp</text:p>
          </table:table-cell>
          <table:table-cell office:value-type="string">
            <text:p>LAIKA</text:p>
          </table:table-cell>
          <table:table-cell office:value-type="string">
            <text:p>*keen, sharp</text:p>
          </table:table-cell>
          <table:table-cell office:value-type="string">
            <text:p>QL/50</text:p>
          </table:table-cell>
          <table:table-cell office:value-type="string">
            <text:p>LAIK</text:p>
          </table:table-cell>
          <table:table-cell office:value-type="string">
            <text:p>keen, sharp, acute</text:p>
          </table:table-cell>
          <table:table-cell office:value-type="string">
            <text:p>Ety/LAIK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5"/>
          <table:table-cell office:value-type="string">
            <text:p>LAKH</text:p>
          </table:table-cell>
          <table:table-cell office:value-type="string">
            <text:p>kick</text:p>
          </table:table-cell>
          <table:table-cell office:value-type="string">
            <text:p>PE22/102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  <table:table-cell office:value-type="string">
            <text:p>LALA</text:p>
          </table:table-cell>
          <table:table-cell office:value-type="string">
            <text:p>*babble</text:p>
          </table:table-cell>
          <table:table-cell office:value-type="string">
            <text:p>QL/50</text:p>
          </table:table-cell>
          <table:table-cell table:number-columns-repeated="3"/>
          <table:table-cell office:value-type="string">
            <text:p>LAL</text:p>
          </table:table-cell>
          <table:table-cell office:value-type="string">
            <text:p>laugh</text:p>
          </table:table-cell>
          <table:table-cell office:value-type="string">
            <text:p>PE17/159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Q. laman</text:p>
          </table:table-cell>
          <table:table-cell office:value-type="string">
            <text:p>animal</text:p>
          </table:table-cell>
          <table:table-cell office:value-type="string">
            <text:p>LAMA</text:p>
          </table:table-cell>
          <table:table-cell office:value-type="string">
            <text:p>*animal</text:p>
          </table:table-cell>
          <table:table-cell office:value-type="string">
            <text:p>QL/50</text:p>
          </table:table-cell>
          <table:table-cell office:value-type="string">
            <text:p>LAM</text:p>
          </table:table-cell>
          <table:table-cell office:value-type="string">
            <text:p>*sound</text:p>
          </table:table-cell>
          <table:table-cell office:value-type="string">
            <text:p>Ety/LAM</text:p>
          </table:table-cell>
          <table:table-cell office:value-type="string">
            <text:p>LAM</text:p>
          </table:table-cell>
          <table:table-cell office:value-type="string">
            <text:p>inarticulate voiced sounds</text:p>
          </table:table-cell>
          <table:table-cell office:value-type="string">
            <text:p>WJ/416; PE17/13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number-columns-repeated="5"/>
          <table:table-cell office:value-type="string">
            <text:p>LAN</text:p>
          </table:table-cell>
          <table:table-cell office:value-type="string">
            <text:p>weave</text:p>
          </table:table-cell>
          <table:table-cell office:value-type="string">
            <text:p>Ety/LAN</text:p>
          </table:table-cell>
          <table:table-cell office:value-type="string">
            <text:p>LAN</text:p>
          </table:table-cell>
          <table:table-cell office:value-type="string">
            <text:p>stretch, extend; twine</text:p>
          </table:table-cell>
          <table:table-cell office:value-type="string">
            <text:p>PE17/159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number-columns-repeated="2"/>
          <table:table-cell office:value-type="string">
            <text:p>LAPA</text:p>
          </table:table-cell>
          <table:table-cell office:value-type="string">
            <text:p>enfold</text:p>
          </table:table-cell>
          <table:table-cell office:value-type="string">
            <text:p>QL/51</text:p>
          </table:table-cell>
          <table:table-cell office:value-type="string">
            <text:p>LAP</text:p>
          </table:table-cell>
          <table:table-cell office:value-type="string">
            <text:p>*babe</text:p>
          </table:table-cell>
          <table:table-cell office:value-type="string">
            <text:p>EtyAC/LAR</text:p>
          </table:table-cell>
          <table:table-cell office:value-type="string">
            <text:p>LAP</text:p>
          </table:table-cell>
          <table:table-cell office:value-type="string">
            <text:p>fold, bend</text:p>
          </table:table-cell>
          <table:table-cell office:value-type="string">
            <text:p>VT47/35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  <table:table-cell office:value-type="string">
            <text:p>LAQA</text:p>
          </table:table-cell>
          <table:table-cell office:value-type="string">
            <text:p>catch</text:p>
          </table:table-cell>
          <table:table-cell office:value-type="string">
            <text:p>QL/5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number-columns-repeated="2"/>
          <table:table-cell office:value-type="string">
            <text:p>LARA</text:p>
          </table:table-cell>
          <table:table-cell office:value-type="string">
            <text:p>*fat</text:p>
          </table:table-cell>
          <table:table-cell office:value-type="string">
            <text:p>QL/51</text:p>
          </table:table-cell>
          <table:table-cell office:value-type="string">
            <text:p>LAR</text:p>
          </table:table-cell>
          <table:table-cell office:value-type="string">
            <text:p>rich, fat</text:p>
          </table:table-cell>
          <table:table-cell office:value-type="string">
            <text:p>Ety/LAR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Q. lasse</text:p>
          </table:table-cell>
          <table:table-cell office:value-type="string">
            <text:p>leaf</text:p>
          </table:table-cell>
          <table:table-cell office:value-type="string">
            <text:p>Q. lasse</text:p>
          </table:table-cell>
          <table:table-cell office:value-type="string">
            <text:p>leaf</text:p>
          </table:table-cell>
          <table:table-cell office:value-type="string">
            <text:p>QL/51</text:p>
          </table:table-cell>
          <table:table-cell office:value-type="string">
            <text:p>LAS¹</text:p>
          </table:table-cell>
          <table:table-cell office:value-type="string">
            <text:p>*leaf</text:p>
          </table:table-cell>
          <table:table-cell office:value-type="string">
            <text:p>Ety/LAS¹</text:p>
          </table:table-cell>
          <table:table-cell office:value-type="string">
            <text:p>LAS</text:p>
          </table:table-cell>
          <table:table-cell office:value-type="string">
            <text:p>leaf</text:p>
          </table:table-cell>
          <table:table-cell office:value-type="string">
            <text:p>PE17/7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number-columns-repeated="5"/>
          <table:table-cell office:value-type="string">
            <text:p>LAS²</text:p>
          </table:table-cell>
          <table:table-cell office:value-type="string">
            <text:p>listen</text:p>
          </table:table-cell>
          <table:table-cell office:value-type="string">
            <text:p>Ety/LAS²</text:p>
          </table:table-cell>
          <table:table-cell office:value-type="string">
            <text:p>LAS</text:p>
          </table:table-cell>
          <table:table-cell office:value-type="string">
            <text:p>listen</text:p>
          </table:table-cell>
          <table:table-cell office:value-type="string">
            <text:p>PE17/4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S. lad</text:p>
          </table:table-cell>
          <table:table-cell office:value-type="string">
            <text:p>plain</text:p>
          </table:table-cell>
          <table:table-cell office:value-type="string">
            <text:p>LATA</text:p>
          </table:table-cell>
          <table:table-cell office:value-type="string">
            <text:p>*level, smooth</text:p>
          </table:table-cell>
          <table:table-cell office:value-type="string">
            <text:p>QL/51</text:p>
          </table:table-cell>
          <table:table-cell office:value-type="string">
            <text:p>LAT</text:p>
          </table:table-cell>
          <table:table-cell office:value-type="string">
            <text:p>lie open</text:p>
          </table:table-cell>
          <table:table-cell office:value-type="string">
            <text:p>Ety/LAT</text:p>
          </table:table-cell>
          <table:table-cell office:value-type="string">
            <text:p>LAT</text:p>
          </table:table-cell>
          <table:table-cell office:value-type="string">
            <text:p>open, unenclosed</text:p>
          </table:table-cell>
          <table:table-cell office:value-type="string">
            <text:p>PE17/15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8"/>
          <table:table-cell office:value-type="string">
            <text:p>LAT</text:p>
          </table:table-cell>
          <table:table-cell office:value-type="string">
            <text:p>fall (to the ground)</text:p>
          </table:table-cell>
          <table:table-cell office:value-type="string">
            <text:p>VT47/2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number-columns-repeated="5"/>
          <table:table-cell office:value-type="string">
            <text:p>LATH</text:p>
          </table:table-cell>
          <table:table-cell office:value-type="string">
            <text:p>string, thong</text:p>
          </table:table-cell>
          <table:table-cell office:value-type="string">
            <text:p>Ety/LATH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number-columns-repeated="2"/>
          <table:table-cell office:value-type="string">
            <text:p>LAWA</text:p>
          </table:table-cell>
          <table:table-cell office:value-type="string">
            <text:p>*life (esp. plants)</text:p>
          </table:table-cell>
          <table:table-cell office:value-type="string">
            <text:p>QL/52</text:p>
          </table:table-cell>
          <table:table-cell office:value-type="string">
            <text:p>LAW</text:p>
          </table:table-cell>
          <table:table-cell office:value-type="string">
            <text:p>warm</text:p>
          </table:table-cell>
          <table:table-cell office:value-type="string">
            <text:p>Ety/LAW</text:p>
          </table:table-cell>
          <table:table-cell office:value-type="string">
            <text:p>LAW</text:p>
          </table:table-cell>
          <table:table-cell office:value-type="string">
            <text:p>flourish (green), grow</text:p>
          </table:table-cell>
          <table:table-cell office:value-type="string">
            <text:p>PE22/156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Q. laica/laiqa</text:p>
          </table:table-cell>
          <table:table-cell office:value-type="string">
            <text:p>green</text:p>
          </table:table-cell>
          <table:table-cell office:value-type="string">
            <text:p>LAẎA</text:p>
          </table:table-cell>
          <table:table-cell office:value-type="string">
            <text:p>be alive, flourish</text:p>
          </table:table-cell>
          <table:table-cell office:value-type="string">
            <text:p>QL/52</text:p>
          </table:table-cell>
          <table:table-cell office:value-type="string">
            <text:p>LAY(AK)</text:p>
          </table:table-cell>
          <table:table-cell office:value-type="string">
            <text:p>*flourish</text:p>
          </table:table-cell>
          <table:table-cell office:value-type="string">
            <text:p>Ety/LÁYAK; EtyAC/LAYA</text:p>
          </table:table-cell>
          <table:table-cell office:value-type="string">
            <text:p>LAY</text:p>
          </table:table-cell>
          <table:table-cell office:value-type="string">
            <text:p>*flourish</text:p>
          </table:table-cell>
          <table:table-cell office:value-type="string">
            <text:p>PE17/159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number-columns-repeated="2"/>
          <table:table-cell office:value-type="string">
            <text:p>LĒ</text:p>
          </table:table-cell>
          <table:table-cell office:value-type="string">
            <text:p>*with</text:p>
          </table:table-cell>
          <table:table-cell office:value-type="string">
            <text:p>QL/52</text:p>
          </table:table-cell>
          <table:table-cell office:value-type="string">
            <text:p>Q. le</text:p>
          </table:table-cell>
          <table:table-cell office:value-type="string">
            <text:p>with</text:p>
          </table:table-cell>
          <table:table-cell office:value-type="string">
            <text:p>SD/246</text:p>
          </table:table-cell>
          <table:table-cell office:value-type="string">
            <text:p>{DĒ}</text:p>
          </table:table-cell>
          <table:table-cell office:value-type="string">
            <text:p>with</text:p>
          </table:table-cell>
          <table:table-cell office:value-type="string">
            <text:p>PE17/9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number-columns-repeated="5"/>
          <table:table-cell office:value-type="string">
            <text:p>LEB/LEM</text:p>
          </table:table-cell>
          <table:table-cell office:value-type="string">
            <text:p>remain, tarry</text:p>
          </table:table-cell>
          <table:table-cell office:value-type="string">
            <text:p>Ety/LEB</text:p>
          </table:table-cell>
          <table:table-cell office:value-type="string">
            <text:p>Q. Lembi</text:p>
          </table:table-cell>
          <table:table-cell office:value-type="string">
            <text:p>Lingerers</text:p>
          </table:table-cell>
          <table:table-cell office:value-type="string">
            <text:p>MR/169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  <table:table-cell office:value-type="string">
            <text:p>LECH</text:p>
          </table:table-cell>
          <table:table-cell office:value-type="string">
            <text:p>*smooth</text:p>
          </table:table-cell>
          <table:table-cell office:value-type="string">
            <text:p>GL/5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number-columns-repeated="5"/>
          <table:table-cell office:value-type="string">
            <text:p>LED</text:p>
          </table:table-cell>
          <table:table-cell office:value-type="string">
            <text:p>go, fare, travel</text:p>
          </table:table-cell>
          <table:table-cell office:value-type="string">
            <text:p>Ety/LED</text:p>
          </table:table-cell>
          <table:table-cell office:value-type="string">
            <text:p>LED</text:p>
          </table:table-cell>
          <table:table-cell office:value-type="string">
            <text:p>go, proceed</text:p>
          </table:table-cell>
          <table:table-cell office:value-type="string">
            <text:p>PE17/139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  <table:table-cell office:value-type="string">
            <text:p>LEFE</text:p>
          </table:table-cell>
          <table:table-cell office:value-type="string">
            <text:p>*heart</text:p>
          </table:table-cell>
          <table:table-cell office:value-type="string">
            <text:p>QL/5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S. leithian</text:p>
          </table:table-cell>
          <table:table-cell office:value-type="string">
            <text:p>release</text:p>
          </table:table-cell>
          <table:table-cell office:value-type="string">
            <text:p>LETH</text:p>
          </table:table-cell>
          <table:table-cell office:value-type="string">
            <text:p>set free</text:p>
          </table:table-cell>
          <table:table-cell office:value-type="string">
            <text:p>LB/154</text:p>
          </table:table-cell>
          <table:table-cell office:value-type="string">
            <text:p>LEK</text:p>
          </table:table-cell>
          <table:table-cell office:value-type="string">
            <text:p>let loose, release</text:p>
          </table:table-cell>
          <table:table-cell office:value-type="string">
            <text:p>Ety/LEK</text:p>
          </table:table-cell>
          <table:table-cell office:value-type="string">
            <text:p>LEK</text:p>
          </table:table-cell>
          <table:table-cell office:value-type="string">
            <text:p>loose, unbind</text:p>
          </table:table-cell>
          <table:table-cell office:value-type="string">
            <text:p>PE17/15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  <table:table-cell office:value-type="string">
            <text:p>LEKE/LENE</text:p>
          </table:table-cell>
          <table:table-cell office:value-type="string">
            <text:p>*slow; left</text:p>
          </table:table-cell>
          <table:table-cell office:value-type="string">
            <text:p>QL/5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number-columns-repeated="2"/>
          <table:table-cell office:value-type="string">
            <text:p>LEHE</text:p>
          </table:table-cell>
          <table:table-cell office:value-type="string">
            <text:p>come, be sent, approach</text:p>
          </table:table-cell>
          <table:table-cell office:value-type="string">
            <text:p>QL/52</text:p>
          </table:table-cell>
          <table:table-cell office:value-type="string">
            <text:p>LEN</text:p>
          </table:table-cell>
          <table:table-cell office:value-type="string">
            <text:p>(?road), way</text:p>
          </table:table-cell>
          <table:table-cell office:value-type="string">
            <text:p>EtyAC/LEN</text:p>
          </table:table-cell>
          <table:table-cell office:value-type="string">
            <text:p>LEN</text:p>
          </table:table-cell>
          <table:table-cell office:value-type="string">
            <text:p>*journey</text:p>
          </table:table-cell>
          <table:table-cell office:value-type="string">
            <text:p>PE17/60</text:p>
          </table:table-cell>
          <table:table-cell office:value-type="string">
            <text:p>Full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8"/>
          <table:table-cell office:value-type="string">
            <text:p>LEÑ</text:p>
          </table:table-cell>
          <table:table-cell office:value-type="string">
            <text:p>*way, method, manner</text:p>
          </table:table-cell>
          <table:table-cell office:value-type="string">
            <text:p>PE17/7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  <table:table-cell office:value-type="string">
            <text:p>LENE</text:p>
          </table:table-cell>
          <table:table-cell office:value-type="string">
            <text:p>*long</text:p>
          </table:table-cell>
          <table:table-cell office:value-type="string">
            <text:p>QL/5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number-columns-repeated="2"/>
          <table:table-cell office:value-type="string">
            <text:p>LEPE</text:p>
          </table:table-cell>
          <table:table-cell office:value-type="string">
            <text:p>*finger</text:p>
          </table:table-cell>
          <table:table-cell office:value-type="string">
            <text:p>QL/53</text:p>
          </table:table-cell>
          <table:table-cell office:value-type="string">
            <text:p>LEP(ET)</text:p>
          </table:table-cell>
          <table:table-cell office:value-type="string">
            <text:p>*finger</text:p>
          </table:table-cell>
          <table:table-cell office:value-type="string">
            <text:p>Ety/LEP</text:p>
          </table:table-cell>
          <table:table-cell office:value-type="string">
            <text:p>LEP</text:p>
          </table:table-cell>
          <table:table-cell office:value-type="string">
            <text:p>pick up with finger</text:p>
          </table:table-cell>
          <table:table-cell office:value-type="string">
            <text:p>VT47/2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Q. lempe</text:p>
          </table:table-cell>
          <table:table-cell office:value-type="string">
            <text:p>five</text:p>
          </table:table-cell>
          <table:table-cell office:value-type="string">
            <text:p>LEH</text:p>
          </table:table-cell>
          <table:table-cell office:value-type="string">
            <text:p>half</text:p>
          </table:table-cell>
          <table:table-cell office:value-type="string">
            <text:p>QL/52</text:p>
          </table:table-cell>
          <table:table-cell office:value-type="string">
            <text:p>LEPEN/LEPEK</text:p>
          </table:table-cell>
          <table:table-cell office:value-type="string">
            <text:p>five</text:p>
          </table:table-cell>
          <table:table-cell office:value-type="string">
            <text:p>Ety/LEP</text:p>
          </table:table-cell>
          <table:table-cell office:value-type="string">
            <text:p>LEPEM</text:p>
          </table:table-cell>
          <table:table-cell office:value-type="string">
            <text:p>five</text:p>
          </table:table-cell>
          <table:table-cell office:value-type="string">
            <text:p>VT47/16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office:value-type="string">
            <text:p>LEQE</text:p>
          </table:table-cell>
          <table:table-cell office:value-type="string">
            <text:p>*joint</text:p>
          </table:table-cell>
          <table:table-cell office:value-type="string">
            <text:p>QL/5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8"/>
          <table:table-cell office:value-type="string">
            <text:p>LER</text:p>
          </table:table-cell>
          <table:table-cell office:value-type="string">
            <text:p>free</text:p>
          </table:table-cell>
          <table:table-cell office:value-type="string">
            <text:p>PE17/16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  <table:table-cell office:value-type="string">
            <text:p>LESE</text:p>
          </table:table-cell>
          <table:table-cell office:value-type="string">
            <text:p>collect</text:p>
          </table:table-cell>
          <table:table-cell office:value-type="string">
            <text:p>QL/5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number-columns-repeated="2"/>
          <table:table-cell office:value-type="string">
            <text:p>Q. lin(g-)</text:p>
          </table:table-cell>
          <table:table-cell office:value-type="string">
            <text:p>snake</text:p>
          </table:table-cell>
          <table:table-cell office:value-type="string">
            <text:p>QL/54</text:p>
          </table:table-cell>
          <table:table-cell table:number-columns-repeated="3"/>
          <table:table-cell office:value-type="string">
            <text:p>LEWEK</text:p>
          </table:table-cell>
          <table:table-cell office:value-type="string">
            <text:p>worm</text:p>
          </table:table-cell>
          <table:table-cell office:value-type="string">
            <text:p>PE17/160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Q. lie</text:p>
          </table:table-cell>
          <table:table-cell office:value-type="string">
            <text:p>people</text:p>
          </table:table-cell>
          <table:table-cell office:value-type="string">
            <text:p>ILI²/LĪ</text:p>
          </table:table-cell>
          <table:table-cell office:value-type="string">
            <text:p>many</text:p>
          </table:table-cell>
          <table:table-cell office:value-type="string">
            <text:p>QL/42, 53</text:p>
          </table:table-cell>
          <table:table-cell office:value-type="string">
            <text:p>LI</text:p>
          </table:table-cell>
          <table:table-cell office:value-type="string">
            <text:p>many</text:p>
          </table:table-cell>
          <table:table-cell office:value-type="string">
            <text:p>Ety/LI</text:p>
          </table:table-cell>
          <table:table-cell office:value-type="string">
            <text:p>LI</text:p>
          </table:table-cell>
          <table:table-cell office:value-type="string">
            <text:p>many</text:p>
          </table:table-cell>
          <table:table-cell office:value-type="string">
            <text:p>VT48/25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number-columns-repeated="5"/>
          <table:table-cell office:value-type="string">
            <text:p>LIB¹</text:p>
          </table:table-cell>
          <table:table-cell office:value-type="string">
            <text:p>drip</text:p>
          </table:table-cell>
          <table:table-cell office:value-type="string">
            <text:p>Ety/LIB¹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8"/>
          <table:table-cell office:value-type="string">
            <text:p>LIK</text:p>
          </table:table-cell>
          <table:table-cell office:value-type="string">
            <text:p>glide, slip</text:p>
          </table:table-cell>
          <table:table-cell office:value-type="string">
            <text:p>NM/28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number-columns-repeated="2"/>
          <table:table-cell office:value-type="string">
            <text:p>LḶTḶ</text:p>
          </table:table-cell>
          <table:table-cell office:value-type="string">
            <text:p>dance</text:p>
          </table:table-cell>
          <table:table-cell office:value-type="string">
            <text:p>QL/55</text:p>
          </table:table-cell>
          <table:table-cell office:value-type="string">
            <text:p>LILT</text:p>
          </table:table-cell>
          <table:table-cell office:value-type="string">
            <text:p>dance</text:p>
          </table:table-cell>
          <table:table-cell office:value-type="string">
            <text:p>Ety/LILT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  <table:table-cell office:value-type="string">
            <text:p>LIMI</text:p>
          </table:table-cell>
          <table:table-cell office:value-type="string">
            <text:p>*bind</text:p>
          </table:table-cell>
          <table:table-cell office:value-type="string">
            <text:p>QL/54</text:p>
          </table:table-cell>
          <table:table-cell table:number-columns-repeated="3"/>
          <table:table-cell office:value-type="string">
            <text:p>LIM</text:p>
          </table:table-cell>
          <table:table-cell office:value-type="string">
            <text:p>link, join</text:p>
          </table:table-cell>
          <table:table-cell office:value-type="string">
            <text:p>VT47/6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number-columns-repeated="5"/>
          <table:table-cell office:value-type="string">
            <text:p>LIÑ</text:p>
          </table:table-cell>
          <table:table-cell office:value-type="string">
            <text:p>*twang</text:p>
          </table:table-cell>
          <table:table-cell office:value-type="string">
            <text:p>Ety/LIÑ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Q. ailin</text:p>
          </table:table-cell>
          <table:table-cell office:value-type="string">
            <text:p>lake</text:p>
          </table:table-cell>
          <table:table-cell office:value-type="string">
            <text:p>Q. ailin</text:p>
          </table:table-cell>
          <table:table-cell office:value-type="string">
            <text:p>lake</text:p>
          </table:table-cell>
          <table:table-cell office:value-type="string">
            <text:p>QL/29</text:p>
          </table:table-cell>
          <table:table-cell office:value-type="string">
            <text:p>LIN¹</text:p>
          </table:table-cell>
          <table:table-cell office:value-type="string">
            <text:p>pool</text:p>
          </table:table-cell>
          <table:table-cell office:value-type="string">
            <text:p>Ety/LIN¹</text:p>
          </table:table-cell>
          <table:table-cell office:value-type="string">
            <text:p>LIN</text:p>
          </table:table-cell>
          <table:table-cell office:value-type="string">
            <text:p>pool, mere, lake</text:p>
          </table:table-cell>
          <table:table-cell office:value-type="string">
            <text:p>PE17/16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number-columns-repeated="2"/>
          <table:table-cell office:value-type="string">
            <text:p>LINI</text:p>
          </table:table-cell>
          <table:table-cell office:value-type="string">
            <text:p>gentle</text:p>
          </table:table-cell>
          <table:table-cell office:value-type="string">
            <text:p>QL/54; PME/54</text:p>
          </table:table-cell>
          <table:table-cell office:value-type="string">
            <text:p>LIN²/GLIN</text:p>
          </table:table-cell>
          <table:table-cell office:value-type="string">
            <text:p>sing</text:p>
          </table:table-cell>
          <table:table-cell office:value-type="string">
            <text:p>Ety/LIN²</text:p>
          </table:table-cell>
          <table:table-cell office:value-type="string">
            <text:p>LIN(D)</text:p>
          </table:table-cell>
          <table:table-cell office:value-type="string">
            <text:p>sing</text:p>
          </table:table-cell>
          <table:table-cell office:value-type="string">
            <text:p>UT/253; WJ/382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number-columns-repeated="2"/>
          <table:table-cell office:value-type="string">
            <text:p>LIQI</text:p>
          </table:table-cell>
          <table:table-cell office:value-type="string">
            <text:p>water; clear</text:p>
          </table:table-cell>
          <table:table-cell office:value-type="string">
            <text:p>QL/54</text:p>
          </table:table-cell>
          <table:table-cell office:value-type="string">
            <text:p>LINKWI</text:p>
          </table:table-cell>
          <table:table-cell office:value-type="string">
            <text:p>*wet</text:p>
          </table:table-cell>
          <table:table-cell office:value-type="string">
            <text:p>Ety/LINKWI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Q. limpe</text:p>
          </table:table-cell>
          <table:table-cell office:value-type="string">
            <text:p>wine</text:p>
          </table:table-cell>
          <table:table-cell office:value-type="string">
            <text:p>LIPI</text:p>
          </table:table-cell>
          <table:table-cell office:value-type="string">
            <text:p>*drip, drop</text:p>
          </table:table-cell>
          <table:table-cell office:value-type="string">
            <text:p>QL/54</text:p>
          </table:table-cell>
          <table:table-cell table:style-name="ce3" office:value-type="string">
            <text:p>LIP</text:p>
          </table:table-cell>
          <table:table-cell office:value-type="string">
            <text:p>*wine</text:p>
          </table:table-cell>
          <table:table-cell office:value-type="string">
            <text:p>Ety/LIP</text:p>
          </table:table-cell>
          <table:table-cell office:value-type="string">
            <text:p>LIP</text:p>
          </table:table-cell>
          <table:table-cell office:value-type="string">
            <text:p>oil</text:p>
          </table:table-cell>
          <table:table-cell office:value-type="string">
            <text:p>VT44/15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number-columns-repeated="2"/>
          <table:table-cell office:value-type="string">
            <text:p>LIŘI</text:p>
          </table:table-cell>
          <table:table-cell office:value-type="string">
            <text:p>sing</text:p>
          </table:table-cell>
          <table:table-cell office:value-type="string">
            <text:p>QL/54</text:p>
          </table:table-cell>
          <table:table-cell office:value-type="string">
            <text:p>(G)LIR</text:p>
          </table:table-cell>
          <table:table-cell office:value-type="string">
            <text:p>sing, trill</text:p>
          </table:table-cell>
          <table:table-cell office:value-type="string">
            <text:p>Ety/GLIR, LIR¹</text:p>
          </table:table-cell>
          <table:table-cell office:value-type="string">
            <text:p>LIR</text:p>
          </table:table-cell>
          <table:table-cell office:value-type="string">
            <text:p>sing, warble</text:p>
          </table:table-cell>
          <table:table-cell office:value-type="string">
            <text:p>PE17/27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S. aeglir</text:p>
          </table:table-cell>
          <table:table-cell table:number-columns-repeated="4"/>
          <table:table-cell office:value-type="string">
            <text:p>LIR²</text:p>
          </table:table-cell>
          <table:table-cell office:value-type="string">
            <text:p>*row</text:p>
          </table:table-cell>
          <table:table-cell office:value-type="string">
            <text:p>Ety/LIR²</text:p>
          </table:table-cell>
          <table:table-cell office:value-type="string">
            <text:p>S. aeglir</text:p>
          </table:table-cell>
          <table:table-cell office:value-type="string">
            <text:p>line of peaks</text:p>
          </table:table-cell>
          <table:table-cell office:value-type="string">
            <text:p>RC/1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number-columns-repeated="2"/>
          <table:table-cell office:value-type="string">
            <text:p>LISI</text:p>
          </table:table-cell>
          <table:table-cell office:value-type="string">
            <text:p>sweetness</text:p>
          </table:table-cell>
          <table:table-cell office:value-type="string">
            <text:p>QL/54-55</text:p>
          </table:table-cell>
          <table:table-cell office:value-type="string">
            <text:p>LIS</text:p>
          </table:table-cell>
          <table:table-cell office:value-type="string">
            <text:p>honey</text:p>
          </table:table-cell>
          <table:table-cell office:value-type="string">
            <text:p>Ety/LIS</text:p>
          </table:table-cell>
          <table:table-cell office:value-type="string">
            <text:p>LIS</text:p>
          </table:table-cell>
          <table:table-cell office:value-type="string">
            <text:p>*sweet</text:p>
          </table:table-cell>
          <table:table-cell office:value-type="string">
            <text:p>PE17/15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5"/>
          <table:table-cell office:value-type="string">
            <text:p>LISKI</text:p>
          </table:table-cell>
          <table:table-cell office:value-type="string">
            <text:p>*reed</text:p>
          </table:table-cell>
          <table:table-cell office:value-type="string">
            <text:p>PE18/43</text:p>
          </table:table-cell>
          <table:table-cell office:value-type="string">
            <text:p>LISKI</text:p>
          </table:table-cell>
          <table:table-cell office:value-type="string">
            <text:p>*reed</text:p>
          </table:table-cell>
          <table:table-cell office:value-type="string">
            <text:p>PE18/9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S. Fauglith</text:p>
          </table:table-cell>
          <table:table-cell office:value-type="string">
            <text:p>Gasping Dust</text:p>
          </table:table-cell>
          <table:table-cell office:value-type="string">
            <text:p>ᴱN. lhith</text:p>
          </table:table-cell>
          <table:table-cell office:value-type="string">
            <text:p>dust</text:p>
          </table:table-cell>
          <table:table-cell office:value-type="string">
            <text:p>PE13/149</text:p>
          </table:table-cell>
          <table:table-cell office:value-type="string">
            <text:p>LIT</text:p>
          </table:table-cell>
          <table:table-cell office:value-type="string">
            <text:p>*sand</text:p>
          </table:table-cell>
          <table:table-cell office:value-type="string">
            <text:p>Ety/LIT</text:p>
          </table:table-cell>
          <table:table-cell office:value-type="string">
            <text:p>S. lith</text:p>
          </table:table-cell>
          <table:table-cell office:value-type="string">
            <text:p>ash</text:p>
          </table:table-cell>
          <table:table-cell office:value-type="string">
            <text:p>RC/765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  <table:table-cell office:value-type="string">
            <text:p>LITH</text:p>
          </table:table-cell>
          <table:table-cell office:value-type="string">
            <text:p>*flow of time</text:p>
          </table:table-cell>
          <table:table-cell office:value-type="string">
            <text:p>GL/5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Q. lingwe</text:p>
          </table:table-cell>
          <table:table-cell office:value-type="string">
            <text:p>fish</text:p>
          </table:table-cell>
          <table:table-cell office:value-type="string">
            <text:p>IWI</text:p>
          </table:table-cell>
          <table:table-cell office:value-type="string">
            <text:p>*fish</text:p>
          </table:table-cell>
          <table:table-cell office:value-type="string">
            <text:p>QL/43</text:p>
          </table:table-cell>
          <table:table-cell office:value-type="string">
            <text:p>LIW</text:p>
          </table:table-cell>
          <table:table-cell office:value-type="string">
            <text:p>*fish</text:p>
          </table:table-cell>
          <table:table-cell office:value-type="string">
            <text:p>Ety/LIW</text:p>
          </table:table-cell>
          <table:table-cell office:value-type="string">
            <text:p>Q. lingwi</text:p>
          </table:table-cell>
          <table:table-cell office:value-type="string">
            <text:p>fish</text:p>
          </table:table-cell>
          <table:table-cell office:value-type="string">
            <text:p>NM/33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  <table:table-cell office:value-type="string">
            <text:p>LṆQṆ</text:p>
          </table:table-cell>
          <table:table-cell office:value-type="string">
            <text:p>light on, find</text:p>
          </table:table-cell>
          <table:table-cell office:value-type="string">
            <text:p>QL/5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8"/>
          <table:table-cell office:value-type="string">
            <text:p>LOG</text:p>
          </table:table-cell>
          <table:table-cell office:value-type="string">
            <text:p>soaked, swampy</text:p>
          </table:table-cell>
          <table:table-cell office:value-type="string">
            <text:p>VT42/1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Q. (h)lócë</text:p>
          </table:table-cell>
          <table:table-cell office:value-type="string">
            <text:p>snake</text:p>
          </table:table-cell>
          <table:table-cell office:value-type="string">
            <text:p>LOKO</text:p>
          </table:table-cell>
          <table:table-cell office:value-type="string">
            <text:p>twine, twist, curl</text:p>
          </table:table-cell>
          <table:table-cell office:value-type="string">
            <text:p>QL/55</text:p>
          </table:table-cell>
          <table:table-cell office:value-type="string">
            <text:p>LOK</text:p>
          </table:table-cell>
          <table:table-cell office:value-type="string">
            <text:p>great serpent, dragon</text:p>
          </table:table-cell>
          <table:table-cell office:value-type="string">
            <text:p>Ety/LOK</text:p>
          </table:table-cell>
          <table:table-cell office:value-type="string">
            <text:p>LOK</text:p>
          </table:table-cell>
          <table:table-cell office:value-type="string">
            <text:p>bend, loop</text:p>
          </table:table-cell>
          <table:table-cell office:value-type="string">
            <text:p>PE17/160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number-columns-repeated="5"/>
          <table:table-cell office:value-type="string">
            <text:p>LOKH</text:p>
          </table:table-cell>
          <table:table-cell office:value-type="string">
            <text:p>*curl of hair</text:p>
          </table:table-cell>
          <table:table-cell office:value-type="string">
            <text:p>Ety/LOKH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Q. Alqualonde</text:p>
          </table:table-cell>
          <table:table-cell office:value-type="string">
            <text:p>Swan Haven</text:p>
          </table:table-cell>
          <table:table-cell table:number-columns-repeated="3"/>
          <table:table-cell office:value-type="string">
            <text:p>LOD</text:p>
          </table:table-cell>
          <table:table-cell office:value-type="string">
            <text:p>*pass, path</text:p>
          </table:table-cell>
          <table:table-cell office:value-type="string">
            <text:p>Ety/LOD</text:p>
          </table:table-cell>
          <table:table-cell office:value-type="string">
            <text:p>LON</text:p>
          </table:table-cell>
          <table:table-cell office:value-type="string">
            <text:p>*haven, harbour</text:p>
          </table:table-cell>
          <table:table-cell office:value-type="string">
            <text:p>VT42/10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number-columns-repeated="5"/>
          <table:table-cell office:value-type="string">
            <text:p>LON</text:p>
          </table:table-cell>
          <table:table-cell office:value-type="string">
            <text:p>*island</text:p>
          </table:table-cell>
          <table:table-cell office:value-type="string">
            <text:p>Ety/LO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number-columns-repeated="2"/>
          <table:table-cell office:value-type="string">
            <text:p>LOPO</text:p>
          </table:table-cell>
          <table:table-cell office:value-type="string">
            <text:p>*run of animals</text:p>
          </table:table-cell>
          <table:table-cell office:value-type="string">
            <text:p>QL/56</text:p>
          </table:table-cell>
          <table:table-cell office:value-type="string">
            <text:p>LOP</text:p>
          </table:table-cell>
          <table:table-cell office:value-type="string">
            <text:p>horse</text:p>
          </table:table-cell>
          <table:table-cell office:value-type="string">
            <text:p>EtyAC/LOP</text:p>
          </table:table-cell>
          <table:table-cell office:value-type="string">
            <text:p>lopoldi</text:p>
          </table:table-cell>
          <table:table-cell office:value-type="string">
            <text:p>rabbits</text:p>
          </table:table-cell>
          <table:table-cell office:value-type="string">
            <text:p>NM/335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  <table:table-cell office:value-type="string">
            <text:p>LOQO</text:p>
          </table:table-cell>
          <table:table-cell office:value-type="string">
            <text:p>*run of humans</text:p>
          </table:table-cell>
          <table:table-cell office:value-type="string">
            <text:p>QL/5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Q. lóte</text:p>
          </table:table-cell>
          <table:table-cell office:value-type="string">
            <text:p>flower</text:p>
          </table:table-cell>
          <table:table-cell table:style-name="ce3" office:value-type="string">
            <text:p>LOHO/LO’O</text:p>
          </table:table-cell>
          <table:table-cell office:value-type="string">
            <text:p>*flower</text:p>
          </table:table-cell>
          <table:table-cell office:value-type="string">
            <text:p>QL/55</text:p>
          </table:table-cell>
          <table:table-cell office:value-type="string">
            <text:p>LOT(H)</text:p>
          </table:table-cell>
          <table:table-cell office:value-type="string">
            <text:p>flower</text:p>
          </table:table-cell>
          <table:table-cell office:value-type="string">
            <text:p>Ety/LOT(H)</text:p>
          </table:table-cell>
          <table:table-cell office:value-type="string">
            <text:p>LOT(H)</text:p>
          </table:table-cell>
          <table:table-cell office:value-type="string">
            <text:p>flower</text:p>
          </table:table-cell>
          <table:table-cell office:value-type="string">
            <text:p>PE17/160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8"/>
          <table:table-cell office:value-type="string">
            <text:p>LOW</text:p>
          </table:table-cell>
          <table:table-cell office:value-type="string">
            <text:p>flow freely (fully)</text:p>
          </table:table-cell>
          <table:table-cell office:value-type="string">
            <text:p>PE17/13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number-columns-repeated="5"/>
          <table:table-cell office:value-type="string">
            <text:p>LOYO</text:p>
          </table:table-cell>
          <table:table-cell office:value-type="string">
            <text:p>lack; miss, fail to go</text:p>
          </table:table-cell>
          <table:table-cell office:value-type="string">
            <text:p>EtyAC/LOYO</text:p>
          </table:table-cell>
          <table:table-cell office:value-type="string">
            <text:p>LOYO</text:p>
          </table:table-cell>
          <table:table-cell office:value-type="string">
            <text:p>go wrong, fail</text:p>
          </table:table-cell>
          <table:table-cell office:value-type="string">
            <text:p>PE17/15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  <table:table-cell office:value-type="string">
            <text:p>LOY̯O</text:p>
          </table:table-cell>
          <table:table-cell office:value-type="string">
            <text:p>*thirst, parched</text:p>
          </table:table-cell>
          <table:table-cell office:value-type="string">
            <text:p>QL/5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Q. lúme</text:p>
          </table:table-cell>
          <table:table-cell office:value-type="string">
            <text:p>time</text:p>
          </table:table-cell>
          <table:table-cell office:value-type="string">
            <text:p>LUHU/LU’U</text:p>
          </table:table-cell>
          <table:table-cell office:value-type="string">
            <text:p>*time</text:p>
          </table:table-cell>
          <table:table-cell office:value-type="string">
            <text:p>QL/56</text:p>
          </table:table-cell>
          <table:table-cell office:value-type="string">
            <text:p>LU</text:p>
          </table:table-cell>
          <table:table-cell office:value-type="string">
            <text:p>*time</text:p>
          </table:table-cell>
          <table:table-cell office:value-type="string">
            <text:p>Ety/LU</text:p>
          </table:table-cell>
          <table:table-cell office:value-type="string">
            <text:p>Q. lúme</text:p>
          </table:table-cell>
          <table:table-cell office:value-type="string">
            <text:p>time, hour</text:p>
          </table:table-cell>
          <table:table-cell office:value-type="string">
            <text:p>PE17/1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number-columns-repeated="5"/>
          <table:table-cell office:value-type="string">
            <text:p>LUB</text:p>
          </table:table-cell>
          <table:table-cell office:value-type="string">
            <text:p>weary</text:p>
          </table:table-cell>
          <table:table-cell office:value-type="string">
            <text:p>EtyAC/LUB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number-columns-repeated="2"/>
          <table:table-cell office:value-type="string">
            <text:p>LUVU</text:p>
          </table:table-cell>
          <table:table-cell office:value-type="string">
            <text:p>*dark (weather)</text:p>
          </table:table-cell>
          <table:table-cell office:value-type="string">
            <text:p>QL/57</text:p>
          </table:table-cell>
          <table:table-cell office:value-type="string">
            <text:p>LUM</text:p>
          </table:table-cell>
          <table:table-cell office:value-type="string">
            <text:p>*shadow</text:p>
          </table:table-cell>
          <table:table-cell office:value-type="string">
            <text:p>Ety/LUM</text:p>
          </table:table-cell>
          <table:table-cell office:value-type="string">
            <text:p>LUB/LUM</text:p>
          </table:table-cell>
          <table:table-cell office:value-type="string">
            <text:p>shadow, darkness</text:p>
          </table:table-cell>
          <table:table-cell office:value-type="string">
            <text:p>PE17/168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8"/>
          <table:table-cell office:value-type="string">
            <text:p>LUB</text:p>
          </table:table-cell>
          <table:table-cell office:value-type="string">
            <text:p>bend</text:p>
          </table:table-cell>
          <table:table-cell office:value-type="string">
            <text:p>PE17/12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S. Mablung</text:p>
          </table:table-cell>
          <table:table-cell office:value-type="string">
            <text:p>Heavy-hand</text:p>
          </table:table-cell>
          <table:table-cell office:value-type="string">
            <text:p>G. lung</text:p>
          </table:table-cell>
          <table:table-cell office:value-type="string">
            <text:p>heavy</text:p>
          </table:table-cell>
          <table:table-cell office:value-type="string">
            <text:p>GL/55</text:p>
          </table:table-cell>
          <table:table-cell office:value-type="string">
            <text:p>LUG¹</text:p>
          </table:table-cell>
          <table:table-cell office:value-type="string">
            <text:p>be heavy</text:p>
          </table:table-cell>
          <table:table-cell office:value-type="string">
            <text:p>Ety/LUG¹, PE22/102</text:p>
          </table:table-cell>
          <table:table-cell office:value-type="string">
            <text:p>Q. lungumaitë</text:p>
          </table:table-cell>
          <table:table-cell office:value-type="string">
            <text:p>Heavy-handed</text:p>
          </table:table-cell>
          <table:table-cell office:value-type="string">
            <text:p>PE17/16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  <table:table-cell office:value-type="string">
            <text:p>LUKU</text:p>
          </table:table-cell>
          <table:table-cell office:value-type="string">
            <text:p>*slime, mud</text:p>
          </table:table-cell>
          <table:table-cell office:value-type="string">
            <text:p>QL/5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number-columns-repeated="5"/>
          <table:table-cell office:value-type="string">
            <text:p>LUK</text:p>
          </table:table-cell>
          <table:table-cell office:value-type="string">
            <text:p>magic, enchantment</text:p>
          </table:table-cell>
          <table:table-cell office:value-type="string">
            <text:p>Ety/LU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8"/>
          <table:table-cell office:value-type="string">
            <text:p>LUK</text:p>
          </table:table-cell>
          <table:table-cell office:value-type="string">
            <text:p>haul, drag</text:p>
          </table:table-cell>
          <table:table-cell office:value-type="string">
            <text:p>PE17/2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number-columns-repeated="5"/>
          <table:table-cell office:value-type="string">
            <text:p>LUR</text:p>
          </table:table-cell>
          <table:table-cell office:value-type="string">
            <text:p>be quiet, still</text:p>
          </table:table-cell>
          <table:table-cell office:value-type="string">
            <text:p>EtyAC/LU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  <table:table-cell office:value-type="string">
            <text:p>LURU</text:p>
          </table:table-cell>
          <table:table-cell office:value-type="string">
            <text:p>*frown</text:p>
          </table:table-cell>
          <table:table-cell office:value-type="string">
            <text:p>GL/5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number-columns-repeated="5"/>
          <table:table-cell office:value-type="string">
            <text:p>LUS</text:p>
          </table:table-cell>
          <table:table-cell office:value-type="string">
            <text:p>*empty</text:p>
          </table:table-cell>
          <table:table-cell office:value-type="string">
            <text:p>Ety/LUS</text:p>
          </table:table-cell>
          <table:table-cell office:value-type="string">
            <text:p>S. Camlost</text:p>
          </table:table-cell>
          <table:table-cell office:value-type="string">
            <text:p>Empty-handed</text:p>
          </table:table-cell>
          <table:table-cell office:value-type="string">
            <text:p>S/18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  <table:table-cell office:value-type="string">
            <text:p>LUSU</text:p>
          </table:table-cell>
          <table:table-cell office:value-type="string">
            <text:p>warm, bathe</text:p>
          </table:table-cell>
          <table:table-cell office:value-type="string">
            <text:p>QL/5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Q. lunte</text:p>
          </table:table-cell>
          <table:table-cell office:value-type="string">
            <text:p>boat</text:p>
          </table:table-cell>
          <table:table-cell office:value-type="string">
            <text:p>LUTU</text:p>
          </table:table-cell>
          <table:table-cell office:value-type="string">
            <text:p>*float</text:p>
          </table:table-cell>
          <table:table-cell office:value-type="string">
            <text:p>QL/57</text:p>
          </table:table-cell>
          <table:table-cell office:value-type="string">
            <text:p>LUT</text:p>
          </table:table-cell>
          <table:table-cell office:value-type="string">
            <text:p>float, swim</text:p>
          </table:table-cell>
          <table:table-cell office:value-type="string">
            <text:p>Ety/LUT</text:p>
          </table:table-cell>
          <table:table-cell office:value-type="string">
            <text:p>LUT</text:p>
          </table:table-cell>
          <table:table-cell office:value-type="string">
            <text:p>float</text:p>
          </table:table-cell>
          <table:table-cell office:value-type="string">
            <text:p>VT42/1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number-columns-repeated="2"/>
          <table:table-cell office:value-type="string">
            <text:p>G. luim</text:p>
          </table:table-cell>
          <table:table-cell office:value-type="string">
            <text:p>blue</text:p>
          </table:table-cell>
          <table:table-cell office:value-type="string">
            <text:p>GL/55</text:p>
          </table:table-cell>
          <table:table-cell office:value-type="string">
            <text:p>LUG²</text:p>
          </table:table-cell>
          <table:table-cell office:value-type="string">
            <text:p>blue</text:p>
          </table:table-cell>
          <table:table-cell office:value-type="string">
            <text:p>Ety/LUG²</text:p>
          </table:table-cell>
          <table:table-cell office:value-type="string">
            <text:p>LUY</text:p>
          </table:table-cell>
          <table:table-cell office:value-type="string">
            <text:p>blue</text:p>
          </table:table-cell>
          <table:table-cell office:value-type="string">
            <text:p>VT48/23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Q. ma</text:p>
          </table:table-cell>
          <table:table-cell office:value-type="string">
            <text:p>interrogative</text:p>
          </table:table-cell>
          <table:table-cell office:value-type="string">
            <text:p>MA</text:p>
          </table:table-cell>
          <table:table-cell office:value-type="string">
            <text:p>root of indef[inite]</text:p>
          </table:table-cell>
          <table:table-cell office:value-type="string">
            <text:p>GL/55</text:p>
          </table:table-cell>
          <table:table-cell office:value-type="string">
            <text:p>Q. ma</text:p>
          </table:table-cell>
          <table:table-cell office:value-type="string">
            <text:p>interrogative particle</text:p>
          </table:table-cell>
          <table:table-cell office:value-type="string">
            <text:p>PE22/124</text:p>
          </table:table-cell>
          <table:table-cell office:value-type="string">
            <text:p>MA</text:p>
          </table:table-cell>
          <table:table-cell office:value-type="string">
            <text:p>interrogative stem</text:p>
          </table:table-cell>
          <table:table-cell office:value-type="string">
            <text:p>VT47/1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8"/>
          <table:table-cell office:value-type="string">
            <text:p>MAB/MBON</text:p>
          </table:table-cell>
          <table:table-cell office:value-type="string">
            <text:p>lump, mass</text:p>
          </table:table-cell>
          <table:table-cell office:value-type="string">
            <text:p>PE17/90, 9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  <table:table-cell office:value-type="string">
            <text:p>MAɃA</text:p>
          </table:table-cell>
          <table:table-cell office:value-type="string">
            <text:p>something nice</text:p>
          </table:table-cell>
          <table:table-cell office:value-type="string">
            <text:p>GL/5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number-columns-repeated="5"/>
          <table:table-cell office:value-type="string">
            <text:p>MAD</text:p>
          </table:table-cell>
          <table:table-cell office:value-type="string">
            <text:p>*pale (yellow)</text:p>
          </table:table-cell>
          <table:table-cell office:value-type="string">
            <text:p>Ety/MA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Q. mára</text:p>
          </table:table-cell>
          <table:table-cell office:value-type="string">
            <text:p>good</text:p>
          </table:table-cell>
          <table:table-cell table:number-columns-repeated="3"/>
          <table:table-cell office:value-type="string">
            <text:p>MAG</text:p>
          </table:table-cell>
          <table:table-cell office:value-type="string">
            <text:p>use, handle</text:p>
          </table:table-cell>
          <table:table-cell office:value-type="string">
            <text:p>Ety/MAG</text:p>
          </table:table-cell>
          <table:table-cell office:value-type="string">
            <text:p>MAGA</text:p>
          </table:table-cell>
          <table:table-cell office:value-type="string">
            <text:p>good; thrive</text:p>
          </table:table-cell>
          <table:table-cell office:value-type="string">
            <text:p>VT47/6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Q. má</text:p>
          </table:table-cell>
          <table:table-cell office:value-type="string">
            <text:p>hand</text:p>
          </table:table-cell>
          <table:table-cell office:value-type="string">
            <text:p>MAHA</text:p>
          </table:table-cell>
          <table:table-cell office:value-type="string">
            <text:p>grasp</text:p>
          </table:table-cell>
          <table:table-cell office:value-type="string">
            <text:p>QL/57</text:p>
          </table:table-cell>
          <table:table-cell office:value-type="string">
            <text:p>MAƷ</text:p>
          </table:table-cell>
          <table:table-cell office:value-type="string">
            <text:p>hand</text:p>
          </table:table-cell>
          <table:table-cell office:value-type="string">
            <text:p>Ety/MAƷ</text:p>
          </table:table-cell>
          <table:table-cell office:value-type="string">
            <text:p>MAƷA</text:p>
          </table:table-cell>
          <table:table-cell office:value-type="string">
            <text:p>hand</text:p>
          </table:table-cell>
          <table:table-cell office:value-type="string">
            <text:p>VT47/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Q. macil</text:p>
          </table:table-cell>
          <table:table-cell office:value-type="string">
            <text:p>sword</text:p>
          </table:table-cell>
          <table:table-cell office:value-type="string">
            <text:p>MAKA¹</text:p>
          </table:table-cell>
          <table:table-cell office:value-type="string">
            <text:p>slay</text:p>
          </table:table-cell>
          <table:table-cell office:value-type="string">
            <text:p>QL/57</text:p>
          </table:table-cell>
          <table:table-cell office:value-type="string">
            <text:p>MAK</text:p>
          </table:table-cell>
          <table:table-cell office:value-type="string">
            <text:p>sword; cleave</text:p>
          </table:table-cell>
          <table:table-cell office:value-type="string">
            <text:p>Ety/MAK</text:p>
          </table:table-cell>
          <table:table-cell office:value-type="string">
            <text:p>MAKA</text:p>
          </table:table-cell>
          <table:table-cell office:value-type="string">
            <text:p>forge metal</text:p>
          </table:table-cell>
          <table:table-cell office:value-type="string">
            <text:p>VT41/10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  <table:table-cell office:value-type="string">
            <text:p>MAKA²/ŊʷAKA</text:p>
          </table:table-cell>
          <table:table-cell office:value-type="string">
            <text:p>*net, mesh</text:p>
          </table:table-cell>
          <table:table-cell office:value-type="string">
            <text:p>QL/5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Q. malina</text:p>
          </table:table-cell>
          <table:table-cell office:value-type="string">
            <text:p>yellow</text:p>
          </table:table-cell>
          <table:table-cell office:value-type="string">
            <text:p>MALA²</text:p>
          </table:table-cell>
          <table:table-cell office:value-type="string">
            <text:p>yellow</text:p>
          </table:table-cell>
          <table:table-cell office:value-type="string">
            <text:p>QL/58</text:p>
          </table:table-cell>
          <table:table-cell office:value-type="string">
            <text:p>SMAL</text:p>
          </table:table-cell>
          <table:table-cell office:value-type="string">
            <text:p>yellow</text:p>
          </table:table-cell>
          <table:table-cell office:value-type="string">
            <text:p>Ety/SMAL</text:p>
          </table:table-cell>
          <table:table-cell office:value-type="string">
            <text:p>MALNĀ</text:p>
          </table:table-cell>
          <table:table-cell office:value-type="string">
            <text:p>yellow, of golden colour</text:p>
          </table:table-cell>
          <table:table-cell office:value-type="string">
            <text:p>PE17/5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8"/>
          <table:table-cell office:value-type="string">
            <text:p>MALAT</text:p>
          </table:table-cell>
          <table:table-cell office:value-type="string">
            <text:p>gold</text:p>
          </table:table-cell>
          <table:table-cell office:value-type="string">
            <text:p>PM/36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Q. Manwe</text:p>
          </table:table-cell>
          <table:table-cell/>
          <table:table-cell office:value-type="string">
            <text:p>MANA</text:p>
          </table:table-cell>
          <table:table-cell office:value-type="string">
            <text:p>*good (moral)</text:p>
          </table:table-cell>
          <table:table-cell office:value-type="string">
            <text:p>QL/58</text:p>
          </table:table-cell>
          <table:table-cell office:value-type="string">
            <text:p>MAN</text:p>
          </table:table-cell>
          <table:table-cell office:value-type="string">
            <text:p>holy spirit</text:p>
          </table:table-cell>
          <table:table-cell office:value-type="string">
            <text:p>Ety/MAN</text:p>
          </table:table-cell>
          <table:table-cell office:value-type="string">
            <text:p>(A)MAN</text:p>
          </table:table-cell>
          <table:table-cell office:value-type="string">
            <text:p>blessed, holy</text:p>
          </table:table-cell>
          <table:table-cell office:value-type="string">
            <text:p>PM/35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number-columns-repeated="5"/>
          <table:table-cell office:value-type="string">
            <text:p>MANAD</text:p>
          </table:table-cell>
          <table:table-cell office:value-type="string">
            <text:p>doom, fate</text:p>
          </table:table-cell>
          <table:table-cell office:value-type="string">
            <text:p>Ety/MANA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  <table:table-cell office:value-type="string">
            <text:p>MANGA</text:p>
          </table:table-cell>
          <table:table-cell office:value-type="string">
            <text:p>lacking</text:p>
          </table:table-cell>
          <table:table-cell office:value-type="string">
            <text:p>QL/5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S. mâb</text:p>
          </table:table-cell>
          <table:table-cell office:value-type="string">
            <text:p>hand</text:p>
          </table:table-cell>
          <table:table-cell office:value-type="string">
            <text:p>MAPA</text:p>
          </table:table-cell>
          <table:table-cell office:value-type="string">
            <text:p>seize</text:p>
          </table:table-cell>
          <table:table-cell office:value-type="string">
            <text:p>QL/59</text:p>
          </table:table-cell>
          <table:table-cell office:value-type="string">
            <text:p>MAP</text:p>
          </table:table-cell>
          <table:table-cell office:value-type="string">
            <text:p>lay hold, seize</text:p>
          </table:table-cell>
          <table:table-cell office:value-type="string">
            <text:p>Ety/MAP</text:p>
          </table:table-cell>
          <table:table-cell office:value-type="string">
            <text:p>MAP</text:p>
          </table:table-cell>
          <table:table-cell office:value-type="string">
            <text:p>take hold of, grasp</text:p>
          </table:table-cell>
          <table:table-cell office:value-type="string">
            <text:p>VT47/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  <table:table-cell office:value-type="string">
            <text:p>MARA¹</text:p>
          </table:table-cell>
          <table:table-cell office:value-type="string">
            <text:p>ripe, yellow</text:p>
          </table:table-cell>
          <table:table-cell office:value-type="string">
            <text:p>QL/59, 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  <table:table-cell office:value-type="string">
            <text:p>MARA²</text:p>
          </table:table-cell>
          <table:table-cell office:value-type="string">
            <text:p>*sand, soil</text:p>
          </table:table-cell>
          <table:table-cell office:value-type="string">
            <text:p>QL/5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number-columns-repeated="5"/>
          <table:table-cell office:value-type="string">
            <text:p>MASAG</text:p>
          </table:table-cell>
          <table:table-cell office:value-type="string">
            <text:p>knead</text:p>
          </table:table-cell>
          <table:table-cell office:value-type="string">
            <text:p>Ety/MASAG</text:p>
          </table:table-cell>
          <table:table-cell office:value-type="string">
            <text:p>MASAG</text:p>
          </table:table-cell>
          <table:table-cell office:value-type="string">
            <text:p>*sticky</text:p>
          </table:table-cell>
          <table:table-cell office:value-type="string">
            <text:p>PE19/101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Q. mat-</text:p>
          </table:table-cell>
          <table:table-cell office:value-type="string">
            <text:p>eat</text:p>
          </table:table-cell>
          <table:table-cell office:value-type="string">
            <text:p>MATA</text:p>
          </table:table-cell>
          <table:table-cell office:value-type="string">
            <text:p>eat</text:p>
          </table:table-cell>
          <table:table-cell office:value-type="string">
            <text:p>QL/59</text:p>
          </table:table-cell>
          <table:table-cell office:value-type="string">
            <text:p>MAT</text:p>
          </table:table-cell>
          <table:table-cell office:value-type="string">
            <text:p>eat</text:p>
          </table:table-cell>
          <table:table-cell office:value-type="string">
            <text:p>Ety/MAT</text:p>
          </table:table-cell>
          <table:table-cell office:value-type="string">
            <text:p>MAT</text:p>
          </table:table-cell>
          <table:table-cell office:value-type="string">
            <text:p>eat</text:p>
          </table:table-cell>
          <table:table-cell office:value-type="string">
            <text:p>VT48/2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  <table:table-cell office:value-type="string">
            <text:p>MASA/MAÞA</text:p>
          </table:table-cell>
          <table:table-cell office:value-type="string">
            <text:p>dusk</text:p>
          </table:table-cell>
          <table:table-cell office:value-type="string">
            <text:p>QL/59, 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  <table:table-cell office:value-type="string">
            <text:p>MAẎA</text:p>
          </table:table-cell>
          <table:table-cell office:value-type="string">
            <text:p>*excessive</text:p>
          </table:table-cell>
          <table:table-cell office:value-type="string">
            <text:p>QL/60</text:p>
          </table:table-cell>
          <table:table-cell table:number-columns-repeated="3"/>
          <table:table-cell office:value-type="string">
            <text:p>MAYA</text:p>
          </table:table-cell>
          <table:table-cell office:value-type="string">
            <text:p>excellent, admirable</text:p>
          </table:table-cell>
          <table:table-cell office:value-type="string">
            <text:p>PE17/150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Q. Mandos</text:p>
          </table:table-cell>
          <table:table-cell/>
          <table:table-cell office:value-type="string">
            <text:p>Mᵇ(A)NÐ(A)N</text:p>
          </table:table-cell>
          <table:table-cell office:value-type="string">
            <text:p>bind</text:p>
          </table:table-cell>
          <table:table-cell office:value-type="string">
            <text:p>QL/58</text:p>
          </table:table-cell>
          <table:table-cell office:value-type="string">
            <text:p>MBAD</text:p>
          </table:table-cell>
          <table:table-cell office:value-type="string">
            <text:p>duress, prison</text:p>
          </table:table-cell>
          <table:table-cell office:value-type="string">
            <text:p>Ety/MBAD</text:p>
          </table:table-cell>
          <table:table-cell office:value-type="string">
            <text:p>S. Angband</text:p>
          </table:table-cell>
          <table:table-cell office:value-type="string">
            <text:p>Iron Prison</text:p>
          </table:table-cell>
          <table:table-cell office:value-type="string">
            <text:p>WJ/1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number-columns-repeated="2"/>
          <table:table-cell office:value-type="string">
            <text:p>VAKA</text:p>
          </table:table-cell>
          <table:table-cell office:value-type="string">
            <text:p>*trade</text:p>
          </table:table-cell>
          <table:table-cell office:value-type="string">
            <text:p>QL/99</text:p>
          </table:table-cell>
          <table:table-cell office:value-type="string">
            <text:p>MBAKH</text:p>
          </table:table-cell>
          <table:table-cell office:value-type="string">
            <text:p>exchange</text:p>
          </table:table-cell>
          <table:table-cell office:value-type="string">
            <text:p>Ety/MBAKH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Q. malle</text:p>
          </table:table-cell>
          <table:table-cell office:value-type="string">
            <text:p>street</text:p>
          </table:table-cell>
          <table:table-cell office:value-type="string">
            <text:p>MALA¹</text:p>
          </table:table-cell>
          <table:table-cell office:value-type="string">
            <text:p>crush, squeeze</text:p>
          </table:table-cell>
          <table:table-cell office:value-type="string">
            <text:p>QL/58</text:p>
          </table:table-cell>
          <table:table-cell office:value-type="string">
            <text:p>MBAL</text:p>
          </table:table-cell>
          <table:table-cell office:value-type="string">
            <text:p>*flag stone</text:p>
          </table:table-cell>
          <table:table-cell office:value-type="string">
            <text:p>Ety/MBAL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  <table:table-cell office:value-type="string">
            <text:p>MALA³/MBALA</text:p>
          </table:table-cell>
          <table:table-cell office:value-type="string">
            <text:p>hurt, pain</text:p>
          </table:table-cell>
          <table:table-cell office:value-type="string">
            <text:p>QL/58, 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S. bâr</text:p>
          </table:table-cell>
          <table:table-cell office:value-type="string">
            <text:p>home</text:p>
          </table:table-cell>
          <table:table-cell office:value-type="string">
            <text:p>MBARA</text:p>
          </table:table-cell>
          <table:table-cell office:value-type="string">
            <text:p>dwell, live</text:p>
          </table:table-cell>
          <table:table-cell office:value-type="string">
            <text:p>QL/63</text:p>
          </table:table-cell>
          <table:table-cell office:value-type="string">
            <text:p>MBAR</text:p>
          </table:table-cell>
          <table:table-cell office:value-type="string">
            <text:p>dwell, inhabit</text:p>
          </table:table-cell>
          <table:table-cell office:value-type="string">
            <text:p>Ety/MBAR</text:p>
          </table:table-cell>
          <table:table-cell office:value-type="string">
            <text:p>MBAR</text:p>
          </table:table-cell>
          <table:table-cell office:value-type="string">
            <text:p>settle, establish</text:p>
          </table:table-cell>
          <table:table-cell office:value-type="string">
            <text:p>NM/22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Q. ambar</text:p>
          </table:table-cell>
          <table:table-cell office:value-type="string">
            <text:p>fate</text:p>
          </table:table-cell>
          <table:table-cell office:value-type="string">
            <text:p>MṚTṚ/MBṚTṚ</text:p>
          </table:table-cell>
          <table:table-cell office:value-type="string">
            <text:p>chance</text:p>
          </table:table-cell>
          <table:table-cell office:value-type="string">
            <text:p>QL/63</text:p>
          </table:table-cell>
          <table:table-cell office:value-type="string">
            <text:p>MBARAT</text:p>
          </table:table-cell>
          <table:table-cell office:value-type="string">
            <text:p>*fate</text:p>
          </table:table-cell>
          <table:table-cell office:value-type="string">
            <text:p>Ety/MBARAT</text:p>
          </table:table-cell>
          <table:table-cell office:value-type="string">
            <text:p>MAR(AT)/MBART</text:p>
          </table:table-cell>
          <table:table-cell office:value-type="string">
            <text:p>doom, fate</text:p>
          </table:table-cell>
          <table:table-cell office:value-type="string">
            <text:p>PE17/6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Q. masta</text:p>
          </table:table-cell>
          <table:table-cell office:value-type="string">
            <text:p>bread</text:p>
          </table:table-cell>
          <table:table-cell office:value-type="string">
            <text:p>M(B)ASA</text:p>
          </table:table-cell>
          <table:table-cell office:value-type="string">
            <text:p>cook, bake</text:p>
          </table:table-cell>
          <table:table-cell office:value-type="string">
            <text:p>QL/59</text:p>
          </table:table-cell>
          <table:table-cell office:value-type="string">
            <text:p>MBAS</text:p>
          </table:table-cell>
          <table:table-cell office:value-type="string">
            <text:p>knead</text:p>
          </table:table-cell>
          <table:table-cell office:value-type="string">
            <text:p>Ety/MBAS</text:p>
          </table:table-cell>
          <table:table-cell office:value-type="string">
            <text:p>MBAS</text:p>
          </table:table-cell>
          <table:table-cell office:value-type="string">
            <text:p>bake</text:p>
          </table:table-cell>
          <table:table-cell office:value-type="string">
            <text:p>PE17/51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number-columns-repeated="5"/>
          <table:table-cell office:value-type="string">
            <text:p>MBAW</text:p>
          </table:table-cell>
          <table:table-cell office:value-type="string">
            <text:p>compel, force</text:p>
          </table:table-cell>
          <table:table-cell office:value-type="string">
            <text:p>Ety/MBAW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Q. Melkor</text:p>
          </table:table-cell>
          <table:table-cell/>
          <table:table-cell office:value-type="string">
            <text:p>(M)BELEKE</text:p>
          </table:table-cell>
          <table:table-cell office:value-type="string">
            <text:p>*flame</text:p>
          </table:table-cell>
          <table:table-cell office:value-type="string">
            <text:p>GL/2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8"/>
          <table:table-cell office:value-type="string">
            <text:p>MBELEK</text:p>
          </table:table-cell>
          <table:table-cell office:value-type="string">
            <text:p>mighty</text:p>
          </table:table-cell>
          <table:table-cell office:value-type="string">
            <text:p>PE17/11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number-columns-repeated="5"/>
          <table:table-cell office:value-type="string">
            <text:p>MBER</text:p>
          </table:table-cell>
          <table:table-cell office:value-type="string">
            <text:p>*feast, festive</text:p>
          </table:table-cell>
          <table:table-cell office:value-type="string">
            <text:p>Ety/MBER</text:p>
          </table:table-cell>
          <table:table-cell office:value-type="string">
            <text:p>S. mereth</text:p>
          </table:table-cell>
          <table:table-cell office:value-type="string">
            <text:p>feast</text:p>
          </table:table-cell>
          <table:table-cell office:value-type="string">
            <text:p>S/11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number-columns-repeated="5"/>
          <table:table-cell office:value-type="string">
            <text:p>MBIRIL</text:p>
          </table:table-cell>
          <table:table-cell office:value-type="string">
            <text:p>*crystal</text:p>
          </table:table-cell>
          <table:table-cell office:value-type="string">
            <text:p>Ety/MBIRI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  <table:table-cell office:value-type="string">
            <text:p>MBAÞ</text:p>
          </table:table-cell>
          <table:table-cell office:value-type="string">
            <text:p>*dusk</text:p>
          </table:table-cell>
          <table:table-cell office:value-type="string">
            <text:p>GL/7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number-columns-repeated="5"/>
          <table:table-cell office:value-type="string">
            <text:p>(M)BUD</text:p>
          </table:table-cell>
          <table:table-cell office:value-type="string">
            <text:p>jut out, project</text:p>
          </table:table-cell>
          <table:table-cell office:value-type="string">
            <text:p>Ety/BUD, MBU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  <table:table-cell office:value-type="string">
            <text:p>MEHE</text:p>
          </table:table-cell>
          <table:table-cell office:value-type="string">
            <text:p>ooze</text:p>
          </table:table-cell>
          <table:table-cell office:value-type="string">
            <text:p>QL/6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  <table:table-cell office:value-type="string">
            <text:p>MEKE</text:p>
          </table:table-cell>
          <table:table-cell office:value-type="string">
            <text:p>*centre; aim</text:p>
          </table:table-cell>
          <table:table-cell office:value-type="string">
            <text:p>QL/6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Q. mel-</text:p>
          </table:table-cell>
          <table:table-cell office:value-type="string">
            <text:p>love</text:p>
          </table:table-cell>
          <table:table-cell office:value-type="string">
            <text:p>MELE</text:p>
          </table:table-cell>
          <table:table-cell office:value-type="string">
            <text:p>*love</text:p>
          </table:table-cell>
          <table:table-cell office:value-type="string">
            <text:p>QL/60</text:p>
          </table:table-cell>
          <table:table-cell office:value-type="string">
            <text:p>MEL</text:p>
          </table:table-cell>
          <table:table-cell office:value-type="string">
            <text:p>love (as friend)</text:p>
          </table:table-cell>
          <table:table-cell office:value-type="string">
            <text:p>Ety/MEL</text:p>
          </table:table-cell>
          <table:table-cell office:value-type="string">
            <text:p>MEL</text:p>
          </table:table-cell>
          <table:table-cell office:value-type="string">
            <text:p>love</text:p>
          </table:table-cell>
          <table:table-cell office:value-type="string">
            <text:p>NM/2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number-columns-repeated="5"/>
          <table:table-cell office:value-type="string">
            <text:p>MEN</text:p>
          </table:table-cell>
          <table:table-cell office:value-type="string">
            <text:p>*place, spot</text:p>
          </table:table-cell>
          <table:table-cell office:value-type="string">
            <text:p>Ety/MEN</text:p>
          </table:table-cell>
          <table:table-cell office:value-type="string">
            <text:p>MEN</text:p>
          </table:table-cell>
          <table:table-cell office:value-type="string">
            <text:p>go, proceed</text:p>
          </table:table-cell>
          <table:table-cell office:value-type="string">
            <text:p>PE17/165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Q./S. menel</text:p>
          </table:table-cell>
          <table:table-cell office:value-type="string">
            <text:p>heavens</text:p>
          </table:table-cell>
          <table:table-cell table:number-columns-repeated="3"/>
          <table:table-cell office:value-type="string">
            <text:p>MENEL</text:p>
          </table:table-cell>
          <table:table-cell office:value-type="string">
            <text:p>heaven, sky</text:p>
          </table:table-cell>
          <table:table-cell office:value-type="string">
            <text:p>SD/414</text:p>
          </table:table-cell>
          <table:table-cell office:value-type="string">
            <text:p>MENEL</text:p>
          </table:table-cell>
          <table:table-cell office:value-type="string">
            <text:p>heavens, firmament</text:p>
          </table:table-cell>
          <table:table-cell office:value-type="string">
            <text:p>PE21/8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number-columns-repeated="5"/>
          <table:table-cell office:value-type="string">
            <text:p>MER</text:p>
          </table:table-cell>
          <table:table-cell office:value-type="string">
            <text:p>wish, desire, want</text:p>
          </table:table-cell>
          <table:table-cell office:value-type="string">
            <text:p>Ety/MER</text:p>
          </table:table-cell>
          <table:table-cell office:value-type="string">
            <text:p>Q. mer-</text:p>
          </table:table-cell>
          <table:table-cell office:value-type="string">
            <text:p>hope</text:p>
          </table:table-cell>
          <table:table-cell office:value-type="string">
            <text:p>Merin Sentence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Q. metta</text:p>
          </table:table-cell>
          <table:table-cell office:value-type="string">
            <text:p>ending</text:p>
          </table:table-cell>
          <table:table-cell table:number-columns-repeated="3"/>
          <table:table-cell office:value-type="string">
            <text:p>MET</text:p>
          </table:table-cell>
          <table:table-cell office:value-type="string">
            <text:p>end</text:p>
          </table:table-cell>
          <table:table-cell office:value-type="string">
            <text:p>Ety/MET</text:p>
          </table:table-cell>
          <table:table-cell office:value-type="string">
            <text:p>MET</text:p>
          </table:table-cell>
          <table:table-cell office:value-type="string">
            <text:p>end, finality</text:p>
          </table:table-cell>
          <table:table-cell office:value-type="string">
            <text:p>VT49/2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  <table:table-cell office:value-type="string">
            <text:p>MĪ¹</text:p>
          </table:table-cell>
          <table:table-cell office:value-type="string">
            <text:p>*one</text:p>
          </table:table-cell>
          <table:table-cell office:value-type="string">
            <text:p>QL/6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Q. mi</text:p>
          </table:table-cell>
          <table:table-cell office:value-type="string">
            <text:p>in</text:p>
          </table:table-cell>
          <table:table-cell office:value-type="string">
            <text:p>IMI²/MĪ²</text:p>
          </table:table-cell>
          <table:table-cell office:value-type="string">
            <text:p>in, into</text:p>
          </table:table-cell>
          <table:table-cell office:value-type="string">
            <text:p>QL/42, 61</text:p>
          </table:table-cell>
          <table:table-cell office:value-type="string">
            <text:p>MĪ/IMI</text:p>
          </table:table-cell>
          <table:table-cell office:value-type="string">
            <text:p>inside</text:p>
          </table:table-cell>
          <table:table-cell office:value-type="string">
            <text:p>Ety/MI; EtyAC/IMÍ</text:p>
          </table:table-cell>
          <table:table-cell office:value-type="string">
            <text:p>MI/IMI</text:p>
          </table:table-cell>
          <table:table-cell office:value-type="string">
            <text:p>in, within</text:p>
          </table:table-cell>
          <table:table-cell office:value-type="string">
            <text:p>PE17/41, 9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8"/>
          <table:table-cell office:value-type="string">
            <text:p>MIK</text:p>
          </table:table-cell>
          <table:table-cell office:value-type="string">
            <text:p>pierce</text:p>
          </table:table-cell>
          <table:table-cell office:value-type="string">
            <text:p>WJ/33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number-columns-repeated="5"/>
          <table:table-cell office:value-type="string">
            <text:p>MIL</text:p>
          </table:table-cell>
          <table:table-cell office:value-type="string">
            <text:p>*soft, gentle, weak</text:p>
          </table:table-cell>
          <table:table-cell office:value-type="string">
            <text:p>EtyAC/MI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  <table:table-cell office:value-type="string">
            <text:p>MILI</text:p>
          </table:table-cell>
          <table:table-cell office:value-type="string">
            <text:p>*seed</text:p>
          </table:table-cell>
          <table:table-cell office:value-type="string">
            <text:p>QL/6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number-columns-repeated="2"/>
          <table:table-cell office:value-type="string">
            <text:p>MḶKḶ</text:p>
          </table:table-cell>
          <table:table-cell office:value-type="string">
            <text:p>possess</text:p>
          </table:table-cell>
          <table:table-cell office:value-type="string">
            <text:p>QL/62, 63</text:p>
          </table:table-cell>
          <table:table-cell office:value-type="string">
            <text:p>MIL-IK</text:p>
          </table:table-cell>
          <table:table-cell office:value-type="string">
            <text:p>*greed, lust</text:p>
          </table:table-cell>
          <table:table-cell office:value-type="string">
            <text:p>Ety/MIL-IK</text:p>
          </table:table-cell>
          <table:table-cell office:value-type="string">
            <text:p>MILIK</text:p>
          </table:table-cell>
          <table:table-cell office:value-type="string">
            <text:p>*wealth, abundance</text:p>
          </table:table-cell>
          <table:table-cell office:value-type="string">
            <text:p>PE21/80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  <table:table-cell office:value-type="string">
            <text:p>MIMI</text:p>
          </table:table-cell>
          <table:table-cell office:value-type="string">
            <text:p>*flesh</text:p>
          </table:table-cell>
          <table:table-cell office:value-type="string">
            <text:p>QL/6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  <table:table-cell office:value-type="string">
            <text:p>MINI¹</text:p>
          </table:table-cell>
          <table:table-cell office:value-type="string">
            <text:p>*small, less</text:p>
          </table:table-cell>
          <table:table-cell office:value-type="string">
            <text:p>QL/6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Q. mindon</text:p>
          </table:table-cell>
          <table:table-cell office:value-type="string">
            <text:p>tower</text:p>
          </table:table-cell>
          <table:table-cell office:value-type="string">
            <text:p>MINI²</text:p>
          </table:table-cell>
          <table:table-cell office:value-type="string">
            <text:p>*tower</text:p>
          </table:table-cell>
          <table:table-cell office:value-type="string">
            <text:p>QL/61</text:p>
          </table:table-cell>
          <table:table-cell office:value-type="string">
            <text:p>MIN</text:p>
          </table:table-cell>
          <table:table-cell office:value-type="string">
            <text:p>stand alone, stick out</text:p>
          </table:table-cell>
          <table:table-cell office:value-type="string">
            <text:p>Ety/MIN</text:p>
          </table:table-cell>
          <table:table-cell office:value-type="string">
            <text:p>MIN</text:p>
          </table:table-cell>
          <table:table-cell office:value-type="string">
            <text:p>one, first of a series</text:p>
          </table:table-cell>
          <table:table-cell office:value-type="string">
            <text:p>VT42/24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Q. míre, S. mîr</text:p>
          </table:table-cell>
          <table:table-cell office:value-type="string">
            <text:p>jewel</text:p>
          </table:table-cell>
          <table:table-cell table:number-columns-repeated="3"/>
          <table:table-cell office:value-type="string">
            <text:p>MIR</text:p>
          </table:table-cell>
          <table:table-cell office:value-type="string">
            <text:p>*precious</text:p>
          </table:table-cell>
          <table:table-cell office:value-type="string">
            <text:p>Ety/MIR</text:p>
          </table:table-cell>
          <table:table-cell office:value-type="string">
            <text:p>MIR</text:p>
          </table:table-cell>
          <table:table-cell office:value-type="string">
            <text:p>precious</text:p>
          </table:table-cell>
          <table:table-cell office:value-type="string">
            <text:p>PE17/16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number-columns-repeated="2"/>
          <table:table-cell office:value-type="string">
            <text:p>MIQI</text:p>
          </table:table-cell>
          <table:table-cell office:value-type="string">
            <text:p>kiss</text:p>
          </table:table-cell>
          <table:table-cell office:value-type="string">
            <text:p>QL/61</text:p>
          </table:table-cell>
          <table:table-cell office:value-type="string">
            <text:p>Q. miquilis</text:p>
          </table:table-cell>
          <table:table-cell office:value-type="string">
            <text:p>kiss</text:p>
          </table:table-cell>
          <table:table-cell office:value-type="string">
            <text:p>PE21/33</text:p>
          </table:table-cell>
          <table:table-cell office:value-type="string">
            <text:p>Q. miquelis</text:p>
          </table:table-cell>
          <table:table-cell office:value-type="string">
            <text:p>(soft, sweet) kiss</text:p>
          </table:table-cell>
          <table:table-cell office:value-type="string">
            <text:p>PE16/9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  <table:table-cell office:value-type="string">
            <text:p>MIRI/MṚT͡YṚ</text:p>
          </table:table-cell>
          <table:table-cell office:value-type="string">
            <text:p>smile</text:p>
          </table:table-cell>
          <table:table-cell office:value-type="string">
            <text:p>QL/6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number-columns-repeated="5"/>
          <table:table-cell office:value-type="string">
            <text:p>MIS</text:p>
          </table:table-cell>
          <table:table-cell office:value-type="string">
            <text:p>go free, stray, wander</text:p>
          </table:table-cell>
          <table:table-cell office:value-type="string">
            <text:p>Ety/MI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01">
            <text:p>501</text:p>
          </table:table-cell>
          <table:table-cell table:number-columns-repeated="2"/>
          <table:table-cell office:value-type="string">
            <text:p>MISI</text:p>
          </table:table-cell>
          <table:table-cell office:value-type="string">
            <text:p>mingere, *urinate</text:p>
          </table:table-cell>
          <table:table-cell office:value-type="string">
            <text:p>QL/62</text:p>
          </table:table-cell>
          <table:table-cell office:value-type="string">
            <text:p>MIS</text:p>
          </table:table-cell>
          <table:table-cell office:value-type="string">
            <text:p>*wet</text:p>
          </table:table-cell>
          <table:table-cell office:value-type="string">
            <text:p>EtyAC/MITH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02">
            <text:p>502</text:p>
          </table:table-cell>
          <table:table-cell table:number-columns-repeated="5"/>
          <table:table-cell office:value-type="string">
            <text:p>MISK</text:p>
          </table:table-cell>
          <table:table-cell office:value-type="string">
            <text:p>*wet</text:p>
          </table:table-cell>
          <table:table-cell office:value-type="string">
            <text:p>Ety/MIS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S. mith</text:p>
          </table:table-cell>
          <table:table-cell office:value-type="string">
            <text:p>grey</text:p>
          </table:table-cell>
          <table:table-cell table:number-columns-repeated="3"/>
          <table:table-cell office:value-type="string">
            <text:p>MITH</text:p>
          </table:table-cell>
          <table:table-cell office:value-type="string">
            <text:p>*mist, grey</text:p>
          </table:table-cell>
          <table:table-cell office:value-type="string">
            <text:p>Ety/MITH</text:p>
          </table:table-cell>
          <table:table-cell office:value-type="string">
            <text:p>MIÞ</text:p>
          </table:table-cell>
          <table:table-cell office:value-type="string">
            <text:p>grey</text:p>
          </table:table-cell>
          <table:table-cell office:value-type="string">
            <text:p>PE17/7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Q. maiwë</text:p>
          </table:table-cell>
          <table:table-cell office:value-type="string">
            <text:p>gull</text:p>
          </table:table-cell>
          <table:table-cell office:value-type="string">
            <text:p>MAWA</text:p>
          </table:table-cell>
          <table:table-cell office:value-type="string">
            <text:p>cry, bleat</text:p>
          </table:table-cell>
          <table:table-cell office:value-type="string">
            <text:p>QL/60</text:p>
          </table:table-cell>
          <table:table-cell office:value-type="string">
            <text:p>MIW</text:p>
          </table:table-cell>
          <table:table-cell office:value-type="string">
            <text:p>whine</text:p>
          </table:table-cell>
          <table:table-cell office:value-type="string">
            <text:p>Ety/MIW</text:p>
          </table:table-cell>
          <table:table-cell office:value-type="string">
            <text:p>S. maew</text:p>
          </table:table-cell>
          <table:table-cell office:value-type="string">
            <text:p>gull</text:p>
          </table:table-cell>
          <table:table-cell office:value-type="string">
            <text:p>PE17/97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05">
            <text:p>505</text:p>
          </table:table-cell>
          <table:table-cell table:number-columns-repeated="5"/>
          <table:table-cell office:value-type="string">
            <text:p>MIW²</text:p>
          </table:table-cell>
          <table:table-cell office:value-type="string">
            <text:p>*small, tiny, frail</text:p>
          </table:table-cell>
          <table:table-cell office:value-type="string">
            <text:p>EtyAC/MIW²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S./N. mîdh</text:p>
          </table:table-cell>
          <table:table-cell office:value-type="string">
            <text:p>dew</text:p>
          </table:table-cell>
          <table:table-cell table:number-columns-repeated="3"/>
          <table:table-cell office:value-type="string">
            <text:p>MIZD</text:p>
          </table:table-cell>
          <table:table-cell office:value-type="string">
            <text:p>*fine rain, dew</text:p>
          </table:table-cell>
          <table:table-cell office:value-type="string">
            <text:p>Ety/MIZD</text:p>
          </table:table-cell>
          <table:table-cell office:value-type="string">
            <text:p>MIZDI</text:p>
          </table:table-cell>
          <table:table-cell office:value-type="string">
            <text:p>*fine rain, dew</text:p>
          </table:table-cell>
          <table:table-cell office:value-type="string">
            <text:p>PE18/9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table:number-columns-repeated="2"/>
          <table:table-cell office:value-type="string">
            <text:p>MḶŘḶ/MḶDḶ</text:p>
          </table:table-cell>
          <table:table-cell office:value-type="string">
            <text:p>crush, pound</text:p>
          </table:table-cell>
          <table:table-cell office:value-type="string">
            <text:p>QL/62, 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table:number-columns-repeated="2"/>
          <table:table-cell office:value-type="string">
            <text:p>MṆGṆ</text:p>
          </table:table-cell>
          <table:table-cell office:value-type="string">
            <text:p>*butter</text:p>
          </table:table-cell>
          <table:table-cell office:value-type="string">
            <text:p>QL/6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table:number-columns-repeated="2"/>
          <table:table-cell office:value-type="string">
            <text:p>MṆT͡YṆ</text:p>
          </table:table-cell>
          <table:table-cell office:value-type="string">
            <text:p>*memory</text:p>
          </table:table-cell>
          <table:table-cell office:value-type="string">
            <text:p>QL/6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Q. mól</text:p>
          </table:table-cell>
          <table:table-cell office:value-type="string">
            <text:p>slave</text:p>
          </table:table-cell>
          <table:table-cell table:number-columns-repeated="3"/>
          <table:table-cell office:value-type="string">
            <text:p>MŌ</text:p>
          </table:table-cell>
          <table:table-cell office:value-type="string">
            <text:p>*labour</text:p>
          </table:table-cell>
          <table:table-cell office:value-type="string">
            <text:p>Ety/MŌ</text:p>
          </table:table-cell>
          <table:table-cell office:value-type="string">
            <text:p>MŌ</text:p>
          </table:table-cell>
          <table:table-cell office:value-type="string">
            <text:p>labour, be afflicted</text:p>
          </table:table-cell>
          <table:table-cell office:value-type="string">
            <text:p>VT43/3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table:number-columns-repeated="2"/>
          <table:table-cell office:value-type="string">
            <text:p>MOKO</text:p>
          </table:table-cell>
          <table:table-cell office:value-type="string">
            <text:p>hate</text:p>
          </table:table-cell>
          <table:table-cell office:value-type="string">
            <text:p>QL/6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Q. more</text:p>
          </table:table-cell>
          <table:table-cell office:value-type="string">
            <text:p>black</text:p>
          </table:table-cell>
          <table:table-cell office:value-type="string">
            <text:p>MORO</text:p>
          </table:table-cell>
          <table:table-cell office:value-type="string">
            <text:p>*black, dark</text:p>
          </table:table-cell>
          <table:table-cell office:value-type="string">
            <text:p>QL/62</text:p>
          </table:table-cell>
          <table:table-cell office:value-type="string">
            <text:p>MOR</text:p>
          </table:table-cell>
          <table:table-cell office:value-type="string">
            <text:p>*black, dark</text:p>
          </table:table-cell>
          <table:table-cell office:value-type="string">
            <text:p>Ety/MOR</text:p>
          </table:table-cell>
          <table:table-cell office:value-type="string">
            <text:p>MOR</text:p>
          </table:table-cell>
          <table:table-cell office:value-type="string">
            <text:p>dark, black</text:p>
          </table:table-cell>
          <table:table-cell office:value-type="string">
            <text:p>Let/38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13">
            <text:p>513</text:p>
          </table:table-cell>
          <table:table-cell table:number-columns-repeated="5"/>
          <table:table-cell office:value-type="string">
            <text:p>MOROK</text:p>
          </table:table-cell>
          <table:table-cell office:value-type="string">
            <text:p>*bear</text:p>
          </table:table-cell>
          <table:table-cell office:value-type="string">
            <text:p>Ety/MORÓ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14">
            <text:p>514</text:p>
          </table:table-cell>
          <table:table-cell table:number-columns-repeated="5"/>
          <table:table-cell office:value-type="string">
            <text:p>MBOTH</text:p>
          </table:table-cell>
          <table:table-cell office:value-type="string">
            <text:p>*pool</text:p>
          </table:table-cell>
          <table:table-cell office:value-type="string">
            <text:p>Ety/MBOTH</text:p>
          </table:table-cell>
          <table:table-cell office:value-type="string">
            <text:p>MOT</text:p>
          </table:table-cell>
          <table:table-cell office:value-type="string">
            <text:p>fen, marsh</text:p>
          </table:table-cell>
          <table:table-cell office:value-type="string">
            <text:p>PE17/165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15">
            <text:p>515</text:p>
          </table:table-cell>
          <table:table-cell table:number-columns-repeated="5"/>
          <table:table-cell office:value-type="string">
            <text:p>MOY</text:p>
          </table:table-cell>
          <table:table-cell office:value-type="string">
            <text:p>*dear</text:p>
          </table:table-cell>
          <table:table-cell office:value-type="string">
            <text:p>Ety/MOY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table:number-columns-repeated="2"/>
          <table:table-cell office:value-type="string">
            <text:p>MṚŘṚ/MṚÐṚ</text:p>
          </table:table-cell>
          <table:table-cell office:value-type="string">
            <text:p>grind</text:p>
          </table:table-cell>
          <table:table-cell office:value-type="string">
            <text:p>QL/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number-columns-repeated="2"/>
          <table:table-cell office:value-type="string">
            <text:p>MṚKṚ</text:p>
          </table:table-cell>
          <table:table-cell office:value-type="string">
            <text:p>*juice</text:p>
          </table:table-cell>
          <table:table-cell office:value-type="string">
            <text:p>QL/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18">
            <text:p>518</text:p>
          </table:table-cell>
          <table:table-cell table:number-columns-repeated="2"/>
          <table:table-cell office:value-type="string">
            <text:p>MUKU</text:p>
          </table:table-cell>
          <table:table-cell office:value-type="string">
            <text:p>cacare [defecate]</text:p>
          </table:table-cell>
          <table:table-cell office:value-type="string">
            <text:p>QL/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19">
            <text:p>519</text:p>
          </table:table-cell>
          <table:table-cell table:number-columns-repeated="2"/>
          <table:table-cell office:value-type="string">
            <text:p>MULU</text:p>
          </table:table-cell>
          <table:table-cell office:value-type="string">
            <text:p>grind (fine)</text:p>
          </table:table-cell>
          <table:table-cell office:value-type="string">
            <text:p>QL/63</text:p>
          </table:table-cell>
          <table:table-cell office:value-type="string">
            <text:p>Q. mulo</text:p>
          </table:table-cell>
          <table:table-cell office:value-type="string">
            <text:p>dust</text:p>
          </table:table-cell>
          <table:table-cell office:value-type="string">
            <text:p>PE21/10</text:p>
          </table:table-cell>
          <table:table-cell office:value-type="string">
            <text:p>Q. mule</text:p>
          </table:table-cell>
          <table:table-cell office:value-type="string">
            <text:p>flour</text:p>
          </table:table-cell>
          <table:table-cell office:value-type="string">
            <text:p>PE17/115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table:number-columns-repeated="5"/>
          <table:table-cell office:value-type="string">
            <text:p>MUN</text:p>
          </table:table-cell>
          <table:table-cell office:value-type="string">
            <text:p>groan, moan</text:p>
          </table:table-cell>
          <table:table-cell office:value-type="string">
            <text:p>PE22/103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table:number-columns-repeated="2"/>
          <table:table-cell office:value-type="string">
            <text:p>MURU</text:p>
          </table:table-cell>
          <table:table-cell office:value-type="string">
            <text:p>slumber</text:p>
          </table:table-cell>
          <table:table-cell office:value-type="string">
            <text:p>QL/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22">
            <text:p>522</text:p>
          </table:table-cell>
          <table:table-cell table:number-columns-repeated="5"/>
          <table:table-cell office:value-type="string">
            <text:p>MUY</text:p>
          </table:table-cell>
          <table:table-cell office:value-type="string">
            <text:p>secret</text:p>
          </table:table-cell>
          <table:table-cell office:value-type="string">
            <text:p>Ety/MUY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Q. anta-</text:p>
          </table:table-cell>
          <table:table-cell office:value-type="string">
            <text:p>give</text:p>
          </table:table-cell>
          <table:table-cell office:value-type="string">
            <text:p>ANA</text:p>
          </table:table-cell>
          <table:table-cell office:value-type="string">
            <text:p>give, send towards</text:p>
          </table:table-cell>
          <table:table-cell office:value-type="string">
            <text:p>QL/31</text:p>
          </table:table-cell>
          <table:table-cell office:value-type="string">
            <text:p>NĀ¹/ANA¹</text:p>
          </table:table-cell>
          <table:table-cell/>
          <table:table-cell office:value-type="string">
            <text:p>Ety/ANA¹, NĀ¹</text:p>
          </table:table-cell>
          <table:table-cell office:value-type="string">
            <text:p>NA/ANA</text:p>
          </table:table-cell>
          <table:table-cell office:value-type="string">
            <text:p>to, towards</text:p>
          </table:table-cell>
          <table:table-cell office:value-type="string">
            <text:p>VT48/25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Q. ná-</text:p>
          </table:table-cell>
          <table:table-cell office:value-type="string">
            <text:p>be</text:p>
          </table:table-cell>
          <table:table-cell office:value-type="string">
            <text:p>NĀ</text:p>
          </table:table-cell>
          <table:table-cell office:value-type="string">
            <text:p>be, exist</text:p>
          </table:table-cell>
          <table:table-cell office:value-type="string">
            <text:p>QL/64</text:p>
          </table:table-cell>
          <table:table-cell office:value-type="string">
            <text:p>NĀ²/ANA²</text:p>
          </table:table-cell>
          <table:table-cell office:value-type="string">
            <text:p>be, exist</text:p>
          </table:table-cell>
          <table:table-cell office:value-type="string">
            <text:p>Ety/ANA², NĀ²</text:p>
          </table:table-cell>
          <table:table-cell office:value-type="string">
            <text:p>NĀ</text:p>
          </table:table-cell>
          <table:table-cell office:value-type="string">
            <text:p>to be, exist</text:p>
          </table:table-cell>
          <table:table-cell office:value-type="string">
            <text:p>PE17/9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S. nand</text:p>
          </table:table-cell>
          <table:table-cell office:value-type="string">
            <text:p>valley</text:p>
          </table:table-cell>
          <table:table-cell office:value-type="string">
            <text:p>NAŘA</text:p>
          </table:table-cell>
          <table:table-cell office:value-type="string">
            <text:p>*plain</text:p>
          </table:table-cell>
          <table:table-cell office:value-type="string">
            <text:p>QL/64</text:p>
          </table:table-cell>
          <table:table-cell office:value-type="string">
            <text:p>NAD</text:p>
          </table:table-cell>
          <table:table-cell office:value-type="string">
            <text:p>*plain, valley</text:p>
          </table:table-cell>
          <table:table-cell office:value-type="string">
            <text:p>Ety/NAD</text:p>
          </table:table-cell>
          <table:table-cell office:value-type="string">
            <text:p>NAD</text:p>
          </table:table-cell>
          <table:table-cell office:value-type="string">
            <text:p>hollow (of structures)</text:p>
          </table:table-cell>
          <table:table-cell office:value-type="string">
            <text:p>NM/35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26">
            <text:p>526</text:p>
          </table:table-cell>
          <table:table-cell table:number-columns-repeated="2"/>
          <table:table-cell office:value-type="string">
            <text:p>NAKA</text:p>
          </table:table-cell>
          <table:table-cell office:value-type="string">
            <text:p>bite</text:p>
          </table:table-cell>
          <table:table-cell office:value-type="string">
            <text:p>QL/64</text:p>
          </table:table-cell>
          <table:table-cell office:value-type="string">
            <text:p>NAK</text:p>
          </table:table-cell>
          <table:table-cell office:value-type="string">
            <text:p>bite</text:p>
          </table:table-cell>
          <table:table-cell office:value-type="string">
            <text:p>Ety/NAK</text:p>
          </table:table-cell>
          <table:table-cell office:value-type="string">
            <text:p>NAK</text:p>
          </table:table-cell>
          <table:table-cell office:value-type="string">
            <text:p>bite</text:p>
          </table:table-cell>
          <table:table-cell office:value-type="string">
            <text:p>PE18/8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table:number-columns-repeated="5"/>
          <table:table-cell office:value-type="string">
            <text:p>NAKAT</text:p>
          </table:table-cell>
          <table:table-cell office:value-type="string">
            <text:p>eighteen</text:p>
          </table:table-cell>
          <table:table-cell office:value-type="string">
            <text:p>PE14/17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table:number-columns-repeated="8"/>
          <table:table-cell office:value-type="string">
            <text:p>NAKH</text:p>
          </table:table-cell>
          <table:table-cell office:value-type="string">
            <text:p>narrow, thin</text:p>
          </table:table-cell>
          <table:table-cell office:value-type="string">
            <text:p>PE17/16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table:number-columns-repeated="2"/>
          <table:table-cell office:value-type="string">
            <text:p>NALA</text:p>
          </table:table-cell>
          <table:table-cell office:value-type="string">
            <text:p>ring, play</text:p>
          </table:table-cell>
          <table:table-cell office:value-type="string">
            <text:p>QL/6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30">
            <text:p>530</text:p>
          </table:table-cell>
          <table:table-cell table:number-columns-repeated="5"/>
          <table:table-cell office:value-type="string">
            <text:p>NAN</text:p>
          </table:table-cell>
          <table:table-cell office:value-type="string">
            <text:p>*mother</text:p>
          </table:table-cell>
          <table:table-cell office:value-type="string">
            <text:p>Ety/NA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table:number-columns-repeated="2"/>
          <table:table-cell office:value-type="string">
            <text:p>NAPA</text:p>
          </table:table-cell>
          <table:table-cell office:value-type="string">
            <text:p>*seize</text:p>
          </table:table-cell>
          <table:table-cell office:value-type="string">
            <text:p>QL/64</text:p>
          </table:table-cell>
          <table:table-cell table:number-columns-repeated="3"/>
          <table:table-cell office:value-type="string">
            <text:p>NAP</text:p>
          </table:table-cell>
          <table:table-cell office:value-type="string">
            <text:p>grasp, seize quickly</text:p>
          </table:table-cell>
          <table:table-cell office:value-type="string">
            <text:p>VT47/20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table:number-columns-repeated="2"/>
          <table:table-cell office:value-type="string">
            <text:p>NAQA</text:p>
          </table:table-cell>
          <table:table-cell office:value-type="string">
            <text:p>steal, take</text:p>
          </table:table-cell>
          <table:table-cell office:value-type="string">
            <text:p>QL/6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table:number-columns-repeated="8"/>
          <table:table-cell office:value-type="string">
            <text:p>ÑAR</text:p>
          </table:table-cell>
          <table:table-cell office:value-type="string">
            <text:p>by</text:p>
          </table:table-cell>
          <table:table-cell office:value-type="string">
            <text:p>PE17/16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Q. Anar</text:p>
          </table:table-cell>
          <table:table-cell office:value-type="string">
            <text:p>Sun</text:p>
          </table:table-cell>
          <table:table-cell table:number-columns-repeated="3"/>
          <table:table-cell office:value-type="string">
            <text:p>NAR¹</text:p>
          </table:table-cell>
          <table:table-cell office:value-type="string">
            <text:p>flame, fire</text:p>
          </table:table-cell>
          <table:table-cell office:value-type="string">
            <text:p>Ety/NAR¹</text:p>
          </table:table-cell>
          <table:table-cell office:value-type="string">
            <text:p>NAR</text:p>
          </table:table-cell>
          <table:table-cell office:value-type="string">
            <text:p>fire</text:p>
          </table:table-cell>
          <table:table-cell office:value-type="string">
            <text:p>Let/42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35">
            <text:p>535</text:p>
          </table:table-cell>
          <table:table-cell table:number-columns-repeated="2"/>
          <table:table-cell office:value-type="string">
            <text:p>ŊARA</text:p>
          </table:table-cell>
          <table:table-cell office:value-type="string">
            <text:p>bite at</text:p>
          </table:table-cell>
          <table:table-cell office:value-type="string">
            <text:p>QL/64</text:p>
          </table:table-cell>
          <table:table-cell office:value-type="string">
            <text:p>NARAK</text:p>
          </table:table-cell>
          <table:table-cell office:value-type="string">
            <text:p>tear, rend</text:p>
          </table:table-cell>
          <table:table-cell office:value-type="string">
            <text:p>Ety/NÁRAK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36">
            <text:p>536</text:p>
          </table:table-cell>
          <table:table-cell table:number-columns-repeated="5"/>
          <table:table-cell office:value-type="string">
            <text:p>NARTA</text:p>
          </table:table-cell>
          <table:table-cell office:value-type="string">
            <text:p>kindle</text:p>
          </table:table-cell>
          <table:table-cell office:value-type="string">
            <text:p>EtyAC/NARTA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37">
            <text:p>537</text:p>
          </table:table-cell>
          <table:table-cell table:number-columns-repeated="5"/>
          <table:table-cell office:value-type="string">
            <text:p>NAS</text:p>
          </table:table-cell>
          <table:table-cell office:value-type="string">
            <text:p>point, sharp end</text:p>
          </table:table-cell>
          <table:table-cell office:value-type="string">
            <text:p>Ety/NA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table:number-columns-repeated="2"/>
          <table:table-cell office:value-type="string">
            <text:p>NASA</text:p>
          </table:table-cell>
          <table:table-cell office:value-type="string">
            <text:p>taste nasty</text:p>
          </table:table-cell>
          <table:table-cell office:value-type="string">
            <text:p>QL/6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table:number-columns-repeated="8"/>
          <table:table-cell office:value-type="string">
            <text:p>NASAG</text:p>
          </table:table-cell>
          <table:table-cell office:value-type="string">
            <text:p>*bond, fetter</text:p>
          </table:table-cell>
          <table:table-cell office:value-type="string">
            <text:p>PE19/10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40">
            <text:p>540</text:p>
          </table:table-cell>
          <table:table-cell table:number-columns-repeated="5"/>
          <table:table-cell office:value-type="string">
            <text:p>NAT</text:p>
          </table:table-cell>
          <table:table-cell office:value-type="string">
            <text:p>lace, weave, tie</text:p>
          </table:table-cell>
          <table:table-cell office:value-type="string">
            <text:p>Ety/NA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table:number-columns-repeated="8"/>
          <table:table-cell office:value-type="string">
            <text:p>NATH</text:p>
          </table:table-cell>
          <table:table-cell office:value-type="string">
            <text:p>welcome, be kind to</text:p>
          </table:table-cell>
          <table:table-cell office:value-type="string">
            <text:p>PE17/14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42">
            <text:p>542</text:p>
          </table:table-cell>
          <table:table-cell table:number-columns-repeated="2"/>
          <table:table-cell office:value-type="string">
            <text:p>NAẎA/ŊAH͡YA</text:p>
          </table:table-cell>
          <table:table-cell office:value-type="string">
            <text:p>hurt, grieve</text:p>
          </table:table-cell>
          <table:table-cell office:value-type="string">
            <text:p>QL/65</text:p>
          </table:table-cell>
          <table:table-cell office:value-type="string">
            <text:p>NAY</text:p>
          </table:table-cell>
          <table:table-cell office:value-type="string">
            <text:p>lament</text:p>
          </table:table-cell>
          <table:table-cell office:value-type="string">
            <text:p>Ety/NAY</text:p>
          </table:table-cell>
          <table:table-cell office:value-type="string">
            <text:p>NAY</text:p>
          </table:table-cell>
          <table:table-cell office:value-type="string">
            <text:p>cause bitter grief</text:p>
          </table:table-cell>
          <table:table-cell/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table:number-columns-repeated="8"/>
          <table:table-cell office:value-type="string">
            <text:p>NAY</text:p>
          </table:table-cell>
          <table:table-cell office:value-type="string">
            <text:p>have chance</text:p>
          </table:table-cell>
          <table:table-cell office:value-type="string">
            <text:p>PE22/15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44">
            <text:p>544</text:p>
          </table:table-cell>
          <table:table-cell table:number-columns-repeated="5"/>
          <table:table-cell office:value-type="string">
            <text:p>NAYAK</text:p>
          </table:table-cell>
          <table:table-cell office:value-type="string">
            <text:p>pain</text:p>
          </table:table-cell>
          <table:table-cell office:value-type="string">
            <text:p>Ety/NÁYA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table:number-columns-repeated="8"/>
          <table:table-cell office:value-type="string">
            <text:p>NDAB</text:p>
          </table:table-cell>
          <table:table-cell office:value-type="string">
            <text:p>judge</text:p>
          </table:table-cell>
          <table:table-cell office:value-type="string">
            <text:p>PE22/15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S. dag-</text:p>
          </table:table-cell>
          <table:table-cell office:value-type="string">
            <text:p>slay</text:p>
          </table:table-cell>
          <table:table-cell office:value-type="string">
            <text:p>DAG</text:p>
          </table:table-cell>
          <table:table-cell office:value-type="string">
            <text:p>slay</text:p>
          </table:table-cell>
          <table:table-cell office:value-type="string">
            <text:p>PE14/65</text:p>
          </table:table-cell>
          <table:table-cell office:value-type="string">
            <text:p>NDAK</text:p>
          </table:table-cell>
          <table:table-cell office:value-type="string">
            <text:p>slay</text:p>
          </table:table-cell>
          <table:table-cell office:value-type="string">
            <text:p>Ety/NDAK</text:p>
          </table:table-cell>
          <table:table-cell office:value-type="string">
            <text:p>NDAK</text:p>
          </table:table-cell>
          <table:table-cell office:value-type="string">
            <text:p>hew</text:p>
          </table:table-cell>
          <table:table-cell office:value-type="string">
            <text:p>PE22/156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47">
            <text:p>547</text:p>
          </table:table-cell>
          <table:table-cell table:number-columns-repeated="5"/>
          <table:table-cell office:value-type="string">
            <text:p>NDAM</text:p>
          </table:table-cell>
          <table:table-cell office:value-type="string">
            <text:p>hammer, beat</text:p>
          </table:table-cell>
          <table:table-cell office:value-type="string">
            <text:p>Ety/NDAM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48">
            <text:p>548</text:p>
          </table:table-cell>
          <table:table-cell table:number-columns-repeated="5"/>
          <table:table-cell office:value-type="string">
            <text:p>(N)DAN</text:p>
          </table:table-cell>
          <table:table-cell office:value-type="string">
            <text:p>back</text:p>
          </table:table-cell>
          <table:table-cell office:value-type="string">
            <text:p>Ety/DAN, NDAN</text:p>
          </table:table-cell>
          <table:table-cell office:value-type="string">
            <text:p>(N)DAN</text:p>
          </table:table-cell>
          <table:table-cell office:value-type="string">
            <text:p>back</text:p>
          </table:table-cell>
          <table:table-cell office:value-type="string">
            <text:p>PE17/166; WJ/41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table:number-columns-repeated="8"/>
          <table:table-cell office:value-type="string">
            <text:p>NDAY</text:p>
          </table:table-cell>
          <table:table-cell office:value-type="string">
            <text:p>dreadful, abominable</text:p>
          </table:table-cell>
          <table:table-cell office:value-type="string">
            <text:p>PE17/15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table:number-columns-repeated="8"/>
          <table:table-cell office:value-type="string">
            <text:p>NDEB/NDAB</text:p>
          </table:table-cell>
          <table:table-cell office:value-type="string">
            <text:p>try, endeavor</text:p>
          </table:table-cell>
          <table:table-cell office:value-type="string">
            <text:p>PE17/167; PE22/15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Q. nér</text:p>
          </table:table-cell>
          <table:table-cell office:value-type="string">
            <text:p>man</text:p>
          </table:table-cell>
          <table:table-cell office:value-type="string">
            <text:p>NERE</text:p>
          </table:table-cell>
          <table:table-cell office:value-type="string">
            <text:p>*man</text:p>
          </table:table-cell>
          <table:table-cell office:value-type="string">
            <text:p>QL/65</text:p>
          </table:table-cell>
          <table:table-cell office:value-type="string">
            <text:p>(N)DER</text:p>
          </table:table-cell>
          <table:table-cell office:value-type="string">
            <text:p>adult male</text:p>
          </table:table-cell>
          <table:table-cell office:value-type="string">
            <text:p>Ety/DER, NDER</text:p>
          </table:table-cell>
          <table:table-cell office:value-type="string">
            <text:p>N(D)ER</text:p>
          </table:table-cell>
          <table:table-cell office:value-type="string">
            <text:p>male person</text:p>
          </table:table-cell>
          <table:table-cell office:value-type="string">
            <text:p>PE21/70; VT47/3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52">
            <text:p>552</text:p>
          </table:table-cell>
          <table:table-cell table:number-columns-repeated="5"/>
          <table:table-cell office:value-type="string">
            <text:p>NDEW</text:p>
          </table:table-cell>
          <table:table-cell office:value-type="string">
            <text:p>follow, come behind</text:p>
          </table:table-cell>
          <table:table-cell office:value-type="string">
            <text:p>Ety/NDEW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53">
            <text:p>553</text:p>
          </table:table-cell>
          <table:table-cell table:number-columns-repeated="5"/>
          <table:table-cell office:value-type="string">
            <text:p>NDI/NI</text:p>
          </table:table-cell>
          <table:table-cell office:value-type="string">
            <text:p>in</text:p>
          </table:table-cell>
          <table:table-cell office:value-type="string">
            <text:p>EtyAC/NDI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Q. -ndil</text:p>
          </table:table-cell>
          <table:table-cell office:value-type="string">
            <text:p>friend</text:p>
          </table:table-cell>
          <table:table-cell table:number-columns-repeated="3"/>
          <table:table-cell office:value-type="string">
            <text:p>(N)DIL</text:p>
          </table:table-cell>
          <table:table-cell office:value-type="string">
            <text:p>friend</text:p>
          </table:table-cell>
          <table:table-cell office:value-type="string">
            <text:p>Ety/NIL</text:p>
          </table:table-cell>
          <table:table-cell office:value-type="string">
            <text:p>(N)DIL</text:p>
          </table:table-cell>
          <table:table-cell office:value-type="string">
            <text:p>love, be devoted to</text:p>
          </table:table-cell>
          <table:table-cell office:value-type="string">
            <text:p>Let/38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table:number-columns-repeated="8"/>
          <table:table-cell office:value-type="string">
            <text:p>(N)DIP/B</text:p>
          </table:table-cell>
          <table:table-cell office:value-type="string">
            <text:p>bending and drooping</text:p>
          </table:table-cell>
          <table:table-cell office:value-type="string">
            <text:p>PE17/167-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56">
            <text:p>556</text:p>
          </table:table-cell>
          <table:table-cell table:number-columns-repeated="5"/>
          <table:table-cell office:value-type="string">
            <text:p>NDIS</text:p>
          </table:table-cell>
          <table:table-cell office:value-type="string">
            <text:p>bride</text:p>
          </table:table-cell>
          <table:table-cell office:value-type="string">
            <text:p>Ety/NDIS</text:p>
          </table:table-cell>
          <table:table-cell office:value-type="string">
            <text:p>Q. indis</text:p>
          </table:table-cell>
          <table:table-cell office:value-type="string">
            <text:p>wife</text:p>
          </table:table-cell>
          <table:table-cell office:value-type="string">
            <text:p>UT/8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S. dol</text:p>
          </table:table-cell>
          <table:table-cell office:value-type="string">
            <text:p>head, hill</text:p>
          </table:table-cell>
          <table:table-cell office:value-type="string">
            <text:p>NOHO</text:p>
          </table:table-cell>
          <table:table-cell office:value-type="string">
            <text:p>extended</text:p>
          </table:table-cell>
          <table:table-cell office:value-type="string">
            <text:p>QL/67</text:p>
          </table:table-cell>
          <table:table-cell office:value-type="string">
            <text:p>NDOL</text:p>
          </table:table-cell>
          <table:table-cell office:value-type="string">
            <text:p>*head</text:p>
          </table:table-cell>
          <table:table-cell office:value-type="string">
            <text:p>Ety/NDOL</text:p>
          </table:table-cell>
          <table:table-cell office:value-type="string">
            <text:p>S. dol</text:p>
          </table:table-cell>
          <table:table-cell office:value-type="string">
            <text:p>head, hill</text:p>
          </table:table-cell>
          <table:table-cell office:value-type="string">
            <text:p>RC/433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table:number-columns-repeated="2"/>
          <table:table-cell office:value-type="string">
            <text:p>NDOLO</text:p>
          </table:table-cell>
          <table:table-cell office:value-type="string">
            <text:p>delve</text:p>
          </table:table-cell>
          <table:table-cell office:value-type="string">
            <text:p>QL/6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S./N. dôr</text:p>
          </table:table-cell>
          <table:table-cell office:value-type="string">
            <text:p>land</text:p>
          </table:table-cell>
          <table:table-cell table:number-columns-repeated="3"/>
          <table:table-cell office:value-type="string">
            <text:p>NDOR</text:p>
          </table:table-cell>
          <table:table-cell office:value-type="string">
            <text:p>dwell, stay</text:p>
          </table:table-cell>
          <table:table-cell office:value-type="string">
            <text:p>Ety/NDOR</text:p>
          </table:table-cell>
          <table:table-cell office:value-type="string">
            <text:p>NDOR</text:p>
          </table:table-cell>
          <table:table-cell office:value-type="string">
            <text:p>land; hard, firm</text:p>
          </table:table-cell>
          <table:table-cell office:value-type="string">
            <text:p>PE17/26, 106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Q. andúne</text:p>
          </table:table-cell>
          <table:table-cell office:value-type="string">
            <text:p>sunset</text:p>
          </table:table-cell>
          <table:table-cell table:number-columns-repeated="3"/>
          <table:table-cell office:value-type="string">
            <text:p>NDŪ</text:p>
          </table:table-cell>
          <table:table-cell office:value-type="string">
            <text:p>go down, sink, set</text:p>
          </table:table-cell>
          <table:table-cell office:value-type="string">
            <text:p>Ety/NDŪ</text:p>
          </table:table-cell>
          <table:table-cell office:value-type="string">
            <text:p>NDŪ</text:p>
          </table:table-cell>
          <table:table-cell office:value-type="string">
            <text:p>sink, go down</text:p>
          </table:table-cell>
          <table:table-cell office:value-type="string">
            <text:p>PE17/6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table:number-columns-repeated="8"/>
          <table:table-cell office:value-type="string">
            <text:p>(N)DUP/B</text:p>
          </table:table-cell>
          <table:table-cell office:value-type="string">
            <text:p>bending and drooping</text:p>
          </table:table-cell>
          <table:table-cell office:value-type="string">
            <text:p>PE17/167-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62">
            <text:p>562</text:p>
          </table:table-cell>
          <table:table-cell table:number-columns-repeated="5"/>
          <table:table-cell office:value-type="string">
            <text:p>(N)DUL</text:p>
          </table:table-cell>
          <table:table-cell office:value-type="string">
            <text:p>hide, conceal</text:p>
          </table:table-cell>
          <table:table-cell office:value-type="string">
            <text:p>Ety/DUL, NDU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63">
            <text:p>563</text:p>
          </table:table-cell>
          <table:table-cell table:number-columns-repeated="5"/>
          <table:table-cell office:value-type="string">
            <text:p>NDUR</text:p>
          </table:table-cell>
          <table:table-cell office:value-type="string">
            <text:p>bow down, serve</text:p>
          </table:table-cell>
          <table:table-cell office:value-type="string">
            <text:p>Ety/NDŪ</text:p>
          </table:table-cell>
          <table:table-cell office:value-type="string">
            <text:p>NDUR</text:p>
          </table:table-cell>
          <table:table-cell office:value-type="string">
            <text:p>love, feeling of special concern</text:p>
          </table:table-cell>
          <table:table-cell office:value-type="string">
            <text:p>NM/2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Q. ni</text:p>
          </table:table-cell>
          <table:table-cell office:value-type="string">
            <text:p>I, me</text:p>
          </table:table-cell>
          <table:table-cell office:value-type="string">
            <text:p>Q. ni</text:p>
          </table:table-cell>
          <table:table-cell office:value-type="string">
            <text:p>I</text:p>
          </table:table-cell>
          <table:table-cell office:value-type="string">
            <text:p>PE14/52</text:p>
          </table:table-cell>
          <table:table-cell office:value-type="string">
            <text:p>NĪ²</text:p>
          </table:table-cell>
          <table:table-cell office:value-type="string">
            <text:p>I</text:p>
          </table:table-cell>
          <table:table-cell office:value-type="string">
            <text:p>Ety/NĪ²</text:p>
          </table:table-cell>
          <table:table-cell office:value-type="string">
            <text:p>NI</text:p>
          </table:table-cell>
          <table:table-cell office:value-type="string">
            <text:p>me</text:p>
          </table:table-cell>
          <table:table-cell office:value-type="string">
            <text:p>PE17/6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65">
            <text:p>565</text:p>
          </table:table-cell>
          <table:table-cell table:number-columns-repeated="5"/>
          <table:table-cell office:value-type="string">
            <text:p>NIB</text:p>
          </table:table-cell>
          <table:table-cell office:value-type="string">
            <text:p>face, front</text:p>
          </table:table-cell>
          <table:table-cell office:value-type="string">
            <text:p>Ety/NIB</text:p>
          </table:table-cell>
          <table:table-cell office:value-type="string">
            <text:p>NEB</text:p>
          </table:table-cell>
          <table:table-cell office:value-type="string">
            <text:p>turn towards (speaker)</text:p>
          </table:table-cell>
          <table:table-cell office:value-type="string">
            <text:p>PE17/27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table:number-columns-repeated="8"/>
          <table:table-cell office:value-type="string">
            <text:p>NE</text:p>
          </table:table-cell>
          <table:table-cell office:value-type="string">
            <text:p>scent</text:p>
          </table:table-cell>
          <table:table-cell office:value-type="string">
            <text:p>PE17/10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Q. nehte</text:p>
          </table:table-cell>
          <table:table-cell office:value-type="string">
            <text:p>honey</text:p>
          </table:table-cell>
          <table:table-cell office:value-type="string">
            <text:p>NEHE</text:p>
          </table:table-cell>
          <table:table-cell office:value-type="string">
            <text:p>*honey</text:p>
          </table:table-cell>
          <table:table-cell office:value-type="string">
            <text:p>QL/65</text:p>
          </table:table-cell>
          <table:table-cell office:value-type="string">
            <text:p>NEG</text:p>
          </table:table-cell>
          <table:table-cell office:value-type="string">
            <text:p>*honey</text:p>
          </table:table-cell>
          <table:table-cell office:value-type="string">
            <text:p>EtyAC/NEG</text:p>
          </table:table-cell>
          <table:table-cell office:value-type="string">
            <text:p>NEG</text:p>
          </table:table-cell>
          <table:table-cell office:value-type="string">
            <text:p>ooze, drip</text:p>
          </table:table-cell>
          <table:table-cell office:value-type="string">
            <text:p>PE19/9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table:number-columns-repeated="8"/>
          <table:table-cell office:value-type="string">
            <text:p>NEK</text:p>
          </table:table-cell>
          <table:table-cell office:value-type="string">
            <text:p>narrow</text:p>
          </table:table-cell>
          <table:table-cell office:value-type="string">
            <text:p>UT/28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table:number-columns-repeated="8"/>
          <table:table-cell office:value-type="string">
            <text:p>NEK</text:p>
          </table:table-cell>
          <table:table-cell office:value-type="string">
            <text:p>divide, separate</text:p>
          </table:table-cell>
          <table:table-cell office:value-type="string">
            <text:p>VT47/1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Q. nelde</text:p>
          </table:table-cell>
          <table:table-cell office:value-type="string">
            <text:p>three</text:p>
          </table:table-cell>
          <table:table-cell office:value-type="string">
            <text:p>NELE</text:p>
          </table:table-cell>
          <table:table-cell office:value-type="string">
            <text:p>point</text:p>
          </table:table-cell>
          <table:table-cell office:value-type="string">
            <text:p>QL/65</text:p>
          </table:table-cell>
          <table:table-cell office:value-type="string">
            <text:p>NEL(ED)</text:p>
          </table:table-cell>
          <table:table-cell office:value-type="string">
            <text:p>three</text:p>
          </table:table-cell>
          <table:table-cell office:value-type="string">
            <text:p>Ety/NEL</text:p>
          </table:table-cell>
          <table:table-cell office:value-type="string">
            <text:p>NEL(ED)</text:p>
          </table:table-cell>
          <table:table-cell office:value-type="string">
            <text:p>three</text:p>
          </table:table-cell>
          <table:table-cell office:value-type="string">
            <text:p>VT47/10-1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71">
            <text:p>571</text:p>
          </table:table-cell>
          <table:table-cell table:number-columns-repeated="5"/>
          <table:table-cell office:value-type="string">
            <text:p>NEL-EK</text:p>
          </table:table-cell>
          <table:table-cell office:value-type="string">
            <text:p>tooth</text:p>
          </table:table-cell>
          <table:table-cell office:value-type="string">
            <text:p>Ety/NÉL-EK</text:p>
          </table:table-cell>
          <table:table-cell office:value-type="string">
            <text:p>NELEK</text:p>
          </table:table-cell>
          <table:table-cell office:value-type="string">
            <text:p>tooth</text:p>
          </table:table-cell>
          <table:table-cell office:value-type="string">
            <text:p>PE21/7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table:number-columns-repeated="2"/>
          <table:table-cell office:value-type="string">
            <text:p>NEME</text:p>
          </table:table-cell>
          <table:table-cell office:value-type="string">
            <text:p>*sew</text:p>
          </table:table-cell>
          <table:table-cell office:value-type="string">
            <text:p>QL/6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Q. nén</text:p>
          </table:table-cell>
          <table:table-cell office:value-type="string">
            <text:p>water</text:p>
          </table:table-cell>
          <table:table-cell office:value-type="string">
            <text:p>NENE</text:p>
          </table:table-cell>
          <table:table-cell office:value-type="string">
            <text:p>flow</text:p>
          </table:table-cell>
          <table:table-cell office:value-type="string">
            <text:p>QL/65</text:p>
          </table:table-cell>
          <table:table-cell office:value-type="string">
            <text:p>NEN</text:p>
          </table:table-cell>
          <table:table-cell office:value-type="string">
            <text:p>*water</text:p>
          </table:table-cell>
          <table:table-cell office:value-type="string">
            <text:p>Ety/NEN</text:p>
          </table:table-cell>
          <table:table-cell office:value-type="string">
            <text:p>NEN</text:p>
          </table:table-cell>
          <table:table-cell office:value-type="string">
            <text:p>water</text:p>
          </table:table-cell>
          <table:table-cell office:value-type="string">
            <text:p>PE17/5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74">
            <text:p>574</text:p>
          </table:table-cell>
          <table:table-cell table:number-columns-repeated="2"/>
          <table:table-cell office:value-type="string">
            <text:p>MEME</text:p>
          </table:table-cell>
          <table:table-cell office:value-type="string">
            <text:p>*tip</text:p>
          </table:table-cell>
          <table:table-cell office:value-type="string">
            <text:p>QL/61</text:p>
          </table:table-cell>
          <table:table-cell office:value-type="string">
            <text:p>NEÑ-WI</text:p>
          </table:table-cell>
          <table:table-cell office:value-type="string">
            <text:p>*nose</text:p>
          </table:table-cell>
          <table:table-cell office:value-type="string">
            <text:p>Ety/NEÑ-WI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table:number-columns-repeated="2"/>
          <table:table-cell office:value-type="string">
            <text:p>NEŘE</text:p>
          </table:table-cell>
          <table:table-cell office:value-type="string">
            <text:p>*river</text:p>
          </table:table-cell>
          <table:table-cell office:value-type="string">
            <text:p>QL/6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table:number-columns-repeated="2"/>
          <table:table-cell office:value-type="string">
            <text:p>NESE</text:p>
          </table:table-cell>
          <table:table-cell office:value-type="string">
            <text:p>feed, pasture</text:p>
          </table:table-cell>
          <table:table-cell office:value-type="string">
            <text:p>QL/6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table:number-columns-repeated="8"/>
          <table:table-cell office:value-type="string">
            <text:p>NET</text:p>
          </table:table-cell>
          <table:table-cell office:value-type="string">
            <text:p>trim, pretty, dainty</text:p>
          </table:table-cell>
          <table:table-cell office:value-type="string">
            <text:p>VT47/3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table:number-columns-repeated="2"/>
          <table:table-cell office:value-type="string">
            <text:p>NETE/ŊETE</text:p>
          </table:table-cell>
          <table:table-cell office:value-type="string">
            <text:p>catch, get</text:p>
          </table:table-cell>
          <table:table-cell office:value-type="string">
            <text:p>QL/6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79">
            <text:p>579</text:p>
          </table:table-cell>
          <table:table-cell office:value-type="string">
            <text:p>Q. nerte</text:p>
          </table:table-cell>
          <table:table-cell office:value-type="string">
            <text:p>nine</text:p>
          </table:table-cell>
          <table:table-cell table:number-columns-repeated="3"/>
          <table:table-cell office:value-type="string">
            <text:p>NETER</text:p>
          </table:table-cell>
          <table:table-cell office:value-type="string">
            <text:p>nine</text:p>
          </table:table-cell>
          <table:table-cell office:value-type="string">
            <text:p>Ety/NÉTER</text:p>
          </table:table-cell>
          <table:table-cell office:value-type="string">
            <text:p>NETER</text:p>
          </table:table-cell>
          <table:table-cell office:value-type="string">
            <text:p>nine</text:p>
          </table:table-cell>
          <table:table-cell office:value-type="string">
            <text:p>VT47/1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80">
            <text:p>580</text:p>
          </table:table-cell>
          <table:table-cell table:number-columns-repeated="5"/>
          <table:table-cell office:value-type="string">
            <text:p>NETH</text:p>
          </table:table-cell>
          <table:table-cell office:value-type="string">
            <text:p>young</text:p>
          </table:table-cell>
          <table:table-cell office:value-type="string">
            <text:p>Ety/NETH</text:p>
          </table:table-cell>
          <table:table-cell office:value-type="string">
            <text:p>NETH</text:p>
          </table:table-cell>
          <table:table-cell office:value-type="string">
            <text:p>sister; (young) woman</text:p>
          </table:table-cell>
          <table:table-cell office:value-type="string">
            <text:p>VT47/12, 32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Q. nie</text:p>
          </table:table-cell>
          <table:table-cell office:value-type="string">
            <text:p>tear</text:p>
          </table:table-cell>
          <table:table-cell office:value-type="string">
            <text:p>NYEHE</text:p>
          </table:table-cell>
          <table:table-cell office:value-type="string">
            <text:p>weep</text:p>
          </table:table-cell>
          <table:table-cell office:value-type="string">
            <text:p>QL/68</text:p>
          </table:table-cell>
          <table:table-cell office:value-type="string">
            <text:p>NEI</text:p>
          </table:table-cell>
          <table:table-cell office:value-type="string">
            <text:p>tear</text:p>
          </table:table-cell>
          <table:table-cell office:value-type="string">
            <text:p>Ety/NEI</text:p>
          </table:table-cell>
          <table:table-cell office:value-type="string">
            <text:p>Q. Nienor</text:p>
          </table:table-cell>
          <table:table-cell office:value-type="string">
            <text:p>Mourning</text:p>
          </table:table-cell>
          <table:table-cell office:value-type="string">
            <text:p>S/19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table:number-columns-repeated="8"/>
          <table:table-cell office:value-type="string">
            <text:p>ÑGAL</text:p>
          </table:table-cell>
          <table:table-cell office:value-type="string">
            <text:p>gleam, sheen</text:p>
          </table:table-cell>
          <table:table-cell office:value-type="string">
            <text:p>PE17/5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83">
            <text:p>583</text:p>
          </table:table-cell>
          <table:table-cell table:number-columns-repeated="2"/>
          <table:table-cell office:value-type="string">
            <text:p>KᴬNTᴬN</text:p>
          </table:table-cell>
          <table:table-cell office:value-type="string">
            <text:p>make twang; play harp</text:p>
          </table:table-cell>
          <table:table-cell office:value-type="string">
            <text:p>QL/45</text:p>
          </table:table-cell>
          <table:table-cell office:value-type="string">
            <text:p>ÑGAN(AD)</text:p>
          </table:table-cell>
          <table:table-cell office:value-type="string">
            <text:p>play (stringed instrument)</text:p>
          </table:table-cell>
          <table:table-cell office:value-type="string">
            <text:p>Ety/ÑGAN</text:p>
          </table:table-cell>
          <table:table-cell office:value-type="string">
            <text:p>Q. tant(il)a</text:p>
          </table:table-cell>
          <table:table-cell office:value-type="string">
            <text:p>harp</text:p>
          </table:table-cell>
          <table:table-cell office:value-type="string">
            <text:p>VT41/10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84">
            <text:p>584</text:p>
          </table:table-cell>
          <table:table-cell table:number-columns-repeated="5"/>
          <table:table-cell office:value-type="string">
            <text:p>ÑGAR(A)M</text:p>
          </table:table-cell>
          <table:table-cell office:value-type="string">
            <text:p>wolf</text:p>
          </table:table-cell>
          <table:table-cell office:value-type="string">
            <text:p>Ety/ÑGAR(A)M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85">
            <text:p>585</text:p>
          </table:table-cell>
          <table:table-cell office:value-type="string">
            <text:p>S. gaur</text:p>
          </table:table-cell>
          <table:table-cell office:value-type="string">
            <text:p>werewolf</text:p>
          </table:table-cell>
          <table:table-cell table:number-columns-repeated="3"/>
          <table:table-cell office:value-type="string">
            <text:p>ÑGAW</text:p>
          </table:table-cell>
          <table:table-cell office:value-type="string">
            <text:p>howl</text:p>
          </table:table-cell>
          <table:table-cell office:value-type="string">
            <text:p>Ety/ÑGAW</text:p>
          </table:table-cell>
          <table:table-cell office:value-type="string">
            <text:p>NGWAW</text:p>
          </table:table-cell>
          <table:table-cell office:value-type="string">
            <text:p>falsify, deform, disguise</text:p>
          </table:table-cell>
          <table:table-cell office:value-type="string">
            <text:p>PE17/39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table:number-columns-repeated="8"/>
          <table:table-cell office:value-type="string">
            <text:p>(Ñ)GAY</text:p>
          </table:table-cell>
          <table:table-cell office:value-type="string">
            <text:p>gape, open, vast</text:p>
          </table:table-cell>
          <table:table-cell office:value-type="string">
            <text:p>PE17/2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S. gil/gail</text:p>
          </table:table-cell>
          <table:table-cell office:value-type="string">
            <text:p>star</text:p>
          </table:table-cell>
          <table:table-cell office:value-type="string">
            <text:p>GIL</text:p>
          </table:table-cell>
          <table:table-cell office:value-type="string">
            <text:p>*shine (pale)</text:p>
          </table:table-cell>
          <table:table-cell office:value-type="string">
            <text:p>GL/38</text:p>
          </table:table-cell>
          <table:table-cell office:value-type="string">
            <text:p>GIL</text:p>
          </table:table-cell>
          <table:table-cell office:value-type="string">
            <text:p>shine (white or pale)</text:p>
          </table:table-cell>
          <table:table-cell office:value-type="string">
            <text:p>Ety/GIL</text:p>
          </table:table-cell>
          <table:table-cell office:value-type="string">
            <text:p>(Ñ)GIL</text:p>
          </table:table-cell>
          <table:table-cell office:value-type="string">
            <text:p>shine (white)</text:p>
          </table:table-cell>
          <table:table-cell office:value-type="string">
            <text:p>PE17/22, 15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Q. nólie</text:p>
          </table:table-cell>
          <table:table-cell office:value-type="string">
            <text:p>lore, wisdom</text:p>
          </table:table-cell>
          <table:table-cell office:value-type="string">
            <text:p>ŇOLO</text:p>
          </table:table-cell>
          <table:table-cell office:value-type="string">
            <text:p>know</text:p>
          </table:table-cell>
          <table:table-cell office:value-type="string">
            <text:p>QL/67</text:p>
          </table:table-cell>
          <table:table-cell office:value-type="string">
            <text:p>ÑGOL</text:p>
          </table:table-cell>
          <table:table-cell office:value-type="string">
            <text:p>wise, wisdom</text:p>
          </table:table-cell>
          <table:table-cell office:value-type="string">
            <text:p>Ety/ÑGOL</text:p>
          </table:table-cell>
          <table:table-cell office:value-type="string">
            <text:p>NGOL</text:p>
          </table:table-cell>
          <table:table-cell office:value-type="string">
            <text:p>knowledge, wisdom</text:p>
          </table:table-cell>
          <table:table-cell office:value-type="string">
            <text:p>WJ/38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table:number-columns-repeated="8"/>
          <table:table-cell office:value-type="string">
            <text:p>ÑGOL</text:p>
          </table:table-cell>
          <table:table-cell office:value-type="string">
            <text:p>dark-hued, dark-brown</text:p>
          </table:table-cell>
          <table:table-cell office:value-type="string">
            <text:p>PE17/12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Q. Noldo</text:p>
          </table:table-cell>
          <table:table-cell office:value-type="string">
            <text:p>Gnome</text:p>
          </table:table-cell>
          <table:table-cell office:value-type="string">
            <text:p>ŇOLDO</text:p>
          </table:table-cell>
          <table:table-cell office:value-type="string">
            <text:p>gnome</text:p>
          </table:table-cell>
          <table:table-cell office:value-type="string">
            <text:p>QL/67</text:p>
          </table:table-cell>
          <table:table-cell office:value-type="string">
            <text:p>ÑGOLOD</text:p>
          </table:table-cell>
          <table:table-cell office:value-type="string">
            <text:p>Gnome</text:p>
          </table:table-cell>
          <table:table-cell office:value-type="string">
            <text:p>Ety/ÑGOLOD</text:p>
          </table:table-cell>
          <table:table-cell office:value-type="string">
            <text:p>ŊGOLOD</text:p>
          </table:table-cell>
          <table:table-cell office:value-type="string">
            <text:p>*Gnome</text:p>
          </table:table-cell>
          <table:table-cell office:value-type="string">
            <text:p>PE18/8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S. goroth</text:p>
          </table:table-cell>
          <table:table-cell office:value-type="string">
            <text:p>horror, dread</text:p>
          </table:table-cell>
          <table:table-cell table:number-columns-repeated="3"/>
          <table:table-cell office:value-type="string">
            <text:p>ÑGOROTH</text:p>
          </table:table-cell>
          <table:table-cell office:value-type="string">
            <text:p>horror</text:p>
          </table:table-cell>
          <table:table-cell office:value-type="string">
            <text:p>Ety/ÑGOROTH</text:p>
          </table:table-cell>
          <table:table-cell office:value-type="string">
            <text:p>ÑGOR/NGUR</text:p>
          </table:table-cell>
          <table:table-cell office:value-type="string">
            <text:p>dread; horror</text:p>
          </table:table-cell>
          <table:table-cell office:value-type="string">
            <text:p>PE17/113; WJ/415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table:number-columns-repeated="8"/>
          <table:table-cell office:value-type="string">
            <text:p>ÑGUL</text:p>
          </table:table-cell>
          <table:table-cell office:value-type="string">
            <text:p>dark with sinister associations</text:p>
          </table:table-cell>
          <table:table-cell office:value-type="string">
            <text:p>PE17/12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S. gurth/N. guruth</text:p>
          </table:table-cell>
          <table:table-cell office:value-type="string">
            <text:p>death</text:p>
          </table:table-cell>
          <table:table-cell office:value-type="string">
            <text:p>GWṚÐR</text:p>
          </table:table-cell>
          <table:table-cell office:value-type="string">
            <text:p>die</text:p>
          </table:table-cell>
          <table:table-cell office:value-type="string">
            <text:p>QL/104</text:p>
          </table:table-cell>
          <table:table-cell office:value-type="string">
            <text:p>ÑGUR</text:p>
          </table:table-cell>
          <table:table-cell office:value-type="string">
            <text:p>*death</text:p>
          </table:table-cell>
          <table:table-cell office:value-type="string">
            <text:p>Ety/ÑGUR</text:p>
          </table:table-cell>
          <table:table-cell office:value-type="string">
            <text:p>ÑGUR</text:p>
          </table:table-cell>
          <table:table-cell office:value-type="string">
            <text:p>death</text:p>
          </table:table-cell>
          <table:table-cell office:value-type="string">
            <text:p>PE17/154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594">
            <text:p>594</text:p>
          </table:table-cell>
          <table:table-cell table:number-columns-repeated="5"/>
          <table:table-cell office:value-type="string">
            <text:p>ÑGWAL</text:p>
          </table:table-cell>
          <table:table-cell office:value-type="string">
            <text:p>torment</text:p>
          </table:table-cell>
          <table:table-cell office:value-type="string">
            <text:p>Ety/ÑGWAL</text:p>
          </table:table-cell>
          <table:table-cell office:value-type="string">
            <text:p>GWAL</text:p>
          </table:table-cell>
          <table:table-cell office:value-type="string">
            <text:p>suffer torment</text:p>
          </table:table-cell>
          <table:table-cell office:value-type="string">
            <text:p>PE18/103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95">
            <text:p>595</text:p>
          </table:table-cell>
          <table:table-cell table:number-columns-repeated="5"/>
          <table:table-cell office:value-type="string">
            <text:p>ÑGYAL(AM)</text:p>
          </table:table-cell>
          <table:table-cell office:value-type="string">
            <text:p>talk loud or incoherently</text:p>
          </table:table-cell>
          <table:table-cell office:value-type="string">
            <text:p>Ety/ÑGA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96">
            <text:p>596</text:p>
          </table:table-cell>
          <table:table-cell table:number-columns-repeated="5"/>
          <table:table-cell office:value-type="string">
            <text:p>ÑGYO(N)</text:p>
          </table:table-cell>
          <table:table-cell office:value-type="string">
            <text:p>grandchild, descendant</text:p>
          </table:table-cell>
          <table:table-cell office:value-type="string">
            <text:p>Ety/ÑGYŌ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97">
            <text:p>597</text:p>
          </table:table-cell>
          <table:table-cell table:number-columns-repeated="5"/>
          <table:table-cell office:value-type="string">
            <text:p>NĪ¹/INI</text:p>
          </table:table-cell>
          <table:table-cell office:value-type="string">
            <text:p>female</text:p>
          </table:table-cell>
          <table:table-cell office:value-type="string">
            <text:p>Ety/INI, NĪ¹</text:p>
          </table:table-cell>
          <table:table-cell office:value-type="string">
            <text:p>INI</text:p>
          </table:table-cell>
          <table:table-cell office:value-type="string">
            <text:p>female</text:p>
          </table:table-cell>
          <table:table-cell office:value-type="string">
            <text:p>PE21/7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598">
            <text:p>598</text:p>
          </table:table-cell>
          <table:table-cell table:number-columns-repeated="5"/>
          <table:table-cell office:value-type="string">
            <text:p>NID</text:p>
          </table:table-cell>
          <table:table-cell office:value-type="string">
            <text:p>lean against</text:p>
          </table:table-cell>
          <table:table-cell office:value-type="string">
            <text:p>Ety/NID</text:p>
          </table:table-cell>
          <table:table-cell office:value-type="string">
            <text:p>NID</text:p>
          </table:table-cell>
          <table:table-cell office:value-type="string">
            <text:p>force; will</text:p>
          </table:table-cell>
          <table:table-cell office:value-type="string">
            <text:p>PE22/165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table:number-columns-repeated="8"/>
          <table:table-cell office:value-type="string">
            <text:p>NIK</text:p>
          </table:table-cell>
          <table:table-cell office:value-type="string">
            <text:p>small</text:p>
          </table:table-cell>
          <table:table-cell office:value-type="string">
            <text:p>VT47/2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Q. ninque</text:p>
          </table:table-cell>
          <table:table-cell office:value-type="string">
            <text:p>white</text:p>
          </table:table-cell>
          <table:table-cell office:value-type="string">
            <text:p>NIQI</text:p>
          </table:table-cell>
          <table:table-cell office:value-type="string">
            <text:p>white</text:p>
          </table:table-cell>
          <table:table-cell office:value-type="string">
            <text:p>QL/66</text:p>
          </table:table-cell>
          <table:table-cell office:value-type="string">
            <text:p>NIK-W</text:p>
          </table:table-cell>
          <table:table-cell office:value-type="string">
            <text:p>*snow; white</text:p>
          </table:table-cell>
          <table:table-cell office:value-type="string">
            <text:p>Ety/NIK-W</text:p>
          </table:table-cell>
          <table:table-cell office:value-type="string">
            <text:p>NIK(W)</text:p>
          </table:table-cell>
          <table:table-cell office:value-type="string">
            <text:p>(also of) snow, ice</text:p>
          </table:table-cell>
          <table:table-cell office:value-type="string">
            <text:p>PE17/16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01">
            <text:p>601</text:p>
          </table:table-cell>
          <table:table-cell table:number-columns-repeated="5"/>
          <table:table-cell office:value-type="string">
            <text:p>NINDI</text:p>
          </table:table-cell>
          <table:table-cell office:value-type="string">
            <text:p>fragile, thin</text:p>
          </table:table-cell>
          <table:table-cell office:value-type="string">
            <text:p>Ety/NIN-DI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table:number-columns-repeated="2"/>
          <table:table-cell office:value-type="string">
            <text:p>NINI</text:p>
          </table:table-cell>
          <table:table-cell office:value-type="string">
            <text:p>*blue</text:p>
          </table:table-cell>
          <table:table-cell office:value-type="string">
            <text:p>QL/6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table:number-columns-repeated="8"/>
          <table:table-cell office:value-type="string">
            <text:p>NIP</text:p>
          </table:table-cell>
          <table:table-cell office:value-type="string">
            <text:p>small (and weak)</text:p>
          </table:table-cell>
          <table:table-cell office:value-type="string">
            <text:p>VT48/1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table:number-columns-repeated="8"/>
          <table:table-cell office:value-type="string">
            <text:p>NIR</text:p>
          </table:table-cell>
          <table:table-cell office:value-type="string">
            <text:p>will, intention</text:p>
          </table:table-cell>
          <table:table-cell office:value-type="string">
            <text:p>PE17/16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05">
            <text:p>605</text:p>
          </table:table-cell>
          <table:table-cell table:number-columns-repeated="5"/>
          <table:table-cell office:value-type="string">
            <text:p>NIS</text:p>
          </table:table-cell>
          <table:table-cell office:value-type="string">
            <text:p>woman</text:p>
          </table:table-cell>
          <table:table-cell office:value-type="string">
            <text:p>Ety/NIS</text:p>
          </table:table-cell>
          <table:table-cell office:value-type="string">
            <text:p>NIS</text:p>
          </table:table-cell>
          <table:table-cell office:value-type="string">
            <text:p>woman</text:p>
          </table:table-cell>
          <table:table-cell office:value-type="string">
            <text:p>VT47/3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06">
            <text:p>606</text:p>
          </table:table-cell>
          <table:table-cell table:number-columns-repeated="5"/>
          <table:table-cell office:value-type="string">
            <text:p>ÑIW</text:p>
          </table:table-cell>
          <table:table-cell office:value-type="string">
            <text:p>wink, hint</text:p>
          </table:table-cell>
          <table:table-cell office:value-type="string">
            <text:p>EtyAC/ÑIW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table:number-columns-repeated="2"/>
          <table:table-cell office:value-type="string">
            <text:p>NḶDḶ</text:p>
          </table:table-cell>
          <table:table-cell office:value-type="string">
            <text:p>*dell</text:p>
          </table:table-cell>
          <table:table-cell office:value-type="string">
            <text:p>QL/6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table:number-columns-repeated="2"/>
          <table:table-cell office:value-type="string">
            <text:p>NṆGṆ</text:p>
          </table:table-cell>
          <table:table-cell office:value-type="string">
            <text:p>have a cold</text:p>
          </table:table-cell>
          <table:table-cell office:value-type="string">
            <text:p>QL/6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Q. nosse</text:p>
          </table:table-cell>
          <table:table-cell office:value-type="string">
            <text:p>kindred, family</text:p>
          </table:table-cell>
          <table:table-cell office:value-type="string">
            <text:p>NŌ</text:p>
          </table:table-cell>
          <table:table-cell office:value-type="string">
            <text:p>become, be born</text:p>
          </table:table-cell>
          <table:table-cell office:value-type="string">
            <text:p>QL/66</text:p>
          </table:table-cell>
          <table:table-cell table:style-name="ce3" office:value-type="string">
            <text:p>NŌ/ONO</text:p>
          </table:table-cell>
          <table:table-cell office:value-type="string">
            <text:p>beget</text:p>
          </table:table-cell>
          <table:table-cell office:value-type="string">
            <text:p>Ety/NŌ, ONO</text:p>
          </table:table-cell>
          <table:table-cell table:style-name="ce3" office:value-type="string">
            <text:p>ONO/NŌ</text:p>
          </table:table-cell>
          <table:table-cell office:value-type="string">
            <text:p>beget</text:p>
          </table:table-cell>
          <table:table-cell office:value-type="string">
            <text:p>PE17/10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10">
            <text:p>610</text:p>
          </table:table-cell>
          <table:table-cell table:number-columns-repeated="2"/>
          <table:table-cell office:value-type="string">
            <text:p>YOLO</text:p>
          </table:table-cell>
          <table:table-cell office:value-type="string">
            <text:p>smell, stink, reek</text:p>
          </table:table-cell>
          <table:table-cell office:value-type="string">
            <text:p>QL/106</text:p>
          </table:table-cell>
          <table:table-cell office:value-type="string">
            <text:p>ÑOL</text:p>
          </table:table-cell>
          <table:table-cell office:value-type="string">
            <text:p>smell (intr.)</text:p>
          </table:table-cell>
          <table:table-cell office:value-type="string">
            <text:p>Ety/ÑOL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table:number-columns-repeated="2"/>
          <table:table-cell office:value-type="string">
            <text:p>NOLO</text:p>
          </table:table-cell>
          <table:table-cell office:value-type="string">
            <text:p>dare</text:p>
          </table:table-cell>
          <table:table-cell office:value-type="string">
            <text:p>QL/6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. nor-</text:p>
          </table:table-cell>
          <table:table-cell office:value-type="string">
            <text:p>run</text:p>
          </table:table-cell>
          <table:table-cell office:value-type="string">
            <text:p>NORO</text:p>
          </table:table-cell>
          <table:table-cell office:value-type="string">
            <text:p>run, ride, spin</text:p>
          </table:table-cell>
          <table:table-cell office:value-type="string">
            <text:p>QL/67</text:p>
          </table:table-cell>
          <table:table-cell office:value-type="string">
            <text:p>{NORO}</text:p>
          </table:table-cell>
          <table:table-cell office:value-type="string">
            <text:p>run, roll along</text:p>
          </table:table-cell>
          <table:table-cell office:value-type="string">
            <text:p>PE22/127</text:p>
          </table:table-cell>
          <table:table-cell office:value-type="string">
            <text:p>NOR</text:p>
          </table:table-cell>
          <table:table-cell office:value-type="string">
            <text:p>run (or leap)</text:p>
          </table:table-cell>
          <table:table-cell office:value-type="string">
            <text:p>PE17/16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13">
            <text:p>613</text:p>
          </table:table-cell>
          <table:table-cell table:number-columns-repeated="5"/>
          <table:table-cell office:value-type="string">
            <text:p>NOROTH</text:p>
          </table:table-cell>
          <table:table-cell office:value-type="string">
            <text:p>*giant</text:p>
          </table:table-cell>
          <table:table-cell office:value-type="string">
            <text:p>Ety/NOROTH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table:number-columns-repeated="2"/>
          <table:table-cell office:value-type="string">
            <text:p>NOSO/NOTO</text:p>
          </table:table-cell>
          <table:table-cell office:value-type="string">
            <text:p>*damp, wet</text:p>
          </table:table-cell>
          <table:table-cell office:value-type="string">
            <text:p>QL/6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S. nod-</text:p>
          </table:table-cell>
          <table:table-cell office:value-type="string">
            <text:p>count</text:p>
          </table:table-cell>
          <table:table-cell office:value-type="string">
            <text:p>ᴱN. nod-</text:p>
          </table:table-cell>
          <table:table-cell office:value-type="string">
            <text:p>to count</text:p>
          </table:table-cell>
          <table:table-cell office:value-type="string">
            <text:p>PE13/162</text:p>
          </table:table-cell>
          <table:table-cell office:value-type="string">
            <text:p>NOT</text:p>
          </table:table-cell>
          <table:table-cell office:value-type="string">
            <text:p>count, reckon</text:p>
          </table:table-cell>
          <table:table-cell office:value-type="string">
            <text:p>Ety/NOT</text:p>
          </table:table-cell>
          <table:table-cell office:value-type="string">
            <text:p>NOT</text:p>
          </table:table-cell>
          <table:table-cell office:value-type="string">
            <text:p>count, reckon</text:p>
          </table:table-cell>
          <table:table-cell office:value-type="string">
            <text:p>PE17/6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16">
            <text:p>616</text:p>
          </table:table-cell>
          <table:table-cell table:number-columns-repeated="2"/>
          <table:table-cell office:value-type="string">
            <text:p>NAVA</text:p>
          </table:table-cell>
          <table:table-cell office:value-type="string">
            <text:p>suspect, guess, have inkling</text:p>
          </table:table-cell>
          <table:table-cell office:value-type="string">
            <text:p>QL/64</text:p>
          </table:table-cell>
          <table:table-cell office:value-type="string">
            <text:p>NOWO</text:p>
          </table:table-cell>
          <table:table-cell office:value-type="string">
            <text:p>think, form idea</text:p>
          </table:table-cell>
          <table:table-cell office:value-type="string">
            <text:p>Ety/NOWO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Q. nó</text:p>
          </table:table-cell>
          <table:table-cell office:value-type="string">
            <text:p>before</text:p>
          </table:table-cell>
          <table:table-cell office:value-type="string">
            <text:p>NO(WO)</text:p>
          </table:table-cell>
          <table:table-cell office:value-type="string">
            <text:p>in front; after (of time)</text:p>
          </table:table-cell>
          <table:table-cell office:value-type="string">
            <text:p>QL/66</text:p>
          </table:table-cell>
          <table:table-cell office:value-type="string">
            <text:p>Q. nó-</text:p>
          </table:table-cell>
          <table:table-cell office:value-type="string">
            <text:p>yester-</text:p>
          </table:table-cell>
          <table:table-cell office:value-type="string">
            <text:p>PE22/124</text:p>
          </table:table-cell>
          <table:table-cell office:value-type="string">
            <text:p>nō</text:p>
          </table:table-cell>
          <table:table-cell office:value-type="string">
            <text:p>at back, before (of time)</text:p>
          </table:table-cell>
          <table:table-cell office:value-type="string">
            <text:p>VT49/32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table:number-columns-repeated="2"/>
          <table:table-cell office:value-type="string">
            <text:p>NṚQṚ</text:p>
          </table:table-cell>
          <table:table-cell office:value-type="string">
            <text:p>wither, fade</text:p>
          </table:table-cell>
          <table:table-cell office:value-type="string">
            <text:p>QL/6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table:number-columns-repeated="2"/>
          <table:table-cell office:value-type="string">
            <text:p>NṚŘṚ</text:p>
          </table:table-cell>
          <table:table-cell office:value-type="string">
            <text:p>smell sweet</text:p>
          </table:table-cell>
          <table:table-cell office:value-type="string">
            <text:p>QL/6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Q. nu</text:p>
          </table:table-cell>
          <table:table-cell office:value-type="string">
            <text:p>under</text:p>
          </table:table-cell>
          <table:table-cell office:value-type="string">
            <text:p>NUHU</text:p>
          </table:table-cell>
          <table:table-cell office:value-type="string">
            <text:p>bow, bend down, stoop</text:p>
          </table:table-cell>
          <table:table-cell office:value-type="string">
            <text:p>QL/68</text:p>
          </table:table-cell>
          <table:table-cell office:value-type="string">
            <text:p>NU/UNU</text:p>
          </table:table-cell>
          <table:table-cell office:value-type="string">
            <text:p>*down, under</text:p>
          </table:table-cell>
          <table:table-cell office:value-type="string">
            <text:p>Ety/NU, UNU</text:p>
          </table:table-cell>
          <table:table-cell office:value-type="string">
            <text:p>NŪ/UNU</text:p>
          </table:table-cell>
          <table:table-cell office:value-type="string">
            <text:p>sink, down</text:p>
          </table:table-cell>
          <table:table-cell office:value-type="string">
            <text:p>PE17/64, 152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S. naug</text:p>
          </table:table-cell>
          <table:table-cell office:value-type="string">
            <text:p>dwarf</text:p>
          </table:table-cell>
          <table:table-cell office:value-type="string">
            <text:p>G. naug</text:p>
          </table:table-cell>
          <table:table-cell office:value-type="string">
            <text:p>dwarf</text:p>
          </table:table-cell>
          <table:table-cell office:value-type="string">
            <text:p>GL/59</text:p>
          </table:table-cell>
          <table:table-cell office:value-type="string">
            <text:p>NAUK</text:p>
          </table:table-cell>
          <table:table-cell office:value-type="string">
            <text:p>*dwarf</text:p>
          </table:table-cell>
          <table:table-cell office:value-type="string">
            <text:p>Ety/NAUK</text:p>
          </table:table-cell>
          <table:table-cell office:value-type="string">
            <text:p>NUKU</text:p>
          </table:table-cell>
          <table:table-cell office:value-type="string">
            <text:p>dwarf, stunted</text:p>
          </table:table-cell>
          <table:table-cell office:value-type="string">
            <text:p>WJ/413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table:number-columns-repeated="2"/>
          <table:table-cell office:value-type="string">
            <text:p>NULU</text:p>
          </table:table-cell>
          <table:table-cell office:value-type="string">
            <text:p>*lead</text:p>
          </table:table-cell>
          <table:table-cell office:value-type="string">
            <text:p>QL/6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table:number-columns-repeated="2"/>
          <table:table-cell office:value-type="string">
            <text:p>NURU</text:p>
          </table:table-cell>
          <table:table-cell office:value-type="string">
            <text:p>*growl, grumble</text:p>
          </table:table-cell>
          <table:table-cell office:value-type="string">
            <text:p>QL/6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24">
            <text:p>624</text:p>
          </table:table-cell>
          <table:table-cell table:number-columns-repeated="5"/>
          <table:table-cell office:value-type="string">
            <text:p>NUR</text:p>
          </table:table-cell>
          <table:table-cell office:value-type="string">
            <text:p>deep</text:p>
          </table:table-cell>
          <table:table-cell office:value-type="string">
            <text:p>Ety/NU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25">
            <text:p>625</text:p>
          </table:table-cell>
          <table:table-cell table:number-columns-repeated="2"/>
          <table:table-cell office:value-type="string">
            <text:p>NUFU/NUSU</text:p>
          </table:table-cell>
          <table:table-cell office:value-type="string">
            <text:p>*smell</text:p>
          </table:table-cell>
          <table:table-cell office:value-type="string">
            <text:p>QL/68</text:p>
          </table:table-cell>
          <table:table-cell office:value-type="string">
            <text:p>NUS</text:p>
          </table:table-cell>
          <table:table-cell office:value-type="string">
            <text:p>sense, wisdom</text:p>
          </table:table-cell>
          <table:table-cell office:value-type="string">
            <text:p>EtyAC/NUS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26">
            <text:p>626</text:p>
          </table:table-cell>
          <table:table-cell table:number-columns-repeated="5"/>
          <table:table-cell office:value-type="string">
            <text:p>NUT</text:p>
          </table:table-cell>
          <table:table-cell office:value-type="string">
            <text:p>tie, bind</text:p>
          </table:table-cell>
          <table:table-cell office:value-type="string">
            <text:p>Ety/NU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table:number-columns-repeated="2"/>
          <table:table-cell office:value-type="string">
            <text:p>NWAÐA</text:p>
          </table:table-cell>
          <table:table-cell office:value-type="string">
            <text:p>tarry, linger</text:p>
          </table:table-cell>
          <table:table-cell office:value-type="string">
            <text:p>QL/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table:number-columns-repeated="2"/>
          <table:table-cell office:value-type="string">
            <text:p>ŊWEDH</text:p>
          </table:table-cell>
          <table:table-cell office:value-type="string">
            <text:p>*bloom, flower</text:p>
          </table:table-cell>
          <table:table-cell office:value-type="string">
            <text:p>GL/4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29">
            <text:p>629</text:p>
          </table:table-cell>
          <table:table-cell table:number-columns-repeated="5"/>
          <table:table-cell office:value-type="string">
            <text:p>NYAD</text:p>
          </table:table-cell>
          <table:table-cell office:value-type="string">
            <text:p>gnaw</text:p>
          </table:table-cell>
          <table:table-cell office:value-type="string">
            <text:p>Ety/NYA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Q. nyáre</text:p>
          </table:table-cell>
          <table:table-cell office:value-type="string">
            <text:p>tale, account</text:p>
          </table:table-cell>
          <table:table-cell office:value-type="string">
            <text:p>NYAŘA</text:p>
          </table:table-cell>
          <table:table-cell office:value-type="string">
            <text:p>relate, tell</text:p>
          </table:table-cell>
          <table:table-cell office:value-type="string">
            <text:p>QL/68</text:p>
          </table:table-cell>
          <table:table-cell office:value-type="string">
            <text:p>N(Y)AR</text:p>
          </table:table-cell>
          <table:table-cell office:value-type="string">
            <text:p>tell, relate</text:p>
          </table:table-cell>
          <table:table-cell office:value-type="string">
            <text:p>Ety/NAR²; EtyAC/NAR²</text:p>
          </table:table-cell>
          <table:table-cell office:value-type="string">
            <text:p>ÑGYAR</text:p>
          </table:table-cell>
          <table:table-cell office:value-type="string">
            <text:p>recite</text:p>
          </table:table-cell>
          <table:table-cell office:value-type="string">
            <text:p>PE19/7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table:number-columns-repeated="2"/>
          <table:table-cell office:value-type="string">
            <text:p>NYASA</text:p>
          </table:table-cell>
          <table:table-cell office:value-type="string">
            <text:p>*scratch</text:p>
          </table:table-cell>
          <table:table-cell office:value-type="string">
            <text:p>QL/6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table:number-columns-repeated="2"/>
          <table:table-cell office:value-type="string">
            <text:p>NYATA</text:p>
          </table:table-cell>
          <table:table-cell office:value-type="string">
            <text:p>chatter, gossip</text:p>
          </table:table-cell>
          <table:table-cell office:value-type="string">
            <text:p>QL/6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33">
            <text:p>633</text:p>
          </table:table-cell>
          <table:table-cell table:number-columns-repeated="5"/>
          <table:table-cell office:value-type="string">
            <text:p>NYEL</text:p>
          </table:table-cell>
          <table:table-cell office:value-type="string">
            <text:p>ring, give sweet sound</text:p>
          </table:table-cell>
          <table:table-cell office:value-type="string">
            <text:p>Ety/NYEL</text:p>
          </table:table-cell>
          <table:table-cell office:value-type="string">
            <text:p>ŊYEL/ŊYOL</text:p>
          </table:table-cell>
          <table:table-cell office:value-type="string">
            <text:p>ring</text:p>
          </table:table-cell>
          <table:table-cell office:value-type="string">
            <text:p>PE18/94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table:number-columns-repeated="2"/>
          <table:table-cell office:value-type="string">
            <text:p>NYE(NE)</text:p>
          </table:table-cell>
          <table:table-cell office:value-type="string">
            <text:p>bleat</text:p>
          </table:table-cell>
          <table:table-cell office:value-type="string">
            <text:p>QL/6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table:number-columns-repeated="2"/>
          <table:table-cell office:value-type="string">
            <text:p>Ō</text:p>
          </table:table-cell>
          <table:table-cell office:value-type="string">
            <text:p>be, exist</text:p>
          </table:table-cell>
          <table:table-cell office:value-type="string">
            <text:p>QL/6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table:number-columns-repeated="2"/>
          <table:table-cell office:value-type="string">
            <text:p>’O’O</text:p>
          </table:table-cell>
          <table:table-cell office:value-type="string">
            <text:p>*sea</text:p>
          </table:table-cell>
          <table:table-cell office:value-type="string">
            <text:p>QL/7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table:number-columns-repeated="2"/>
          <table:table-cell office:value-type="string">
            <text:p>OHO¹</text:p>
          </table:table-cell>
          <table:table-cell office:value-type="string">
            <text:p>*egg</text:p>
          </table:table-cell>
          <table:table-cell office:value-type="string">
            <text:p>QL/6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table:number-columns-repeated="8"/>
          <table:table-cell office:value-type="string">
            <text:p>OKO/UK</text:p>
          </table:table-cell>
          <table:table-cell office:value-type="string">
            <text:p>evil; nasty</text:p>
          </table:table-cell>
          <table:table-cell office:value-type="string">
            <text:p>PE17/170; VT48/2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table:number-columns-repeated="2"/>
          <table:table-cell office:value-type="string">
            <text:p>OLO¹</text:p>
          </table:table-cell>
          <table:table-cell office:value-type="string">
            <text:p>tip</text:p>
          </table:table-cell>
          <table:table-cell office:value-type="string">
            <text:p>QL/6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table:number-columns-repeated="2"/>
          <table:table-cell office:value-type="string">
            <text:p>OLO²</text:p>
          </table:table-cell>
          <table:table-cell office:value-type="string">
            <text:p>*increase, more</text:p>
          </table:table-cell>
          <table:table-cell office:value-type="string">
            <text:p>QL/69</text:p>
          </table:table-cell>
          <table:table-cell office:value-type="string">
            <text:p>OL</text:p>
          </table:table-cell>
          <table:table-cell office:value-type="string">
            <text:p>grow</text:p>
          </table:table-cell>
          <table:table-cell office:value-type="string">
            <text:p>PE22/103</text:p>
          </table:table-cell>
          <table:table-cell office:value-type="string">
            <text:p>OL</text:p>
          </table:table-cell>
          <table:table-cell office:value-type="string">
            <text:p>*become</text:p>
          </table:table-cell>
          <table:table-cell office:value-type="string">
            <text:p>PE22/134; PM/340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41">
            <text:p>641</text:p>
          </table:table-cell>
          <table:table-cell table:number-columns-repeated="5"/>
          <table:table-cell office:value-type="string">
            <text:p>GOLOB</text:p>
          </table:table-cell>
          <table:table-cell office:value-type="string">
            <text:p>*branch</text:p>
          </table:table-cell>
          <table:table-cell office:value-type="string">
            <text:p>Ety/GÓLOB</text:p>
          </table:table-cell>
          <table:table-cell office:value-type="string">
            <text:p>OLOB</text:p>
          </table:table-cell>
          <table:table-cell office:value-type="string">
            <text:p>branch</text:p>
          </table:table-cell>
          <table:table-cell office:value-type="string">
            <text:p>PM/341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Q. Lórien</text:p>
          </table:table-cell>
          <table:table-cell/>
          <table:table-cell office:value-type="string">
            <text:p>LORO</text:p>
          </table:table-cell>
          <table:table-cell office:value-type="string">
            <text:p>doze, slumber</text:p>
          </table:table-cell>
          <table:table-cell office:value-type="string">
            <text:p>QL/56</text:p>
          </table:table-cell>
          <table:table-cell office:value-type="string">
            <text:p>{(O)LOR}</text:p>
          </table:table-cell>
          <table:table-cell office:value-type="string">
            <text:p>sleep; dream</text:p>
          </table:table-cell>
          <table:table-cell office:value-type="string">
            <text:p>EtyAC/LOS, ÓLOS</text:p>
          </table:table-cell>
          <table:table-cell office:value-type="string">
            <text:p>(O)LOR</text:p>
          </table:table-cell>
          <table:table-cell office:value-type="string">
            <text:p>dream; vision</text:p>
          </table:table-cell>
          <table:table-cell office:value-type="string">
            <text:p>PE17/88, 160; PM/341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43">
            <text:p>643</text:p>
          </table:table-cell>
          <table:table-cell table:number-columns-repeated="2"/>
          <table:table-cell office:value-type="string">
            <text:p>OLO³</text:p>
          </table:table-cell>
          <table:table-cell office:value-type="string">
            <text:p>*dream</text:p>
          </table:table-cell>
          <table:table-cell office:value-type="string">
            <text:p>QL/69</text:p>
          </table:table-cell>
          <table:table-cell office:value-type="string">
            <text:p>(O)LOS</text:p>
          </table:table-cell>
          <table:table-cell office:value-type="string">
            <text:p>sleep; dream</text:p>
          </table:table-cell>
          <table:table-cell office:value-type="string">
            <text:p>Ety/LOS, ÓLOS</text:p>
          </table:table-cell>
          <table:table-cell office:value-type="string">
            <text:p>OLOS</text:p>
          </table:table-cell>
          <table:table-cell office:value-type="string">
            <text:p>dream, vision, fantasy</text:p>
          </table:table-cell>
          <table:table-cell office:value-type="string">
            <text:p>PM/341; UT/39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Q. óma</text:p>
          </table:table-cell>
          <table:table-cell office:value-type="string">
            <text:p>voice</text:p>
          </table:table-cell>
          <table:table-cell office:value-type="string">
            <text:p>OHO²</text:p>
          </table:table-cell>
          <table:table-cell office:value-type="string">
            <text:p>cry</text:p>
          </table:table-cell>
          <table:table-cell office:value-type="string">
            <text:p>QL/69</text:p>
          </table:table-cell>
          <table:table-cell office:value-type="string">
            <text:p>OM</text:p>
          </table:table-cell>
          <table:table-cell office:value-type="string">
            <text:p>*sound</text:p>
          </table:table-cell>
          <table:table-cell office:value-type="string">
            <text:p>Ety/OM</text:p>
          </table:table-cell>
          <table:table-cell office:value-type="string">
            <text:p>OM</text:p>
          </table:table-cell>
          <table:table-cell office:value-type="string">
            <text:p>of resonant sounds</text:p>
          </table:table-cell>
          <table:table-cell office:value-type="string">
            <text:p>PE17/138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table:number-columns-repeated="2"/>
          <table:table-cell office:value-type="string">
            <text:p>OMO</text:p>
          </table:table-cell>
          <table:table-cell office:value-type="string">
            <text:p>all, every</text:p>
          </table:table-cell>
          <table:table-cell office:value-type="string">
            <text:p>QL/7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table:number-columns-repeated="2"/>
          <table:table-cell office:value-type="string">
            <text:p>ONGO/OŊO</text:p>
          </table:table-cell>
          <table:table-cell office:value-type="string">
            <text:p>*pain</text:p>
          </table:table-cell>
          <table:table-cell office:value-type="string">
            <text:p>QL/7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table:number-columns-repeated="8"/>
          <table:table-cell office:value-type="string">
            <text:p>OP</text:p>
          </table:table-cell>
          <table:table-cell office:value-type="string">
            <text:p>(opening of) mouth</text:p>
          </table:table-cell>
          <table:table-cell office:value-type="string">
            <text:p>PE17/12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table:number-columns-repeated="2"/>
          <table:table-cell office:value-type="string">
            <text:p>POT-I</text:p>
          </table:table-cell>
          <table:table-cell office:value-type="string">
            <text:p>*back, behind, after</text:p>
          </table:table-cell>
          <table:table-cell office:value-type="string">
            <text:p>QL/75</text:p>
          </table:table-cell>
          <table:table-cell table:number-columns-repeated="3"/>
          <table:table-cell office:value-type="string">
            <text:p>OPO</text:p>
          </table:table-cell>
          <table:table-cell office:value-type="string">
            <text:p>before of place</text:p>
          </table:table-cell>
          <table:table-cell office:value-type="string">
            <text:p>PE22/167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table:number-columns-repeated="2"/>
          <table:table-cell office:value-type="string">
            <text:p>OQO</text:p>
          </table:table-cell>
          <table:table-cell office:value-type="string">
            <text:p>curve, bend</text:p>
          </table:table-cell>
          <table:table-cell office:value-type="string">
            <text:p>QL/7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table:number-columns-repeated="2"/>
          <table:table-cell office:value-type="string">
            <text:p>ORO²</text:p>
          </table:table-cell>
          <table:table-cell office:value-type="string">
            <text:p>*sow</text:p>
          </table:table-cell>
          <table:table-cell office:value-type="string">
            <text:p>QL/7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table:number-columns-repeated="2"/>
          <table:table-cell office:value-type="string">
            <text:p>OŘO</text:p>
          </table:table-cell>
          <table:table-cell office:value-type="string">
            <text:p>*dawn</text:p>
          </table:table-cell>
          <table:table-cell office:value-type="string">
            <text:p>QL/7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52">
            <text:p>652</text:p>
          </table:table-cell>
          <table:table-cell table:number-columns-repeated="2"/>
          <table:table-cell office:value-type="string">
            <text:p>G. orc</text:p>
          </table:table-cell>
          <table:table-cell office:value-type="string">
            <text:p>goblin</text:p>
          </table:table-cell>
          <table:table-cell office:value-type="string">
            <text:p>GL/63</text:p>
          </table:table-cell>
          <table:table-cell office:value-type="string">
            <text:p>OROK</text:p>
          </table:table-cell>
          <table:table-cell office:value-type="string">
            <text:p>*goblin</text:p>
          </table:table-cell>
          <table:table-cell office:value-type="string">
            <text:p>Ety/ÓROK</text:p>
          </table:table-cell>
          <table:table-cell office:value-type="string">
            <text:p>(O)ROK</text:p>
          </table:table-cell>
          <table:table-cell office:value-type="string">
            <text:p>anything that caused fear</text:p>
          </table:table-cell>
          <table:table-cell office:value-type="string">
            <text:p>MR/41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S. orn</text:p>
          </table:table-cell>
          <table:table-cell office:value-type="string">
            <text:p>tree</text:p>
          </table:table-cell>
          <table:table-cell office:value-type="string">
            <text:p>Q. orme</text:p>
          </table:table-cell>
          <table:table-cell office:value-type="string">
            <text:p>tree</text:p>
          </table:table-cell>
          <table:table-cell office:value-type="string">
            <text:p>PE16/139</text:p>
          </table:table-cell>
          <table:table-cell office:value-type="string">
            <text:p>ORNĪ/ORON</text:p>
          </table:table-cell>
          <table:table-cell office:value-type="string">
            <text:p>high tree</text:p>
          </table:table-cell>
          <table:table-cell office:value-type="string">
            <text:p>Ety/ÓR-NI; EtyAC/NEL</text:p>
          </table:table-cell>
          <table:table-cell office:value-type="string">
            <text:p>ORNĒ</text:p>
          </table:table-cell>
          <table:table-cell office:value-type="string">
            <text:p>(straight) tree</text:p>
          </table:table-cell>
          <table:table-cell office:value-type="string">
            <text:p>NM/34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S. orod</text:p>
          </table:table-cell>
          <table:table-cell office:value-type="string">
            <text:p>mountain</text:p>
          </table:table-cell>
          <table:table-cell office:value-type="string">
            <text:p>G. orod</text:p>
          </table:table-cell>
          <table:table-cell office:value-type="string">
            <text:p>mountain</text:p>
          </table:table-cell>
          <table:table-cell office:value-type="string">
            <text:p>GL/63</text:p>
          </table:table-cell>
          <table:table-cell office:value-type="string">
            <text:p>OROT</text:p>
          </table:table-cell>
          <table:table-cell office:value-type="string">
            <text:p>height, mountain</text:p>
          </table:table-cell>
          <table:table-cell office:value-type="string">
            <text:p>Ety/ÓROT</text:p>
          </table:table-cell>
          <table:table-cell office:value-type="string">
            <text:p>Q. orto</text:p>
          </table:table-cell>
          <table:table-cell office:value-type="string">
            <text:p>mountain</text:p>
          </table:table-cell>
          <table:table-cell office:value-type="string">
            <text:p>PE17/6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table:number-columns-repeated="2"/>
          <table:table-cell office:value-type="string">
            <text:p>OSO¹</text:p>
          </table:table-cell>
          <table:table-cell office:value-type="string">
            <text:p>*joint</text:p>
          </table:table-cell>
          <table:table-cell office:value-type="string">
            <text:p>QL/7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S. ost</text:p>
          </table:table-cell>
          <table:table-cell office:value-type="string">
            <text:p>town</text:p>
          </table:table-cell>
          <table:table-cell office:value-type="string">
            <text:p>OSO²</text:p>
          </table:table-cell>
          <table:table-cell office:value-type="string">
            <text:p>*enclosure</text:p>
          </table:table-cell>
          <table:table-cell office:value-type="string">
            <text:p>QL/71</text:p>
          </table:table-cell>
          <table:table-cell office:value-type="string">
            <text:p>OS</text:p>
          </table:table-cell>
          <table:table-cell office:value-type="string">
            <text:p>round, about</text:p>
          </table:table-cell>
          <table:table-cell office:value-type="string">
            <text:p>Ety/OS</text:p>
          </table:table-cell>
          <table:table-cell office:value-type="string">
            <text:p>Q. osto</text:p>
          </table:table-cell>
          <table:table-cell office:value-type="string">
            <text:p>fortification</text:p>
          </table:table-cell>
          <table:table-cell office:value-type="string">
            <text:p>NM/22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Q. otso</text:p>
          </table:table-cell>
          <table:table-cell office:value-type="string">
            <text:p>seven</text:p>
          </table:table-cell>
          <table:table-cell office:value-type="string">
            <text:p>OTO</text:p>
          </table:table-cell>
          <table:table-cell office:value-type="string">
            <text:p>knock</text:p>
          </table:table-cell>
          <table:table-cell office:value-type="string">
            <text:p>QL/71</text:p>
          </table:table-cell>
          <table:table-cell office:value-type="string">
            <text:p>OTOS/OTOK</text:p>
          </table:table-cell>
          <table:table-cell office:value-type="string">
            <text:p>seven</text:p>
          </table:table-cell>
          <table:table-cell office:value-type="string">
            <text:p>Ety/OT</text:p>
          </table:table-cell>
          <table:table-cell office:value-type="string">
            <text:p>OTOS/OTOK</text:p>
          </table:table-cell>
          <table:table-cell office:value-type="string">
            <text:p>seven</text:p>
          </table:table-cell>
          <table:table-cell office:value-type="string">
            <text:p>VT47/42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table:number-columns-repeated="8"/>
          <table:table-cell office:value-type="string">
            <text:p>OWO</text:p>
          </table:table-cell>
          <table:table-cell office:value-type="string">
            <text:p>masculine</text:p>
          </table:table-cell>
          <table:table-cell office:value-type="string">
            <text:p>PE21/8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Q. oi(o)</text:p>
          </table:table-cell>
          <table:table-cell office:value-type="string">
            <text:p>ever</text:p>
          </table:table-cell>
          <table:table-cell table:number-columns-repeated="3"/>
          <table:table-cell office:value-type="string">
            <text:p>OY</text:p>
          </table:table-cell>
          <table:table-cell office:value-type="string">
            <text:p>ever, eternal</text:p>
          </table:table-cell>
          <table:table-cell office:value-type="string">
            <text:p>Ety/OY</text:p>
          </table:table-cell>
          <table:table-cell office:value-type="string">
            <text:p>OY</text:p>
          </table:table-cell>
          <table:table-cell office:value-type="string">
            <text:p>ever, continual, unceasing</text:p>
          </table:table-cell>
          <table:table-cell office:value-type="string">
            <text:p>PE17/69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table:number-columns-repeated="5"/>
          <table:table-cell office:value-type="string">
            <text:p>OY</text:p>
          </table:table-cell>
          <table:table-cell office:value-type="string">
            <text:p>live, pass one’s days</text:p>
          </table:table-cell>
          <table:table-cell office:value-type="string">
            <text:p>PE22/125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table:number-columns-repeated="2"/>
          <table:table-cell office:value-type="string">
            <text:p>OYO</text:p>
          </table:table-cell>
          <table:table-cell office:value-type="string">
            <text:p>*poor</text:p>
          </table:table-cell>
          <table:table-cell office:value-type="string">
            <text:p>QL/7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table:number-columns-repeated="2"/>
          <table:table-cell office:value-type="string">
            <text:p>OẎO</text:p>
          </table:table-cell>
          <table:table-cell office:value-type="string">
            <text:p>salve, rub, oil</text:p>
          </table:table-cell>
          <table:table-cell office:value-type="string">
            <text:p>QL/7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table:number-columns-repeated="2"/>
          <table:table-cell office:value-type="string">
            <text:p>PE</text:p>
          </table:table-cell>
          <table:table-cell office:value-type="string">
            <text:p>at, by</text:p>
          </table:table-cell>
          <table:table-cell office:value-type="string">
            <text:p>QL/72</text:p>
          </table:table-cell>
          <table:table-cell table:number-columns-repeated="3"/>
          <table:table-cell office:value-type="string">
            <text:p>PĀ/APA</text:p>
          </table:table-cell>
          <table:table-cell office:value-type="string">
            <text:p>touch; after, behind of place</text:p>
          </table:table-cell>
          <table:table-cell office:value-type="string">
            <text:p>VT44/26; PE22/147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64">
            <text:p>664</text:p>
          </table:table-cell>
          <table:table-cell table:number-columns-repeated="5"/>
          <table:table-cell office:value-type="string">
            <text:p>PAD</text:p>
          </table:table-cell>
          <table:table-cell office:value-type="string">
            <text:p>*enclosure</text:p>
          </table:table-cell>
          <table:table-cell office:value-type="string">
            <text:p>Ety/PA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table:number-columns-repeated="8"/>
          <table:table-cell office:value-type="string">
            <text:p>PAK</text:p>
          </table:table-cell>
          <table:table-cell office:value-type="string">
            <text:p>close, shut</text:p>
          </table:table-cell>
          <table:table-cell office:value-type="string">
            <text:p>PE17/17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table:number-columns-repeated="2"/>
          <table:table-cell office:value-type="string">
            <text:p>PAKA</text:p>
          </table:table-cell>
          <table:table-cell office:value-type="string">
            <text:p>*pavement</text:p>
          </table:table-cell>
          <table:table-cell office:value-type="string">
            <text:p>GL/6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67">
            <text:p>667</text:p>
          </table:table-cell>
          <table:table-cell table:number-columns-repeated="2"/>
          <table:table-cell office:value-type="string">
            <text:p>G. pactha-</text:p>
          </table:table-cell>
          <table:table-cell office:value-type="string">
            <text:p>utter, speak, talk</text:p>
          </table:table-cell>
          <table:table-cell office:value-type="string">
            <text:p>GL/63</text:p>
          </table:table-cell>
          <table:table-cell table:number-columns-repeated="3"/>
          <table:table-cell office:value-type="string">
            <text:p>PAKAT</text:p>
          </table:table-cell>
          <table:table-cell office:value-type="string">
            <text:p>*talk, speech</text:p>
          </table:table-cell>
          <table:table-cell office:value-type="string">
            <text:p>PE17/126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68">
            <text:p>668</text:p>
          </table:table-cell>
          <table:table-cell table:number-columns-repeated="2"/>
          <table:table-cell office:value-type="string">
            <text:p>PALA</text:p>
          </table:table-cell>
          <table:table-cell office:value-type="string">
            <text:p>*flatness</text:p>
          </table:table-cell>
          <table:table-cell office:value-type="string">
            <text:p>QL/71</text:p>
          </table:table-cell>
          <table:table-cell office:value-type="string">
            <text:p>PAL</text:p>
          </table:table-cell>
          <table:table-cell office:value-type="string">
            <text:p>wide (open)</text:p>
          </table:table-cell>
          <table:table-cell office:value-type="string">
            <text:p>Ety/PAL</text:p>
          </table:table-cell>
          <table:table-cell office:value-type="string">
            <text:p>PAL</text:p>
          </table:table-cell>
          <table:table-cell office:value-type="string">
            <text:p>broad, wide</text:p>
          </table:table-cell>
          <table:table-cell office:value-type="string">
            <text:p>PE17/6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69">
            <text:p>669</text:p>
          </table:table-cell>
          <table:table-cell table:number-columns-repeated="5"/>
          <table:table-cell office:value-type="string">
            <text:p>PALAP</text:p>
          </table:table-cell>
          <table:table-cell office:value-type="string">
            <text:p>*beat</text:p>
          </table:table-cell>
          <table:table-cell office:value-type="string">
            <text:p>Ety/PALAP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table:number-columns-repeated="2"/>
          <table:table-cell office:value-type="string">
            <text:p>PANA</text:p>
          </table:table-cell>
          <table:table-cell office:value-type="string">
            <text:p>arrange</text:p>
          </table:table-cell>
          <table:table-cell office:value-type="string">
            <text:p>QL/72</text:p>
          </table:table-cell>
          <table:table-cell office:value-type="string">
            <text:p>PAN</text:p>
          </table:table-cell>
          <table:table-cell office:value-type="string">
            <text:p>place, set, fix in place</text:p>
          </table:table-cell>
          <table:table-cell office:value-type="string">
            <text:p>Ety/PAN</text:p>
          </table:table-cell>
          <table:table-cell office:value-type="string">
            <text:p>PAN</text:p>
          </table:table-cell>
          <table:table-cell office:value-type="string">
            <text:p>arrange, set in order</text:p>
          </table:table-cell>
          <table:table-cell office:value-type="string">
            <text:p>PE17/10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table:number-columns-repeated="2"/>
          <table:table-cell office:value-type="string">
            <text:p>PAPA</text:p>
          </table:table-cell>
          <table:table-cell office:value-type="string">
            <text:p>*tremble</text:p>
          </table:table-cell>
          <table:table-cell office:value-type="string">
            <text:p>QL/7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Q. parma</text:p>
          </table:table-cell>
          <table:table-cell office:value-type="string">
            <text:p>book</text:p>
          </table:table-cell>
          <table:table-cell table:number-columns-repeated="3"/>
          <table:table-cell office:value-type="string">
            <text:p>PAR</text:p>
          </table:table-cell>
          <table:table-cell office:value-type="string">
            <text:p>compose, put together</text:p>
          </table:table-cell>
          <table:table-cell office:value-type="string">
            <text:p>Ety/PAR</text:p>
          </table:table-cell>
          <table:table-cell office:value-type="string">
            <text:p>PAR</text:p>
          </table:table-cell>
          <table:table-cell office:value-type="string">
            <text:p>arrange; learn</text:p>
          </table:table-cell>
          <table:table-cell office:value-type="string">
            <text:p>PE18/101; PE17/171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Q. parma</text:p>
          </table:table-cell>
          <table:table-cell office:value-type="string">
            <text:p>book</text:p>
          </table:table-cell>
          <table:table-cell office:value-type="string">
            <text:p>PARA</text:p>
          </table:table-cell>
          <table:table-cell office:value-type="string">
            <text:p>*peel</text:p>
          </table:table-cell>
          <table:table-cell office:value-type="string">
            <text:p>QL/72</text:p>
          </table:table-cell>
          <table:table-cell table:number-columns-repeated="3"/>
          <table:table-cell office:value-type="string">
            <text:p>PAR</text:p>
          </table:table-cell>
          <table:table-cell office:value-type="string">
            <text:p>peel</text:p>
          </table:table-cell>
          <table:table-cell office:value-type="string">
            <text:p>PE17/86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74">
            <text:p>674</text:p>
          </table:table-cell>
          <table:table-cell table:number-columns-repeated="5"/>
          <table:table-cell office:value-type="string">
            <text:p>PARAK</text:p>
          </table:table-cell>
          <table:table-cell office:value-type="string">
            <text:p>*dry</text:p>
          </table:table-cell>
          <table:table-cell office:value-type="string">
            <text:p>Ety/PARA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table:number-columns-repeated="5"/>
          <table:table-cell office:value-type="string">
            <text:p>PAS</text:p>
          </table:table-cell>
          <table:table-cell office:value-type="string">
            <text:p>juice</text:p>
          </table:table-cell>
          <table:table-cell office:value-type="string">
            <text:p>PE22/50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76">
            <text:p>676</text:p>
          </table:table-cell>
          <table:table-cell table:number-columns-repeated="2"/>
          <table:table-cell office:value-type="string">
            <text:p>PATA²/PṆTṆ</text:p>
          </table:table-cell>
          <table:table-cell office:value-type="string">
            <text:p>open, spread out, show</text:p>
          </table:table-cell>
          <table:table-cell office:value-type="string">
            <text:p>QL/72</text:p>
          </table:table-cell>
          <table:table-cell office:value-type="string">
            <text:p>PAT</text:p>
          </table:table-cell>
          <table:table-cell office:value-type="string">
            <text:p>*open</text:p>
          </table:table-cell>
          <table:table-cell office:value-type="string">
            <text:p>Ety/PAT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S./G. padra-</text:p>
          </table:table-cell>
          <table:table-cell office:value-type="string">
            <text:p>walk</text:p>
          </table:table-cell>
          <table:table-cell office:value-type="string">
            <text:p>PATA¹</text:p>
          </table:table-cell>
          <table:table-cell office:value-type="string">
            <text:p>*rap, tap</text:p>
          </table:table-cell>
          <table:table-cell office:value-type="string">
            <text:p>QL/72</text:p>
          </table:table-cell>
          <table:table-cell office:value-type="string">
            <text:p>N. Thar-bad</text:p>
          </table:table-cell>
          <table:table-cell office:value-type="string">
            <text:p>Crossway</text:p>
          </table:table-cell>
          <table:table-cell office:value-type="string">
            <text:p>Ety/THAR</text:p>
          </table:table-cell>
          <table:table-cell office:value-type="string">
            <text:p>PAT</text:p>
          </table:table-cell>
          <table:table-cell office:value-type="string">
            <text:p>*track</text:p>
          </table:table-cell>
          <table:table-cell office:value-type="string">
            <text:p>PE17/34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Q. pasta</text:p>
          </table:table-cell>
          <table:table-cell office:value-type="string">
            <text:p>smooth</text:p>
          </table:table-cell>
          <table:table-cell table:number-columns-repeated="3"/>
          <table:table-cell office:value-type="string">
            <text:p>PATH</text:p>
          </table:table-cell>
          <table:table-cell office:value-type="string">
            <text:p>*smooth</text:p>
          </table:table-cell>
          <table:table-cell office:value-type="string">
            <text:p>Ety/PATH</text:p>
          </table:table-cell>
          <table:table-cell office:value-type="string">
            <text:p>PATH/PAS</text:p>
          </table:table-cell>
          <table:table-cell office:value-type="string">
            <text:p>smooth</text:p>
          </table:table-cell>
          <table:table-cell office:value-type="string">
            <text:p>PE17/158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table:number-columns-repeated="2"/>
          <table:table-cell office:value-type="string">
            <text:p>PAẎA</text:p>
          </table:table-cell>
          <table:table-cell office:value-type="string">
            <text:p>punish, conquer</text:p>
          </table:table-cell>
          <table:table-cell office:value-type="string">
            <text:p>QL/7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S. pend</text:p>
          </table:table-cell>
          <table:table-cell office:value-type="string">
            <text:p>slope</text:p>
          </table:table-cell>
          <table:table-cell office:value-type="string">
            <text:p>ᴱN. benn</text:p>
          </table:table-cell>
          <table:table-cell office:value-type="string">
            <text:p>inclined, sloping</text:p>
          </table:table-cell>
          <table:table-cell office:value-type="string">
            <text:p>PE13/138</text:p>
          </table:table-cell>
          <table:table-cell office:value-type="string">
            <text:p>PEN(ED)</text:p>
          </table:table-cell>
          <table:table-cell office:value-type="string">
            <text:p>*hillside, slope</text:p>
          </table:table-cell>
          <table:table-cell office:value-type="string">
            <text:p>Ety/PEN</text:p>
          </table:table-cell>
          <table:table-cell office:value-type="string">
            <text:p>PED</text:p>
          </table:table-cell>
          <table:table-cell office:value-type="string">
            <text:p>slope, slant down</text:p>
          </table:table-cell>
          <table:table-cell office:value-type="string">
            <text:p>WJ/375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table:number-columns-repeated="2"/>
          <table:table-cell office:value-type="string">
            <text:p>PEKE</text:p>
          </table:table-cell>
          <table:table-cell office:value-type="string">
            <text:p>*plume</text:p>
          </table:table-cell>
          <table:table-cell office:value-type="string">
            <text:p>QL/7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82">
            <text:p>682</text:p>
          </table:table-cell>
          <table:table-cell table:number-columns-repeated="2"/>
          <table:table-cell office:value-type="string">
            <text:p>PELE¹</text:p>
          </table:table-cell>
          <table:table-cell office:value-type="string">
            <text:p>fence in</text:p>
          </table:table-cell>
          <table:table-cell office:value-type="string">
            <text:p>QL/73</text:p>
          </table:table-cell>
          <table:table-cell office:value-type="string">
            <text:p>PEL(ES)</text:p>
          </table:table-cell>
          <table:table-cell office:value-type="string">
            <text:p>revolve on fixed point</text:p>
          </table:table-cell>
          <table:table-cell office:value-type="string">
            <text:p>Ety/PEL, PEL(ES)</text:p>
          </table:table-cell>
          <table:table-cell office:value-type="string">
            <text:p>PEL</text:p>
          </table:table-cell>
          <table:table-cell office:value-type="string">
            <text:p>fence, border</text:p>
          </table:table-cell>
          <table:table-cell office:value-type="string">
            <text:p>PE17/90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table:number-columns-repeated="8"/>
          <table:table-cell office:value-type="string">
            <text:p>PEN</text:p>
          </table:table-cell>
          <table:table-cell office:value-type="string">
            <text:p>lack, be without</text:p>
          </table:table-cell>
          <table:table-cell office:value-type="string">
            <text:p>WJ/37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Q. pé</text:p>
          </table:table-cell>
          <table:table-cell office:value-type="string">
            <text:p>lip</text:p>
          </table:table-cell>
          <table:table-cell office:value-type="string">
            <text:p>PĒ</text:p>
          </table:table-cell>
          <table:table-cell office:value-type="string">
            <text:p>*lip</text:p>
          </table:table-cell>
          <table:table-cell office:value-type="string">
            <text:p>QL/72</text:p>
          </table:table-cell>
          <table:table-cell office:value-type="string">
            <text:p>PEG</text:p>
          </table:table-cell>
          <table:table-cell office:value-type="string">
            <text:p>(outer) mouth</text:p>
          </table:table-cell>
          <table:table-cell office:value-type="string">
            <text:p>Ety/PEG; EtyAC/PEG</text:p>
          </table:table-cell>
          <table:table-cell office:value-type="string">
            <text:p>PEÑE</text:p>
          </table:table-cell>
          <table:table-cell office:value-type="string">
            <text:p>*lip, mouth</text:p>
          </table:table-cell>
          <table:table-cell office:value-type="string">
            <text:p>VT39/11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table:number-columns-repeated="2"/>
          <table:table-cell office:value-type="string">
            <text:p>PENE</text:p>
          </table:table-cell>
          <table:table-cell office:value-type="string">
            <text:p>*through</text:p>
          </table:table-cell>
          <table:table-cell office:value-type="string">
            <text:p>QL/7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table:number-columns-repeated="2"/>
          <table:table-cell office:value-type="string">
            <text:p>PEQE</text:p>
          </table:table-cell>
          <table:table-cell office:value-type="string">
            <text:p>*comb</text:p>
          </table:table-cell>
          <table:table-cell office:value-type="string">
            <text:p>QL/7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S. per-</text:p>
          </table:table-cell>
          <table:table-cell office:value-type="string">
            <text:p>half</text:p>
          </table:table-cell>
          <table:table-cell table:number-columns-repeated="3"/>
          <table:table-cell office:value-type="string">
            <text:p>PER</text:p>
          </table:table-cell>
          <table:table-cell office:value-type="string">
            <text:p>divide in middle, halve</text:p>
          </table:table-cell>
          <table:table-cell office:value-type="string">
            <text:p>Ety/PER</text:p>
          </table:table-cell>
          <table:table-cell office:value-type="string">
            <text:p>PER</text:p>
          </table:table-cell>
          <table:table-cell office:value-type="string">
            <text:p>half</text:p>
          </table:table-cell>
          <table:table-cell office:value-type="string">
            <text:p>PE17/17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table:number-columns-repeated="2"/>
          <table:table-cell office:value-type="string">
            <text:p>PERE</text:p>
          </table:table-cell>
          <table:table-cell office:value-type="string">
            <text:p>*endure</text:p>
          </table:table-cell>
          <table:table-cell office:value-type="string">
            <text:p>QL/7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89">
            <text:p>689</text:p>
          </table:table-cell>
          <table:table-cell table:number-columns-repeated="5"/>
          <table:table-cell office:value-type="string">
            <text:p>PERES</text:p>
          </table:table-cell>
          <table:table-cell office:value-type="string">
            <text:p>affect, disturb, alter</text:p>
          </table:table-cell>
          <table:table-cell office:value-type="string">
            <text:p>Ety/PERE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table:number-columns-repeated="2"/>
          <table:table-cell office:value-type="string">
            <text:p>PETE</text:p>
          </table:table-cell>
          <table:table-cell office:value-type="string">
            <text:p>*knock, hammer</text:p>
          </table:table-cell>
          <table:table-cell office:value-type="string">
            <text:p>QL/7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table:number-columns-repeated="8"/>
          <table:table-cell office:value-type="string">
            <text:p>PEYE</text:p>
          </table:table-cell>
          <table:table-cell office:value-type="string">
            <text:p>*little</text:p>
          </table:table-cell>
          <table:table-cell office:value-type="string">
            <text:p>PE17/11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table:number-columns-repeated="8"/>
          <table:table-cell office:value-type="string">
            <text:p>PHA</text:p>
          </table:table-cell>
          <table:table-cell office:value-type="string">
            <text:p>exhalations</text:p>
          </table:table-cell>
          <table:table-cell office:value-type="string">
            <text:p>NM/23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table:number-columns-repeated="8"/>
          <table:table-cell office:value-type="string">
            <text:p>PHĀ/APHA</text:p>
          </table:table-cell>
          <table:table-cell office:value-type="string">
            <text:p>before of time</text:p>
          </table:table-cell>
          <table:table-cell office:value-type="string">
            <text:p>PE22/14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94">
            <text:p>694</text:p>
          </table:table-cell>
          <table:table-cell office:value-type="string">
            <text:p>Q. falasse</text:p>
          </table:table-cell>
          <table:table-cell office:value-type="string">
            <text:p>shore, beach</text:p>
          </table:table-cell>
          <table:table-cell office:value-type="string">
            <text:p>FALA</text:p>
          </table:table-cell>
          <table:table-cell office:value-type="string">
            <text:p>*foam, wave</text:p>
          </table:table-cell>
          <table:table-cell office:value-type="string">
            <text:p>QL/37</text:p>
          </table:table-cell>
          <table:table-cell office:value-type="string">
            <text:p>PHAL(AS)</text:p>
          </table:table-cell>
          <table:table-cell office:value-type="string">
            <text:p>foam</text:p>
          </table:table-cell>
          <table:table-cell office:value-type="string">
            <text:p>Ety/PHAL</text:p>
          </table:table-cell>
          <table:table-cell office:value-type="string">
            <text:p>PHAL</text:p>
          </table:table-cell>
          <table:table-cell office:value-type="string">
            <text:p>foam</text:p>
          </table:table-cell>
          <table:table-cell office:value-type="string">
            <text:p>PE17/6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Q. fanya</text:p>
          </table:table-cell>
          <table:table-cell office:value-type="string">
            <text:p>cloud</text:p>
          </table:table-cell>
          <table:table-cell office:value-type="string">
            <text:p>FANA/FṆTṆ</text:p>
          </table:table-cell>
          <table:table-cell office:value-type="string">
            <text:p>*dream, vision</text:p>
          </table:table-cell>
          <table:table-cell office:value-type="string">
            <text:p>QL/37</text:p>
          </table:table-cell>
          <table:table-cell table:number-columns-repeated="3"/>
          <table:table-cell office:value-type="string">
            <text:p>FAN</text:p>
          </table:table-cell>
          <table:table-cell office:value-type="string">
            <text:p>shape, vision; veil</text:p>
          </table:table-cell>
          <table:table-cell office:value-type="string">
            <text:p>PE17/26; RGEO/66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96">
            <text:p>696</text:p>
          </table:table-cell>
          <table:table-cell table:number-columns-repeated="2"/>
          <table:table-cell office:value-type="string">
            <text:p>G. fad</text:p>
          </table:table-cell>
          <table:table-cell office:value-type="string">
            <text:p>enough</text:p>
          </table:table-cell>
          <table:table-cell office:value-type="string">
            <text:p>GL/33</text:p>
          </table:table-cell>
          <table:table-cell office:value-type="string">
            <text:p>PHAR</text:p>
          </table:table-cell>
          <table:table-cell office:value-type="string">
            <text:p>reach, suffice</text:p>
          </table:table-cell>
          <table:table-cell office:value-type="string">
            <text:p>Ety/PHAR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97">
            <text:p>697</text:p>
          </table:table-cell>
          <table:table-cell table:number-columns-repeated="5"/>
          <table:table-cell office:value-type="string">
            <text:p>PHER(EN)</text:p>
          </table:table-cell>
          <table:table-cell office:value-type="string">
            <text:p>beech</text:p>
          </table:table-cell>
          <table:table-cell office:value-type="string">
            <text:p>Ety/PHER</text:p>
          </table:table-cell>
          <table:table-cell office:value-type="string">
            <text:p>PHAR</text:p>
          </table:table-cell>
          <table:table-cell office:value-type="string">
            <text:p>*rowan</text:p>
          </table:table-cell>
          <table:table-cell office:value-type="string">
            <text:p>PE17/83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98">
            <text:p>698</text:p>
          </table:table-cell>
          <table:table-cell table:number-columns-repeated="2"/>
          <table:table-cell office:value-type="string">
            <text:p>Q. fas/G. fath</text:p>
          </table:table-cell>
          <table:table-cell office:value-type="string">
            <text:p>tassel</text:p>
          </table:table-cell>
          <table:table-cell office:value-type="string">
            <text:p>QL/37; GL/34</text:p>
          </table:table-cell>
          <table:table-cell office:value-type="string">
            <text:p>PHAS</text:p>
          </table:table-cell>
          <table:table-cell office:value-type="string">
            <text:p>*tangle, shag, fringe</text:p>
          </table:table-cell>
          <table:table-cell office:value-type="string">
            <text:p>Ety/PHAS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99">
            <text:p>699</text:p>
          </table:table-cell>
          <table:table-cell table:number-columns-repeated="2"/>
          <table:table-cell office:value-type="string">
            <text:p>FAGA</text:p>
          </table:table-cell>
          <table:table-cell office:value-type="string">
            <text:p>*blow</text:p>
          </table:table-cell>
          <table:table-cell office:value-type="string">
            <text:p>QL/37</text:p>
          </table:table-cell>
          <table:table-cell office:value-type="string">
            <text:p>PHAU</text:p>
          </table:table-cell>
          <table:table-cell office:value-type="string">
            <text:p>gape</text:p>
          </table:table-cell>
          <table:table-cell office:value-type="string">
            <text:p>Ety/PHAU</text:p>
          </table:table-cell>
          <table:table-cell office:value-type="string">
            <text:p>PHAW</text:p>
          </table:table-cell>
          <table:table-cell office:value-type="string">
            <text:p>emit (foul breath etc.)</text:p>
          </table:table-cell>
          <table:table-cell office:value-type="string">
            <text:p>PE17/181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S. Feanor</text:p>
          </table:table-cell>
          <table:table-cell table:number-columns-repeated="4"/>
          <table:table-cell office:value-type="string">
            <text:p>PHAY</text:p>
          </table:table-cell>
          <table:table-cell office:value-type="string">
            <text:p>radiate, send out rays of light</text:p>
          </table:table-cell>
          <table:table-cell office:value-type="string">
            <text:p>Ety/PHAY</text:p>
          </table:table-cell>
          <table:table-cell office:value-type="string">
            <text:p>PHAYA</text:p>
          </table:table-cell>
          <table:table-cell office:value-type="string">
            <text:p>spirit</text:p>
          </table:table-cell>
          <table:table-cell office:value-type="string">
            <text:p>PM/352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01">
            <text:p>701</text:p>
          </table:table-cell>
          <table:table-cell table:number-columns-repeated="5"/>
          <table:table-cell office:value-type="string">
            <text:p>PHEG</text:p>
          </table:table-cell>
          <table:table-cell office:value-type="string">
            <text:p>inner part, pith, core</text:p>
          </table:table-cell>
          <table:table-cell office:value-type="string">
            <text:p>EtyAC/PHE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table:number-columns-repeated="8"/>
          <table:table-cell office:value-type="string">
            <text:p>PHEL</text:p>
          </table:table-cell>
          <table:table-cell office:value-type="string">
            <text:p>*emotion</text:p>
          </table:table-cell>
          <table:table-cell office:value-type="string">
            <text:p>VT41/1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S. fela</text:p>
          </table:table-cell>
          <table:table-cell office:value-type="string">
            <text:p>mine; cave</text:p>
          </table:table-cell>
          <table:table-cell table:number-columns-repeated="3"/>
          <table:table-cell office:value-type="string">
            <text:p>PHELEG</text:p>
          </table:table-cell>
          <table:table-cell office:value-type="string">
            <text:p>cave</text:p>
          </table:table-cell>
          <table:table-cell office:value-type="string">
            <text:p>Ety/PHELEG</text:p>
          </table:table-cell>
          <table:table-cell table:style-name="ce3" office:value-type="string">
            <text:p>PHELEK/PHELES</text:p>
          </table:table-cell>
          <table:table-cell office:value-type="string">
            <text:p>*cave</text:p>
          </table:table-cell>
          <table:table-cell office:value-type="string">
            <text:p>PE17/118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S. fenn</text:p>
          </table:table-cell>
          <table:table-cell office:value-type="string">
            <text:p>door</text:p>
          </table:table-cell>
          <table:table-cell table:number-columns-repeated="3"/>
          <table:table-cell office:value-type="string">
            <text:p>PHEN</text:p>
          </table:table-cell>
          <table:table-cell office:value-type="string">
            <text:p>*door</text:p>
          </table:table-cell>
          <table:table-cell office:value-type="string">
            <text:p>Ety/PHEN</text:p>
          </table:table-cell>
          <table:table-cell office:value-type="string">
            <text:p>PHEN</text:p>
          </table:table-cell>
          <table:table-cell office:value-type="string">
            <text:p>door</text:p>
          </table:table-cell>
          <table:table-cell office:value-type="string">
            <text:p>PE17/18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table:number-columns-repeated="8"/>
          <table:table-cell office:value-type="string">
            <text:p>PHERE</text:p>
          </table:table-cell>
          <table:table-cell office:value-type="string">
            <text:p>*ready, prompt</text:p>
          </table:table-cell>
          <table:table-cell office:value-type="string">
            <text:p>PE17/18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table:number-columns-repeated="5"/>
          <table:table-cell office:value-type="string">
            <text:p>PHEW</text:p>
          </table:table-cell>
          <table:table-cell office:value-type="string">
            <text:p>feel disgust at, abhor</text:p>
          </table:table-cell>
          <table:table-cell office:value-type="string">
            <text:p>ETY/PHEW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07">
            <text:p>707</text:p>
          </table:table-cell>
          <table:table-cell table:number-columns-repeated="5"/>
          <table:table-cell office:value-type="string">
            <text:p>PHI</text:p>
          </table:table-cell>
          <table:table-cell office:value-type="string">
            <text:p>?hawk</text:p>
          </table:table-cell>
          <table:table-cell office:value-type="string">
            <text:p>Ety/PHI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S./N. flinc</text:p>
          </table:table-cell>
          <table:table-cell office:value-type="string">
            <text:p>finch</text:p>
          </table:table-cell>
          <table:table-cell table:number-columns-repeated="3"/>
          <table:table-cell office:value-type="string">
            <text:p>PHILIK</text:p>
          </table:table-cell>
          <table:table-cell office:value-type="string">
            <text:p>small bird</text:p>
          </table:table-cell>
          <table:table-cell office:value-type="string">
            <text:p>Ety/PHILIK</text:p>
          </table:table-cell>
          <table:table-cell office:value-type="string">
            <text:p>PHILIK</text:p>
          </table:table-cell>
          <table:table-cell office:value-type="string">
            <text:p>finch</text:p>
          </table:table-cell>
          <table:table-cell office:value-type="string">
            <text:p>PE21/7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table:number-columns-repeated="8"/>
          <table:table-cell office:value-type="string">
            <text:p>PHIM</text:p>
          </table:table-cell>
          <table:table-cell office:value-type="string">
            <text:p>*slender, slim</text:p>
          </table:table-cell>
          <table:table-cell office:value-type="string">
            <text:p>PE17/2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Q. Finwe</text:p>
          </table:table-cell>
          <table:table-cell/>
          <table:table-cell office:value-type="string">
            <text:p>FINI</text:p>
          </table:table-cell>
          <table:table-cell office:value-type="string">
            <text:p>*cunning</text:p>
          </table:table-cell>
          <table:table-cell office:value-type="string">
            <text:p>QL/38</text:p>
          </table:table-cell>
          <table:table-cell office:value-type="string">
            <text:p>PHIN</text:p>
          </table:table-cell>
          <table:table-cell office:value-type="string">
            <text:p>nimbleness, skill</text:p>
          </table:table-cell>
          <table:table-cell office:value-type="string">
            <text:p>Ety/PHIN</text:p>
          </table:table-cell>
          <table:table-cell office:value-type="string">
            <text:p>PHIN</text:p>
          </table:table-cell>
          <table:table-cell office:value-type="string">
            <text:p>skilful, neat, clever</text:p>
          </table:table-cell>
          <table:table-cell office:value-type="string">
            <text:p>PE17/1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Q. firya</text:p>
          </table:table-cell>
          <table:table-cell office:value-type="string">
            <text:p>mortal, human</text:p>
          </table:table-cell>
          <table:table-cell table:number-columns-repeated="3"/>
          <table:table-cell office:value-type="string">
            <text:p>PHIR</text:p>
          </table:table-cell>
          <table:table-cell office:value-type="string">
            <text:p>die of natural causes</text:p>
          </table:table-cell>
          <table:table-cell office:value-type="string">
            <text:p>Ety/PHIR; EtyAC/ÑGUR</text:p>
          </table:table-cell>
          <table:table-cell office:value-type="string">
            <text:p>PHIRI</text:p>
          </table:table-cell>
          <table:table-cell office:value-type="string">
            <text:p>exhale, expire</text:p>
          </table:table-cell>
          <table:table-cell office:value-type="string">
            <text:p>WJ/38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table:number-columns-repeated="8"/>
          <table:table-cell office:value-type="string">
            <text:p>PHŌ/Ū</text:p>
          </table:table-cell>
          <table:table-cell office:value-type="string">
            <text:p>interjection of displeasure</text:p>
          </table:table-cell>
          <table:table-cell office:value-type="string">
            <text:p>PE17/18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Q. formen</text:p>
          </table:table-cell>
          <table:table-cell office:value-type="string">
            <text:p>north</text:p>
          </table:table-cell>
          <table:table-cell office:value-type="string">
            <text:p>PO</text:p>
          </table:table-cell>
          <table:table-cell office:value-type="string">
            <text:p>*north</text:p>
          </table:table-cell>
          <table:table-cell office:value-type="string">
            <text:p>QL/74</text:p>
          </table:table-cell>
          <table:table-cell office:value-type="string">
            <text:p>PHOR</text:p>
          </table:table-cell>
          <table:table-cell office:value-type="string">
            <text:p>right-hand</text:p>
          </table:table-cell>
          <table:table-cell office:value-type="string">
            <text:p>Ety/PHOR</text:p>
          </table:table-cell>
          <table:table-cell office:value-type="string">
            <text:p>S. forod</text:p>
          </table:table-cell>
          <table:table-cell office:value-type="string">
            <text:p>north</text:p>
          </table:table-cell>
          <table:table-cell office:value-type="string">
            <text:p>LotR/112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S. fuin</text:p>
          </table:table-cell>
          <table:table-cell office:value-type="string">
            <text:p>night</text:p>
          </table:table-cell>
          <table:table-cell office:value-type="string">
            <text:p>ǶUẎU</text:p>
          </table:table-cell>
          <table:table-cell office:value-type="string">
            <text:p>*darkness</text:p>
          </table:table-cell>
          <table:table-cell office:value-type="string">
            <text:p>QL/41</text:p>
          </table:table-cell>
          <table:table-cell office:value-type="string">
            <text:p>PHUY</text:p>
          </table:table-cell>
          <table:table-cell office:value-type="string">
            <text:p>*darkness</text:p>
          </table:table-cell>
          <table:table-cell office:value-type="string">
            <text:p>Ety/PHUY</text:p>
          </table:table-cell>
          <table:table-cell office:value-type="string">
            <text:p>PHUY</text:p>
          </table:table-cell>
          <table:table-cell office:value-type="string">
            <text:p>{fog, mists}; breathe out</text:p>
          </table:table-cell>
          <table:table-cell office:value-type="string">
            <text:p>NM/284-285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15">
            <text:p>715</text:p>
          </table:table-cell>
          <table:table-cell table:number-columns-repeated="2"/>
          <table:table-cell office:value-type="string">
            <text:p>PIKI/PINI</text:p>
          </table:table-cell>
          <table:table-cell office:value-type="string">
            <text:p>*small</text:p>
          </table:table-cell>
          <table:table-cell office:value-type="string">
            <text:p>QL/73</text:p>
          </table:table-cell>
          <table:table-cell office:value-type="string">
            <text:p>PIK</text:p>
          </table:table-cell>
          <table:table-cell office:value-type="string">
            <text:p>*little, tiny</text:p>
          </table:table-cell>
          <table:table-cell office:value-type="string">
            <text:p>Ety/PIK</text:p>
          </table:table-cell>
          <table:table-cell office:value-type="string">
            <text:p>Q. pikina/S. pîn</text:p>
          </table:table-cell>
          <table:table-cell office:value-type="string">
            <text:p>little</text:p>
          </table:table-cell>
          <table:table-cell office:value-type="string">
            <text:p>PE17/115; RC/53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table:number-columns-repeated="2"/>
          <table:table-cell table:style-name="ce3" office:value-type="string">
            <text:p>PILI¹</text:p>
          </table:table-cell>
          <table:table-cell office:value-type="string">
            <text:p>rob</text:p>
          </table:table-cell>
          <table:table-cell office:value-type="string">
            <text:p>QL/7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Q. pilin</text:p>
          </table:table-cell>
          <table:table-cell office:value-type="string">
            <text:p>arrow</text:p>
          </table:table-cell>
          <table:table-cell table:style-name="ce3" office:value-type="string">
            <text:p>PILI²</text:p>
          </table:table-cell>
          <table:table-cell office:value-type="string">
            <text:p>*feather</text:p>
          </table:table-cell>
          <table:table-cell office:value-type="string">
            <text:p>QL/74</text:p>
          </table:table-cell>
          <table:table-cell office:value-type="string">
            <text:p>PILIN</text:p>
          </table:table-cell>
          <table:table-cell office:value-type="string">
            <text:p>*arrow</text:p>
          </table:table-cell>
          <table:table-cell office:value-type="string">
            <text:p>Ety/PÍLIM; EtyAC/PÍLIM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18">
            <text:p>718</text:p>
          </table:table-cell>
          <table:table-cell table:number-columns-repeated="2"/>
          <table:table-cell table:style-name="ce3" office:value-type="string">
            <text:p>PIO</text:p>
          </table:table-cell>
          <table:table-cell office:value-type="string">
            <text:p>plum</text:p>
          </table:table-cell>
          <table:table-cell office:value-type="string">
            <text:p>QL/7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table:number-columns-repeated="2"/>
          <table:table-cell office:value-type="string">
            <text:p>PIPI</text:p>
          </table:table-cell>
          <table:table-cell office:value-type="string">
            <text:p>hang, trail</text:p>
          </table:table-cell>
          <table:table-cell office:value-type="string">
            <text:p>QL/7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table:number-columns-repeated="2"/>
          <table:table-cell office:value-type="string">
            <text:p>PIQI</text:p>
          </table:table-cell>
          <table:table-cell office:value-type="string">
            <text:p>*bitter</text:p>
          </table:table-cell>
          <table:table-cell office:value-type="string">
            <text:p>QL/7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table:number-columns-repeated="8"/>
          <table:table-cell office:value-type="string">
            <text:p>PIR</text:p>
          </table:table-cell>
          <table:table-cell office:value-type="string">
            <text:p>close eyes, blink, wink</text:p>
          </table:table-cell>
          <table:table-cell office:value-type="string">
            <text:p>PE17/14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table:number-columns-repeated="2"/>
          <table:table-cell office:value-type="string">
            <text:p>PIRI</text:p>
          </table:table-cell>
          <table:table-cell office:value-type="string">
            <text:p>*spin</text:p>
          </table:table-cell>
          <table:table-cell office:value-type="string">
            <text:p>QL/7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23">
            <text:p>723</text:p>
          </table:table-cell>
          <table:table-cell table:number-columns-repeated="5"/>
          <table:table-cell office:value-type="string">
            <text:p>PIS</text:p>
          </table:table-cell>
          <table:table-cell office:value-type="string">
            <text:p>*juice</text:p>
          </table:table-cell>
          <table:table-cell office:value-type="string">
            <text:p>Ety/PI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Q. pis-</text:p>
          </table:table-cell>
          <table:table-cell office:value-type="string">
            <text:p>spit</text:p>
          </table:table-cell>
          <table:table-cell office:value-type="string">
            <text:p>PṢT</text:p>
          </table:table-cell>
          <table:table-cell office:value-type="string">
            <text:p>spit</text:p>
          </table:table-cell>
          <table:table-cell office:value-type="string">
            <text:p>PE14/58</text:p>
          </table:table-cell>
          <table:table-cell office:value-type="string">
            <text:p>PITH</text:p>
          </table:table-cell>
          <table:table-cell office:value-type="string">
            <text:p>spit</text:p>
          </table:table-cell>
          <table:table-cell office:value-type="string">
            <text:p>PE22/103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25">
            <text:p>725</text:p>
          </table:table-cell>
          <table:table-cell table:number-columns-repeated="5"/>
          <table:table-cell office:value-type="string">
            <text:p>PIW</text:p>
          </table:table-cell>
          <table:table-cell office:value-type="string">
            <text:p>spit</text:p>
          </table:table-cell>
          <table:table-cell office:value-type="string">
            <text:p>Ety/PIW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table:number-columns-repeated="2"/>
          <table:table-cell office:value-type="string">
            <text:p>PIẆI</text:p>
          </table:table-cell>
          <table:table-cell office:value-type="string">
            <text:p>*fat</text:p>
          </table:table-cell>
          <table:table-cell office:value-type="string">
            <text:p>QL/7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table:number-columns-repeated="2"/>
          <table:table-cell office:value-type="string">
            <text:p>PḶQḶ</text:p>
          </table:table-cell>
          <table:table-cell office:value-type="string">
            <text:p>*juice</text:p>
          </table:table-cell>
          <table:table-cell office:value-type="string">
            <text:p>QL/7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table:number-columns-repeated="2"/>
          <table:table-cell office:value-type="string">
            <text:p>PḶT͡YḶ</text:p>
          </table:table-cell>
          <table:table-cell office:value-type="string">
            <text:p>*strike, flat of hand</text:p>
          </table:table-cell>
          <table:table-cell office:value-type="string">
            <text:p>QL/7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table:number-columns-repeated="2"/>
          <table:table-cell office:value-type="string">
            <text:p>POKO</text:p>
          </table:table-cell>
          <table:table-cell office:value-type="string">
            <text:p>tuck (away)</text:p>
          </table:table-cell>
          <table:table-cell office:value-type="string">
            <text:p>QL/7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table:number-columns-repeated="2"/>
          <table:table-cell office:value-type="string">
            <text:p>POLO</text:p>
          </table:table-cell>
          <table:table-cell office:value-type="string">
            <text:p>have stength</text:p>
          </table:table-cell>
          <table:table-cell office:value-type="string">
            <text:p>QL/75</text:p>
          </table:table-cell>
          <table:table-cell office:value-type="string">
            <text:p>POL(OD)</text:p>
          </table:table-cell>
          <table:table-cell office:value-type="string">
            <text:p>physically strong</text:p>
          </table:table-cell>
          <table:table-cell office:value-type="string">
            <text:p>Ety/POL</text:p>
          </table:table-cell>
          <table:table-cell office:value-type="string">
            <text:p>POL</text:p>
          </table:table-cell>
          <table:table-cell office:value-type="string">
            <text:p>have physical power and ability</text:p>
          </table:table-cell>
          <table:table-cell office:value-type="string">
            <text:p>PE17/181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31">
            <text:p>731</text:p>
          </table:table-cell>
          <table:table-cell table:number-columns-repeated="2"/>
          <table:table-cell office:value-type="string">
            <text:p>POL-I</text:p>
          </table:table-cell>
          <table:table-cell office:value-type="string">
            <text:p>*grain</text:p>
          </table:table-cell>
          <table:table-cell office:value-type="string">
            <text:p>QL/75</text:p>
          </table:table-cell>
          <table:table-cell office:value-type="string">
            <text:p>POR</text:p>
          </table:table-cell>
          <table:table-cell office:value-type="string">
            <text:p>*meal, flour</text:p>
          </table:table-cell>
          <table:table-cell office:value-type="string">
            <text:p>Ety/POR</text:p>
          </table:table-cell>
          <table:table-cell office:value-type="string">
            <text:p>POL</text:p>
          </table:table-cell>
          <table:table-cell office:value-type="string">
            <text:p>pound, reduce to powder</text:p>
          </table:table-cell>
          <table:table-cell office:value-type="string">
            <text:p>PE17/181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32">
            <text:p>732</text:p>
          </table:table-cell>
          <table:table-cell table:number-columns-repeated="2"/>
          <table:table-cell office:value-type="string">
            <text:p>Q. poroke</text:p>
          </table:table-cell>
          <table:table-cell office:value-type="string">
            <text:p>barn fowl, hen</text:p>
          </table:table-cell>
          <table:table-cell office:value-type="string">
            <text:p>QL/75</text:p>
          </table:table-cell>
          <table:table-cell table:number-columns-repeated="3"/>
          <table:table-cell office:value-type="string">
            <text:p>POROK/KOROK</text:p>
          </table:table-cell>
          <table:table-cell office:value-type="string">
            <text:p>hen</text:p>
          </table:table-cell>
          <table:table-cell office:value-type="string">
            <text:p>VT47/36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33">
            <text:p>733</text:p>
          </table:table-cell>
          <table:table-cell table:number-columns-repeated="5"/>
          <table:table-cell office:value-type="string">
            <text:p>POTO</text:p>
          </table:table-cell>
          <table:table-cell office:value-type="string">
            <text:p>animal’s foot</text:p>
          </table:table-cell>
          <table:table-cell office:value-type="string">
            <text:p>Ety/POTŌ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34">
            <text:p>734</text:p>
          </table:table-cell>
          <table:table-cell office:value-type="string">
            <text:p>Q. poika</text:p>
          </table:table-cell>
          <table:table-cell office:value-type="string">
            <text:p>clean</text:p>
          </table:table-cell>
          <table:table-cell office:value-type="string">
            <text:p>POYO</text:p>
          </table:table-cell>
          <table:table-cell office:value-type="string">
            <text:p>*clean</text:p>
          </table:table-cell>
          <table:table-cell office:value-type="string">
            <text:p>QL/75</text:p>
          </table:table-cell>
          <table:table-cell office:value-type="string">
            <text:p>POY</text:p>
          </table:table-cell>
          <table:table-cell office:value-type="string">
            <text:p>clean</text:p>
          </table:table-cell>
          <table:table-cell office:value-type="string">
            <text:p>Ety/POY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table:number-columns-repeated="2"/>
          <table:table-cell office:value-type="string">
            <text:p>PU(HU)</text:p>
          </table:table-cell>
          <table:table-cell office:value-type="string">
            <text:p>generate</text:p>
          </table:table-cell>
          <table:table-cell office:value-type="string">
            <text:p>QL/7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table:number-columns-repeated="2"/>
          <table:table-cell office:value-type="string">
            <text:p>PULU</text:p>
          </table:table-cell>
          <table:table-cell office:value-type="string">
            <text:p>swell</text:p>
          </table:table-cell>
          <table:table-cell office:value-type="string">
            <text:p>QL/7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table:number-columns-repeated="2"/>
          <table:table-cell office:value-type="string">
            <text:p>PUMU/PUPU</text:p>
          </table:table-cell>
          <table:table-cell office:value-type="string">
            <text:p>*bubble</text:p>
          </table:table-cell>
          <table:table-cell office:value-type="string">
            <text:p>QL/7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table:number-columns-repeated="2"/>
          <table:table-cell office:value-type="string">
            <text:p>PUŘU</text:p>
          </table:table-cell>
          <table:table-cell office:value-type="string">
            <text:p>consume by fire</text:p>
          </table:table-cell>
          <table:table-cell office:value-type="string">
            <text:p>QL/7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table:number-columns-repeated="2"/>
          <table:table-cell office:value-type="string">
            <text:p>PUSU</text:p>
          </table:table-cell>
          <table:table-cell office:value-type="string">
            <text:p>puff, blow, make swell</text:p>
          </table:table-cell>
          <table:table-cell office:value-type="string">
            <text:p>QL/7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table:number-columns-repeated="5"/>
          <table:table-cell office:value-type="string">
            <text:p>PUS/PUT</text:p>
          </table:table-cell>
          <table:table-cell office:value-type="string">
            <text:p>stop, halt, pause</text:p>
          </table:table-cell>
          <table:table-cell office:value-type="string">
            <text:p>Ety/PU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table:number-columns-repeated="2"/>
          <table:table-cell office:value-type="string">
            <text:p>QAPA</text:p>
          </table:table-cell>
          <table:table-cell office:value-type="string">
            <text:p>chaffer</text:p>
          </table:table-cell>
          <table:table-cell office:value-type="string">
            <text:p>QL/7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table:number-columns-repeated="2"/>
          <table:table-cell office:value-type="string">
            <text:p>QARA/GWAR</text:p>
          </table:table-cell>
          <table:table-cell office:value-type="string">
            <text:p>care for, guard</text:p>
          </table:table-cell>
          <table:table-cell office:value-type="string">
            <text:p>QL/7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table:number-columns-repeated="2"/>
          <table:table-cell office:value-type="string">
            <text:p>QASA</text:p>
          </table:table-cell>
          <table:table-cell office:value-type="string">
            <text:p>*shake</text:p>
          </table:table-cell>
          <table:table-cell office:value-type="string">
            <text:p>QL/7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table:number-columns-repeated="2"/>
          <table:table-cell office:value-type="string">
            <text:p>QEL+U</text:p>
          </table:table-cell>
          <table:table-cell office:value-type="string">
            <text:p>*well up</text:p>
          </table:table-cell>
          <table:table-cell office:value-type="string">
            <text:p>QL/7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table:number-columns-repeated="2"/>
          <table:table-cell office:value-type="string">
            <text:p>QIŘI</text:p>
          </table:table-cell>
          <table:table-cell office:value-type="string">
            <text:p>*stir, spin</text:p>
          </table:table-cell>
          <table:table-cell office:value-type="string">
            <text:p>QL/7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table:number-columns-repeated="2"/>
          <table:table-cell office:value-type="string">
            <text:p>QILI</text:p>
          </table:table-cell>
          <table:table-cell office:value-type="string">
            <text:p>*color</text:p>
          </table:table-cell>
          <table:table-cell office:value-type="string">
            <text:p>QL/7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table:number-columns-repeated="2"/>
          <table:table-cell office:value-type="string">
            <text:p>QIMI</text:p>
          </table:table-cell>
          <table:table-cell office:value-type="string">
            <text:p>*woman</text:p>
          </table:table-cell>
          <table:table-cell office:value-type="string">
            <text:p>QL/7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table:number-columns-repeated="2"/>
          <table:table-cell office:value-type="string">
            <text:p>QINI</text:p>
          </table:table-cell>
          <table:table-cell office:value-type="string">
            <text:p>*squeak</text:p>
          </table:table-cell>
          <table:table-cell office:value-type="string">
            <text:p>QL/7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table:number-columns-repeated="2"/>
          <table:table-cell office:value-type="string">
            <text:p>QIQI</text:p>
          </table:table-cell>
          <table:table-cell office:value-type="string">
            <text:p>*droop</text:p>
          </table:table-cell>
          <table:table-cell office:value-type="string">
            <text:p>QL/7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table:number-columns-repeated="2"/>
          <table:table-cell office:value-type="string">
            <text:p>QIP</text:p>
          </table:table-cell>
          <table:table-cell office:value-type="string">
            <text:p>*awaken</text:p>
          </table:table-cell>
          <table:table-cell office:value-type="string">
            <text:p>GL/2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table:number-columns-repeated="2"/>
          <table:table-cell office:value-type="string">
            <text:p>QISI/QIRI</text:p>
          </table:table-cell>
          <table:table-cell office:value-type="string">
            <text:p>*whisper</text:p>
          </table:table-cell>
          <table:table-cell office:value-type="string">
            <text:p>QL/7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table:number-columns-repeated="2"/>
          <table:table-cell office:value-type="string">
            <text:p>QIT͡YI</text:p>
          </table:table-cell>
          <table:table-cell office:value-type="string">
            <text:p>*knit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table:number-columns-repeated="2"/>
          <table:table-cell office:value-type="string">
            <text:p>QḶŘḶ</text:p>
          </table:table-cell>
          <table:table-cell office:value-type="string">
            <text:p>*quiet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table:number-columns-repeated="2"/>
          <table:table-cell office:value-type="string">
            <text:p>QḶTḶ</text:p>
          </table:table-cell>
          <table:table-cell office:value-type="string">
            <text:p>*belt, girdle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table:number-columns-repeated="2"/>
          <table:table-cell office:value-type="string">
            <text:p>QOLO</text:p>
          </table:table-cell>
          <table:table-cell office:value-type="string">
            <text:p>sick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table:number-columns-repeated="2"/>
          <table:table-cell office:value-type="string">
            <text:p>QOŘO/QOSO</text:p>
          </table:table-cell>
          <table:table-cell office:value-type="string">
            <text:p>*choke, drown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table:number-columns-repeated="2"/>
          <table:table-cell office:value-type="string">
            <text:p>QOTO</text:p>
          </table:table-cell>
          <table:table-cell office:value-type="string">
            <text:p>count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table:number-columns-repeated="2"/>
          <table:table-cell office:value-type="string">
            <text:p>QṚŘṚ/QARA</text:p>
          </table:table-cell>
          <table:table-cell office:value-type="string">
            <text:p>*wicked, evil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table:number-columns-repeated="8"/>
          <table:table-cell office:value-type="string">
            <text:p>RĀ/ARA</text:p>
          </table:table-cell>
          <table:table-cell office:value-type="string">
            <text:p>noble</text:p>
          </table:table-cell>
          <table:table-cell office:value-type="string">
            <text:p>PM/34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table:number-columns-repeated="5"/>
          <table:table-cell office:value-type="string">
            <text:p>RAB</text:p>
          </table:table-cell>
          <table:table-cell office:value-type="string">
            <text:p>*wild</text:p>
          </table:table-cell>
          <table:table-cell office:value-type="string">
            <text:p>Ety/RAB</text:p>
          </table:table-cell>
          <table:table-cell office:value-type="string">
            <text:p>RAB</text:p>
          </table:table-cell>
          <table:table-cell office:value-type="string">
            <text:p>astray, wandering, unsettled</text:p>
          </table:table-cell>
          <table:table-cell office:value-type="string">
            <text:p>PE17/78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Q. ramba</text:p>
          </table:table-cell>
          <table:table-cell office:value-type="string">
            <text:p>wall</text:p>
          </table:table-cell>
          <table:table-cell table:number-columns-repeated="3"/>
          <table:table-cell office:value-type="string">
            <text:p>RAMBĀ</text:p>
          </table:table-cell>
          <table:table-cell office:value-type="string">
            <text:p>wall</text:p>
          </table:table-cell>
          <table:table-cell office:value-type="string">
            <text:p>Ety/RAMBĀ</text:p>
          </table:table-cell>
          <table:table-cell office:value-type="string">
            <text:p>S. rammas</text:p>
          </table:table-cell>
          <table:table-cell office:value-type="string">
            <text:p>great wall</text:p>
          </table:table-cell>
          <table:table-cell office:value-type="string">
            <text:p>RC/51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62">
            <text:p>762</text:p>
          </table:table-cell>
          <table:table-cell table:number-columns-repeated="5"/>
          <table:table-cell office:value-type="string">
            <text:p>RAD</text:p>
          </table:table-cell>
          <table:table-cell office:value-type="string">
            <text:p>back, return</text:p>
          </table:table-cell>
          <table:table-cell office:value-type="string">
            <text:p>Ety/RA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63">
            <text:p>763</text:p>
          </table:table-cell>
          <table:table-cell table:number-columns-repeated="5"/>
          <table:table-cell office:value-type="string">
            <text:p>RAK</text:p>
          </table:table-cell>
          <table:table-cell office:value-type="string">
            <text:p>stretch out, reach</text:p>
          </table:table-cell>
          <table:table-cell office:value-type="string">
            <text:p>Ety/RA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table:number-columns-repeated="2"/>
          <table:table-cell office:value-type="string">
            <text:p>RAKA</text:p>
          </table:table-cell>
          <table:table-cell office:value-type="string">
            <text:p>pile up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Q. ráma</text:p>
          </table:table-cell>
          <table:table-cell office:value-type="string">
            <text:p>wing</text:p>
          </table:table-cell>
          <table:table-cell office:value-type="string">
            <text:p>RAHA</text:p>
          </table:table-cell>
          <table:table-cell office:value-type="string">
            <text:p>stretch forward</text:p>
          </table:table-cell>
          <table:table-cell office:value-type="string">
            <text:p>QL/32, 78</text:p>
          </table:table-cell>
          <table:table-cell office:value-type="string">
            <text:p>RAM</text:p>
          </table:table-cell>
          <table:table-cell office:value-type="string">
            <text:p>*wing</text:p>
          </table:table-cell>
          <table:table-cell office:value-type="string">
            <text:p>Ety/RAM</text:p>
          </table:table-cell>
          <table:table-cell office:value-type="string">
            <text:p>Q. ráma</text:p>
          </table:table-cell>
          <table:table-cell office:value-type="string">
            <text:p>wing</text:p>
          </table:table-cell>
          <table:table-cell office:value-type="string">
            <text:p>PE17/6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table:number-columns-repeated="2"/>
          <table:table-cell office:value-type="string">
            <text:p>RAMA</text:p>
          </table:table-cell>
          <table:table-cell office:value-type="string">
            <text:p>*shout</text:p>
          </table:table-cell>
          <table:table-cell office:value-type="string">
            <text:p>QL/7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S. randir</text:p>
          </table:table-cell>
          <table:table-cell office:value-type="string">
            <text:p>wanderer</text:p>
          </table:table-cell>
          <table:table-cell table:number-columns-repeated="3"/>
          <table:table-cell office:value-type="string">
            <text:p>RAN</text:p>
          </table:table-cell>
          <table:table-cell office:value-type="string">
            <text:p>wander, stray</text:p>
          </table:table-cell>
          <table:table-cell office:value-type="string">
            <text:p>Ety/RAN</text:p>
          </table:table-cell>
          <table:table-cell office:value-type="string">
            <text:p>RAN</text:p>
          </table:table-cell>
          <table:table-cell office:value-type="string">
            <text:p>wander, stray, meander</text:p>
          </table:table-cell>
          <table:table-cell office:value-type="string">
            <text:p>VT42/1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68">
            <text:p>768</text:p>
          </table:table-cell>
          <table:table-cell table:number-columns-repeated="5"/>
          <table:table-cell office:value-type="string">
            <text:p>RAP</text:p>
          </table:table-cell>
          <table:table-cell office:value-type="string">
            <text:p>bind</text:p>
          </table:table-cell>
          <table:table-cell office:value-type="string">
            <text:p>EtyAC/RAP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table:number-columns-repeated="2"/>
          <table:table-cell office:value-type="string">
            <text:p>RAPA</text:p>
          </table:table-cell>
          <table:table-cell office:value-type="string">
            <text:p>drag, pull</text:p>
          </table:table-cell>
          <table:table-cell office:value-type="string">
            <text:p>QL/7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table:number-columns-repeated="5"/>
          <table:table-cell office:value-type="string">
            <text:p>RAPH</text:p>
          </table:table-cell>
          <table:table-cell office:value-type="string">
            <text:p>snatch</text:p>
          </table:table-cell>
          <table:table-cell office:value-type="string">
            <text:p>PE22/102</text:p>
          </table:table-cell>
          <table:table-cell office:value-type="string">
            <text:p>RAPH</text:p>
          </table:table-cell>
          <table:table-cell table:number-columns-repeated="2" office:value-type="string">
            <text:p>seize, grab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table:number-columns-repeated="2"/>
          <table:table-cell office:value-type="string">
            <text:p>RAŘA</text:p>
          </table:table-cell>
          <table:table-cell office:value-type="string">
            <text:p>*peel</text:p>
          </table:table-cell>
          <table:table-cell office:value-type="string">
            <text:p>QL/7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Q. rasse</text:p>
          </table:table-cell>
          <table:table-cell office:value-type="string">
            <text:p>horn</text:p>
          </table:table-cell>
          <table:table-cell table:number-columns-repeated="3"/>
          <table:table-cell office:value-type="string">
            <text:p>RAS</text:p>
          </table:table-cell>
          <table:table-cell office:value-type="string">
            <text:p>stick up</text:p>
          </table:table-cell>
          <table:table-cell office:value-type="string">
            <text:p>Ety/RAS</text:p>
          </table:table-cell>
          <table:table-cell office:value-type="string">
            <text:p>RAS</text:p>
          </table:table-cell>
          <table:table-cell office:value-type="string">
            <text:p>horn</text:p>
          </table:table-cell>
          <table:table-cell office:value-type="string">
            <text:p>PE21/8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73">
            <text:p>773</text:p>
          </table:table-cell>
          <table:table-cell table:number-columns-repeated="5"/>
          <table:table-cell office:value-type="string">
            <text:p>RASAT</text:p>
          </table:table-cell>
          <table:table-cell office:value-type="string">
            <text:p>twelve</text:p>
          </table:table-cell>
          <table:table-cell office:value-type="string">
            <text:p>Ety/RÁSA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S. râd</text:p>
          </table:table-cell>
          <table:table-cell office:value-type="string">
            <text:p>path</text:p>
          </table:table-cell>
          <table:table-cell office:value-type="string">
            <text:p>G. rada</text:p>
          </table:table-cell>
          <table:table-cell office:value-type="string">
            <text:p>track, path, way</text:p>
          </table:table-cell>
          <table:table-cell office:value-type="string">
            <text:p>GL/64</text:p>
          </table:table-cell>
          <table:table-cell office:value-type="string">
            <text:p>RAT</text:p>
          </table:table-cell>
          <table:table-cell office:value-type="string">
            <text:p>walk</text:p>
          </table:table-cell>
          <table:table-cell office:value-type="string">
            <text:p>Ety/RAT</text:p>
          </table:table-cell>
          <table:table-cell office:value-type="string">
            <text:p>RAT</text:p>
          </table:table-cell>
          <table:table-cell office:value-type="string">
            <text:p>find a way</text:p>
          </table:table-cell>
          <table:table-cell office:value-type="string">
            <text:p>NM/36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table:number-columns-repeated="8"/>
          <table:table-cell office:value-type="string">
            <text:p>RAT</text:p>
          </table:table-cell>
          <table:table-cell office:value-type="string">
            <text:p>tower up</text:p>
          </table:table-cell>
          <table:table-cell office:value-type="string">
            <text:p>PE17/18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table:number-columns-repeated="2"/>
          <table:table-cell office:value-type="string">
            <text:p>RAÞA</text:p>
          </table:table-cell>
          <table:table-cell office:value-type="string">
            <text:p>*arch, bridge</text:p>
          </table:table-cell>
          <table:table-cell office:value-type="string">
            <text:p>QL/79</text:p>
          </table:table-cell>
          <table:table-cell office:value-type="string">
            <text:p>{RAP}</text:p>
          </table:table-cell>
          <table:table-cell office:value-type="string">
            <text:p>climb</text:p>
          </table:table-cell>
          <table:table-cell office:value-type="string">
            <text:p>PE22/127</text:p>
          </table:table-cell>
          <table:table-cell office:value-type="string">
            <text:p>RATH/{RAP}</text:p>
          </table:table-cell>
          <table:table-cell office:value-type="string">
            <text:p>climb</text:p>
          </table:table-cell>
          <table:table-cell office:value-type="string">
            <text:p>NM/363, 367</text:p>
          </table:table-cell>
          <table:table-cell office:value-type="string">
            <text:p>Full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77">
            <text:p>777</text:p>
          </table:table-cell>
          <table:table-cell table:number-columns-repeated="5"/>
          <table:table-cell office:value-type="string">
            <text:p>RAUTA</text:p>
          </table:table-cell>
          <table:table-cell office:value-type="string">
            <text:p>metal</text:p>
          </table:table-cell>
          <table:table-cell office:value-type="string">
            <text:p>Ety/RAUTA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Q. rá/S. raw</text:p>
          </table:table-cell>
          <table:table-cell office:value-type="string">
            <text:p>lion</text:p>
          </table:table-cell>
          <table:table-cell office:value-type="string">
            <text:p>RAVA</text:p>
          </table:table-cell>
          <table:table-cell office:value-type="string">
            <text:p>*hunt</text:p>
          </table:table-cell>
          <table:table-cell office:value-type="string">
            <text:p>QL/79</text:p>
          </table:table-cell>
          <table:table-cell office:value-type="string">
            <text:p>RAW</text:p>
          </table:table-cell>
          <table:table-cell office:value-type="string">
            <text:p>*rour</text:p>
          </table:table-cell>
          <table:table-cell office:value-type="string">
            <text:p>Ety/RAW</text:p>
          </table:table-cell>
          <table:table-cell office:value-type="string">
            <text:p>RĀW</text:p>
          </table:table-cell>
          <table:table-cell office:value-type="string">
            <text:p>lion</text:p>
          </table:table-cell>
          <table:table-cell office:value-type="string">
            <text:p>PE19/9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table:number-columns-repeated="8"/>
          <table:table-cell office:value-type="string">
            <text:p>RAY</text:p>
          </table:table-cell>
          <table:table-cell office:value-type="string">
            <text:p>net; knit</text:p>
          </table:table-cell>
          <table:table-cell office:value-type="string">
            <text:p>PE22/15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table:number-columns-repeated="8"/>
          <table:table-cell office:value-type="string">
            <text:p>RAYA</text:p>
          </table:table-cell>
          <table:table-cell office:value-type="string">
            <text:p>smile</text:p>
          </table:table-cell>
          <table:table-cell office:value-type="string">
            <text:p>PE17/18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81">
            <text:p>781</text:p>
          </table:table-cell>
          <table:table-cell table:number-columns-repeated="5"/>
          <table:table-cell office:value-type="string">
            <text:p>RAYAK</text:p>
          </table:table-cell>
          <table:table-cell office:value-type="string">
            <text:p>*crooked, bent, wrong</text:p>
          </table:table-cell>
          <table:table-cell office:value-type="string">
            <text:p>Ety/RÁYA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82">
            <text:p>782</text:p>
          </table:table-cell>
          <table:table-cell table:number-columns-repeated="8"/>
          <table:table-cell office:value-type="string">
            <text:p>REB/REM</text:p>
          </table:table-cell>
          <table:table-cell office:value-type="string">
            <text:p>entangle, snare, trap</text:p>
          </table:table-cell>
          <table:table-cell office:value-type="string">
            <text:p>VT42/1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Q. resta</text:p>
          </table:table-cell>
          <table:table-cell office:value-type="string">
            <text:p>field</text:p>
          </table:table-cell>
          <table:table-cell table:number-columns-repeated="3"/>
          <table:table-cell office:value-type="string">
            <text:p>(E)RED</text:p>
          </table:table-cell>
          <table:table-cell office:value-type="string">
            <text:p>scatter, sow</text:p>
          </table:table-cell>
          <table:table-cell office:value-type="string">
            <text:p>Ety/ERÉD, RED</text:p>
          </table:table-cell>
          <table:table-cell office:value-type="string">
            <text:p>RED</text:p>
          </table:table-cell>
          <table:table-cell office:value-type="string">
            <text:p>scatter, sow</text:p>
          </table:table-cell>
          <table:table-cell office:value-type="string">
            <text:p>PE19/9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table:number-columns-repeated="2"/>
          <table:table-cell office:value-type="string">
            <text:p>REÐE</text:p>
          </table:table-cell>
          <table:table-cell office:value-type="string">
            <text:p>*kinsman</text:p>
          </table:table-cell>
          <table:table-cell office:value-type="string">
            <text:p>QL/7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85">
            <text:p>785</text:p>
          </table:table-cell>
          <table:table-cell table:number-columns-repeated="5"/>
          <table:table-cell office:value-type="string">
            <text:p>REG</text:p>
          </table:table-cell>
          <table:table-cell office:value-type="string">
            <text:p>edge, border, margin</text:p>
          </table:table-cell>
          <table:table-cell office:value-type="string">
            <text:p>Ety/RE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table:number-columns-repeated="8"/>
          <table:table-cell office:value-type="string">
            <text:p>REK</text:p>
          </table:table-cell>
          <table:table-cell office:value-type="string">
            <text:p>recover, save</text:p>
          </table:table-cell>
          <table:table-cell office:value-type="string">
            <text:p>PE17/3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table:number-columns-repeated="8"/>
          <table:table-cell office:value-type="string">
            <text:p>REN</text:p>
          </table:table-cell>
          <table:table-cell office:value-type="string">
            <text:p>recall, have in mind</text:p>
          </table:table-cell>
          <table:table-cell office:value-type="string">
            <text:p>PM/37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88">
            <text:p>788</text:p>
          </table:table-cell>
          <table:table-cell table:number-columns-repeated="5"/>
          <table:table-cell office:value-type="string">
            <text:p>REP</text:p>
          </table:table-cell>
          <table:table-cell office:value-type="string">
            <text:p>bend, hook</text:p>
          </table:table-cell>
          <table:table-cell office:value-type="string">
            <text:p>Ety/REP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table:number-columns-repeated="8"/>
          <table:table-cell office:value-type="string">
            <text:p>RETE</text:p>
          </table:table-cell>
          <table:table-cell office:value-type="string">
            <text:p>climb</text:p>
          </table:table-cell>
          <table:table-cell office:value-type="string">
            <text:p>PE17/18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table:number-columns-repeated="8"/>
          <table:table-cell office:value-type="string">
            <text:p>REÞ/RES</text:p>
          </table:table-cell>
          <table:table-cell office:value-type="string">
            <text:p>remain in same place</text:p>
          </table:table-cell>
          <table:table-cell office:value-type="string">
            <text:p>PE17/182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table:number-columns-repeated="2"/>
          <table:table-cell office:value-type="string">
            <text:p>RESE</text:p>
          </table:table-cell>
          <table:table-cell office:value-type="string">
            <text:p>aid, support</text:p>
          </table:table-cell>
          <table:table-cell office:value-type="string">
            <text:p>QL/7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table:number-columns-repeated="2"/>
          <table:table-cell office:value-type="string">
            <text:p>RET͡YE</text:p>
          </table:table-cell>
          <table:table-cell office:value-type="string">
            <text:p>*spit</text:p>
          </table:table-cell>
          <table:table-cell office:value-type="string">
            <text:p>QL/7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93">
            <text:p>793</text:p>
          </table:table-cell>
          <table:table-cell table:number-columns-repeated="2"/>
          <table:table-cell office:value-type="string">
            <text:p>RIMI</text:p>
          </table:table-cell>
          <table:table-cell office:value-type="string">
            <text:p>*border</text:p>
          </table:table-cell>
          <table:table-cell office:value-type="string">
            <text:p>QL/80</text:p>
          </table:table-cell>
          <table:table-cell office:value-type="string">
            <text:p>RĪ</text:p>
          </table:table-cell>
          <table:table-cell office:value-type="string">
            <text:p>*edge, border</text:p>
          </table:table-cell>
          <table:table-cell office:value-type="string">
            <text:p>Ety/RĪ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Q. rie</text:p>
          </table:table-cell>
          <table:table-cell office:value-type="string">
            <text:p>garland</text:p>
          </table:table-cell>
          <table:table-cell table:number-columns-repeated="3"/>
          <table:table-cell office:value-type="string">
            <text:p>RIG</text:p>
          </table:table-cell>
          <table:table-cell office:value-type="string">
            <text:p>crown</text:p>
          </table:table-cell>
          <table:table-cell office:value-type="string">
            <text:p>Ety/RIG</text:p>
          </table:table-cell>
          <table:table-cell office:value-type="string">
            <text:p>RIG</text:p>
          </table:table-cell>
          <table:table-cell office:value-type="string">
            <text:p>twine, wreathe</text:p>
          </table:table-cell>
          <table:table-cell office:value-type="string">
            <text:p>PM/34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table:number-columns-repeated="8"/>
          <table:table-cell office:value-type="string">
            <text:p>RIK</text:p>
          </table:table-cell>
          <table:table-cell office:value-type="string">
            <text:p>strive</text:p>
          </table:table-cell>
          <table:table-cell office:value-type="string">
            <text:p>PE17/93, 16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96">
            <text:p>796</text:p>
          </table:table-cell>
          <table:table-cell table:number-columns-repeated="2"/>
          <table:table-cell office:value-type="string">
            <text:p>RIQI/RIKI</text:p>
          </table:table-cell>
          <table:table-cell office:value-type="string">
            <text:p>*twist</text:p>
          </table:table-cell>
          <table:table-cell office:value-type="string">
            <text:p>QL/80</text:p>
          </table:table-cell>
          <table:table-cell office:value-type="string">
            <text:p>RIK(H)</text:p>
          </table:table-cell>
          <table:table-cell office:value-type="string">
            <text:p>jerk, sudden move</text:p>
          </table:table-cell>
          <table:table-cell office:value-type="string">
            <text:p>Ety/RIK(H)</text:p>
          </table:table-cell>
          <table:table-cell office:value-type="string">
            <text:p>RIKI</text:p>
          </table:table-cell>
          <table:table-cell office:value-type="string">
            <text:p>twist</text:p>
          </table:table-cell>
          <table:table-cell office:value-type="string">
            <text:p>VT39/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Q. Silmaril</text:p>
          </table:table-cell>
          <table:table-cell table:number-columns-repeated="4"/>
          <table:table-cell office:value-type="string">
            <text:p>RIL</text:p>
          </table:table-cell>
          <table:table-cell office:value-type="string">
            <text:p>glitter</text:p>
          </table:table-cell>
          <table:table-cell office:value-type="string">
            <text:p>Ety/RIL</text:p>
          </table:table-cell>
          <table:table-cell office:value-type="string">
            <text:p>RIL</text:p>
          </table:table-cell>
          <table:table-cell office:value-type="string">
            <text:p>brilliant light</text:p>
          </table:table-cell>
          <table:table-cell office:value-type="string">
            <text:p>PM/36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S. rim</text:p>
          </table:table-cell>
          <table:table-cell office:value-type="string">
            <text:p>host</text:p>
          </table:table-cell>
          <table:table-cell office:value-type="string">
            <text:p>(A)ṚM(A)R</text:p>
          </table:table-cell>
          <table:table-cell office:value-type="string">
            <text:p>*gather</text:p>
          </table:table-cell>
          <table:table-cell office:value-type="string">
            <text:p>QL/32</text:p>
          </table:table-cell>
          <table:table-cell office:value-type="string">
            <text:p>RIM</text:p>
          </table:table-cell>
          <table:table-cell office:value-type="string">
            <text:p>abound</text:p>
          </table:table-cell>
          <table:table-cell office:value-type="string">
            <text:p>Ety/RIM; EtyAC/RIM</text:p>
          </table:table-cell>
          <table:table-cell office:value-type="string">
            <text:p>Q. rimbe</text:p>
          </table:table-cell>
          <table:table-cell office:value-type="string">
            <text:p>great number, host</text:p>
          </table:table-cell>
          <table:table-cell office:value-type="string">
            <text:p>UT/318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799">
            <text:p>799</text:p>
          </table:table-cell>
          <table:table-cell table:number-columns-repeated="2"/>
          <table:table-cell office:value-type="string">
            <text:p>RINI</text:p>
          </table:table-cell>
          <table:table-cell office:value-type="string">
            <text:p>*circle</text:p>
          </table:table-cell>
          <table:table-cell office:value-type="string">
            <text:p>QL/80</text:p>
          </table:table-cell>
          <table:table-cell office:value-type="string">
            <text:p>RIN</text:p>
          </table:table-cell>
          <table:table-cell office:value-type="string">
            <text:p>*circle</text:p>
          </table:table-cell>
          <table:table-cell office:value-type="string">
            <text:p>Ety/RIN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S. ring</text:p>
          </table:table-cell>
          <table:table-cell office:value-type="string">
            <text:p>cold</text:p>
          </table:table-cell>
          <table:table-cell office:value-type="string">
            <text:p>RIŊI</text:p>
          </table:table-cell>
          <table:table-cell office:value-type="string">
            <text:p>*cold</text:p>
          </table:table-cell>
          <table:table-cell office:value-type="string">
            <text:p>QL/80</text:p>
          </table:table-cell>
          <table:table-cell office:value-type="string">
            <text:p>RINGI</text:p>
          </table:table-cell>
          <table:table-cell office:value-type="string">
            <text:p>cold</text:p>
          </table:table-cell>
          <table:table-cell office:value-type="string">
            <text:p>Ety/RINGI</text:p>
          </table:table-cell>
          <table:table-cell office:value-type="string">
            <text:p>Q. ringa</text:p>
          </table:table-cell>
          <table:table-cell office:value-type="string">
            <text:p>cold</text:p>
          </table:table-cell>
          <table:table-cell office:value-type="string">
            <text:p>MC/222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01">
            <text:p>801</text:p>
          </table:table-cell>
          <table:table-cell table:number-columns-repeated="5"/>
          <table:table-cell office:value-type="string">
            <text:p>RIP</text:p>
          </table:table-cell>
          <table:table-cell office:value-type="string">
            <text:p>rush, fly, fling</text:p>
          </table:table-cell>
          <table:table-cell office:value-type="string">
            <text:p>Ety/RIP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table:number-columns-repeated="2"/>
          <table:table-cell office:value-type="string">
            <text:p>RIPI</text:p>
          </table:table-cell>
          <table:table-cell office:value-type="string">
            <text:p>a rim</text:p>
          </table:table-cell>
          <table:table-cell office:value-type="string">
            <text:p>QL/80; GL/6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03">
            <text:p>803</text:p>
          </table:table-cell>
          <table:table-cell office:value-type="string">
            <text:p>S. riss</text:p>
          </table:table-cell>
          <table:table-cell office:value-type="string">
            <text:p>cleft</text:p>
          </table:table-cell>
          <table:table-cell table:number-columns-repeated="3"/>
          <table:table-cell office:value-type="string">
            <text:p>RIS</text:p>
          </table:table-cell>
          <table:table-cell office:value-type="string">
            <text:p>slash, rip</text:p>
          </table:table-cell>
          <table:table-cell office:value-type="string">
            <text:p>Ety/RIS</text:p>
          </table:table-cell>
          <table:table-cell office:value-type="string">
            <text:p>RIS</text:p>
          </table:table-cell>
          <table:table-cell office:value-type="string">
            <text:p>cut</text:p>
          </table:table-cell>
          <table:table-cell office:value-type="string">
            <text:p>PE17/8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table:number-columns-repeated="2"/>
          <table:table-cell office:value-type="string">
            <text:p>RIẎI</text:p>
          </table:table-cell>
          <table:table-cell office:value-type="string">
            <text:p>scatter</text:p>
          </table:table-cell>
          <table:table-cell office:value-type="string">
            <text:p>QL/80</text:p>
          </table:table-cell>
          <table:table-cell office:value-type="string">
            <text:p>RĪI̯</text:p>
          </table:table-cell>
          <table:table-cell office:value-type="string">
            <text:p>*reed</text:p>
          </table:table-cell>
          <table:table-cell office:value-type="string">
            <text:p>PE21/38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05">
            <text:p>805</text:p>
          </table:table-cell>
          <table:table-cell office:value-type="string">
            <text:p>Q. orta-</text:p>
          </table:table-cell>
          <table:table-cell office:value-type="string">
            <text:p>raise</text:p>
          </table:table-cell>
          <table:table-cell office:value-type="string">
            <text:p>ORO¹/RŌ</text:p>
          </table:table-cell>
          <table:table-cell office:value-type="string">
            <text:p>steepness, rising</text:p>
          </table:table-cell>
          <table:table-cell office:value-type="string">
            <text:p>QL/70, 80</text:p>
          </table:table-cell>
          <table:table-cell office:value-type="string">
            <text:p>RŌ/ORO</text:p>
          </table:table-cell>
          <table:table-cell office:value-type="string">
            <text:p>up, rise, high</text:p>
          </table:table-cell>
          <table:table-cell office:value-type="string">
            <text:p>Ety/ORO, RŌ</text:p>
          </table:table-cell>
          <table:table-cell office:value-type="string">
            <text:p>RO/OR</text:p>
          </table:table-cell>
          <table:table-cell office:value-type="string">
            <text:p>rise up, go high</text:p>
          </table:table-cell>
          <table:table-cell office:value-type="string">
            <text:p>Let/42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06">
            <text:p>806</text:p>
          </table:table-cell>
          <table:table-cell office:value-type="string">
            <text:p>S. roch</text:p>
          </table:table-cell>
          <table:table-cell office:value-type="string">
            <text:p>horse</text:p>
          </table:table-cell>
          <table:table-cell table:number-columns-repeated="3"/>
          <table:table-cell office:value-type="string">
            <text:p>ROK</text:p>
          </table:table-cell>
          <table:table-cell office:value-type="string">
            <text:p>run on foot</text:p>
          </table:table-cell>
          <table:table-cell office:value-type="string">
            <text:p>Ety/ROK; PE22/127</text:p>
          </table:table-cell>
          <table:table-cell office:value-type="string">
            <text:p>ROKO</text:p>
          </table:table-cell>
          <table:table-cell office:value-type="string">
            <text:p>horse</text:p>
          </table:table-cell>
          <table:table-cell office:value-type="string">
            <text:p>WJ/40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Q. róma</text:p>
          </table:table-cell>
          <table:table-cell office:value-type="string">
            <text:p>horn</text:p>
          </table:table-cell>
          <table:table-cell table:number-columns-repeated="3"/>
          <table:table-cell office:value-type="string">
            <text:p>(O)ROM</text:p>
          </table:table-cell>
          <table:table-cell office:value-type="string">
            <text:p>loud noise, horn blast</text:p>
          </table:table-cell>
          <table:table-cell office:value-type="string">
            <text:p>Ety/ORÓM, ROM</text:p>
          </table:table-cell>
          <table:table-cell office:value-type="string">
            <text:p>ROM</text:p>
          </table:table-cell>
          <table:table-cell office:value-type="string">
            <text:p>horn noise</text:p>
          </table:table-cell>
          <table:table-cell office:value-type="string">
            <text:p>WJ/40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08">
            <text:p>808</text:p>
          </table:table-cell>
          <table:table-cell office:value-type="string">
            <text:p>Q. rondo/ronda</text:p>
          </table:table-cell>
          <table:table-cell office:value-type="string">
            <text:p>vaulted hall; cave</text:p>
          </table:table-cell>
          <table:table-cell office:value-type="string">
            <text:p>ᴱN. grond</text:p>
          </table:table-cell>
          <table:table-cell office:value-type="string">
            <text:p>cave</text:p>
          </table:table-cell>
          <table:table-cell office:value-type="string">
            <text:p>PE13/145</text:p>
          </table:table-cell>
          <table:table-cell office:value-type="string">
            <text:p>ROD</text:p>
          </table:table-cell>
          <table:table-cell office:value-type="string">
            <text:p>roof, cave</text:p>
          </table:table-cell>
          <table:table-cell office:value-type="string">
            <text:p>Ety/ROD; EtyAC/ROD</text:p>
          </table:table-cell>
          <table:table-cell office:value-type="string">
            <text:p>RONO</text:p>
          </table:table-cell>
          <table:table-cell office:value-type="string">
            <text:p>arch over, roof in</text:p>
          </table:table-cell>
          <table:table-cell office:value-type="string">
            <text:p>WJ/414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09">
            <text:p>809</text:p>
          </table:table-cell>
          <table:table-cell office:value-type="string">
            <text:p>S. grond</text:p>
          </table:table-cell>
          <table:table-cell office:value-type="string">
            <text:p>club</text:p>
          </table:table-cell>
          <table:table-cell table:number-columns-repeated="3"/>
          <table:table-cell office:value-type="string">
            <text:p>RUD</text:p>
          </table:table-cell>
          <table:table-cell office:value-type="string">
            <text:p>*piece of wood</text:p>
          </table:table-cell>
          <table:table-cell office:value-type="string">
            <text:p>Ety/RUD</text:p>
          </table:table-cell>
          <table:table-cell office:value-type="string">
            <text:p>(G)RON</text:p>
          </table:table-cell>
          <table:table-cell office:value-type="string">
            <text:p>solid, tangible, firm</text:p>
          </table:table-cell>
          <table:table-cell office:value-type="string">
            <text:p>PE17/183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Q. rosse/S. ross</text:p>
          </table:table-cell>
          <table:table-cell office:value-type="string">
            <text:p>rain; foam</text:p>
          </table:table-cell>
          <table:table-cell table:number-columns-repeated="3"/>
          <table:table-cell office:value-type="string">
            <text:p>ROS¹</text:p>
          </table:table-cell>
          <table:table-cell office:value-type="string">
            <text:p>distil, drip</text:p>
          </table:table-cell>
          <table:table-cell office:value-type="string">
            <text:p>Ety/ROS¹</text:p>
          </table:table-cell>
          <table:table-cell office:value-type="string">
            <text:p>ROS</text:p>
          </table:table-cell>
          <table:table-cell office:value-type="string">
            <text:p>spindrift, spray</text:p>
          </table:table-cell>
          <table:table-cell table:style-name="ce3" office:value-type="string">
            <text:p>PM/368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11">
            <text:p>811</text:p>
          </table:table-cell>
          <table:table-cell table:number-columns-repeated="5"/>
          <table:table-cell office:value-type="string">
            <text:p>ROS²</text:p>
          </table:table-cell>
          <table:table-cell office:value-type="string">
            <text:p>*plain</text:p>
          </table:table-cell>
          <table:table-cell office:value-type="string">
            <text:p>Ety/ROS²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S. groth</text:p>
          </table:table-cell>
          <table:table-cell office:value-type="string">
            <text:p>cave</text:p>
          </table:table-cell>
          <table:table-cell office:value-type="string">
            <text:p>ROTO</text:p>
          </table:table-cell>
          <table:table-cell office:value-type="string">
            <text:p>hollow</text:p>
          </table:table-cell>
          <table:table-cell office:value-type="string">
            <text:p>QL/80</text:p>
          </table:table-cell>
          <table:table-cell office:value-type="string">
            <text:p>ROT</text:p>
          </table:table-cell>
          <table:table-cell office:value-type="string">
            <text:p>bore, tunnel</text:p>
          </table:table-cell>
          <table:table-cell office:value-type="string">
            <text:p>EtyAC/ROT</text:p>
          </table:table-cell>
          <table:table-cell office:value-type="string">
            <text:p>ROT</text:p>
          </table:table-cell>
          <table:table-cell office:value-type="string">
            <text:p>excavate, tunnel</text:p>
          </table:table-cell>
          <table:table-cell office:value-type="string">
            <text:p>PM/36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13">
            <text:p>813</text:p>
          </table:table-cell>
          <table:table-cell table:number-columns-repeated="5"/>
          <table:table-cell office:value-type="string">
            <text:p>ROY¹</text:p>
          </table:table-cell>
          <table:table-cell office:value-type="string">
            <text:p>chase</text:p>
          </table:table-cell>
          <table:table-cell office:value-type="string">
            <text:p>Ety/ROY¹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table:number-columns-repeated="2"/>
          <table:table-cell office:value-type="string">
            <text:p>RU’U</text:p>
          </table:table-cell>
          <table:table-cell office:value-type="string">
            <text:p>*dwell, remain</text:p>
          </table:table-cell>
          <table:table-cell office:value-type="string">
            <text:p>QL/8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S. raug</text:p>
          </table:table-cell>
          <table:table-cell office:value-type="string">
            <text:p>demon</text:p>
          </table:table-cell>
          <table:table-cell office:value-type="string">
            <text:p>RAUKE</text:p>
          </table:table-cell>
          <table:table-cell office:value-type="string">
            <text:p>demon</text:p>
          </table:table-cell>
          <table:table-cell office:value-type="string">
            <text:p>QL/79</text:p>
          </table:table-cell>
          <table:table-cell office:value-type="string">
            <text:p>RUK</text:p>
          </table:table-cell>
          <table:table-cell office:value-type="string">
            <text:p>demon</text:p>
          </table:table-cell>
          <table:table-cell office:value-type="string">
            <text:p>Ety/RUK</text:p>
          </table:table-cell>
          <table:table-cell office:value-type="string">
            <text:p>RUKU</text:p>
          </table:table-cell>
          <table:table-cell office:value-type="string">
            <text:p>terrible shapes</text:p>
          </table:table-cell>
          <table:table-cell office:value-type="string">
            <text:p>WJ/38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table:number-columns-repeated="5"/>
          <table:table-cell office:value-type="string">
            <text:p>RUK</text:p>
          </table:table-cell>
          <table:table-cell office:value-type="string">
            <text:p>pluck</text:p>
          </table:table-cell>
          <table:table-cell office:value-type="string">
            <text:p>PE22/102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table:number-columns-repeated="2"/>
          <table:table-cell office:value-type="string">
            <text:p>RUKU</text:p>
          </table:table-cell>
          <table:table-cell office:value-type="string">
            <text:p>smoke, reek</text:p>
          </table:table-cell>
          <table:table-cell office:value-type="string">
            <text:p>QL/8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table:number-columns-repeated="8"/>
          <table:table-cell office:value-type="string">
            <text:p>RUN</text:p>
          </table:table-cell>
          <table:table-cell office:value-type="string">
            <text:p>red, glowing</text:p>
          </table:table-cell>
          <table:table-cell office:value-type="string">
            <text:p>PM/36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19">
            <text:p>819</text:p>
          </table:table-cell>
          <table:table-cell table:number-columns-repeated="5"/>
          <table:table-cell office:value-type="string">
            <text:p>RUN</text:p>
          </table:table-cell>
          <table:table-cell office:value-type="string">
            <text:p>flat of hand or foot</text:p>
          </table:table-cell>
          <table:table-cell office:value-type="string">
            <text:p>Ety/RUN</text:p>
          </table:table-cell>
          <table:table-cell office:value-type="string">
            <text:p>RUN</text:p>
          </table:table-cell>
          <table:table-cell office:value-type="string">
            <text:p>grind, smooth</text:p>
          </table:table-cell>
          <table:table-cell office:value-type="string">
            <text:p>PE17/89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table:number-columns-repeated="5"/>
          <table:table-cell office:value-type="string">
            <text:p>RUS</text:p>
          </table:table-cell>
          <table:table-cell office:value-type="string">
            <text:p>flash, glitter of metal</text:p>
          </table:table-cell>
          <table:table-cell office:value-type="string">
            <text:p>Ety/RU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S. rhosc</text:p>
          </table:table-cell>
          <table:table-cell office:value-type="string">
            <text:p>brown</text:p>
          </table:table-cell>
          <table:table-cell table:number-columns-repeated="3"/>
          <table:table-cell office:value-type="string">
            <text:p>RUSKĀ</text:p>
          </table:table-cell>
          <table:table-cell office:value-type="string">
            <text:p>brown</text:p>
          </table:table-cell>
          <table:table-cell office:value-type="string">
            <text:p>Ety/RUSKĀ</text:p>
          </table:table-cell>
          <table:table-cell table:style-name="ce3" office:value-type="string">
            <text:p>(U)RUS</text:p>
          </table:table-cell>
          <table:table-cell office:value-type="string">
            <text:p>brownish red</text:p>
          </table:table-cell>
          <table:table-cell office:value-type="string">
            <text:p>VT41/10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table:number-columns-repeated="8"/>
          <table:table-cell office:value-type="string">
            <text:p>(U)RUÞ</text:p>
          </table:table-cell>
          <table:table-cell office:value-type="string">
            <text:p>anger, rage, wrath</text:p>
          </table:table-cell>
          <table:table-cell office:value-type="string">
            <text:p>PE17/18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table:number-columns-repeated="2"/>
          <table:table-cell office:value-type="string">
            <text:p>RUVU</text:p>
          </table:table-cell>
          <table:table-cell office:value-type="string">
            <text:p>burst asunder</text:p>
          </table:table-cell>
          <table:table-cell office:value-type="string">
            <text:p>QL/8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24">
            <text:p>824</text:p>
          </table:table-cell>
          <table:table-cell table:number-columns-repeated="5"/>
          <table:table-cell office:value-type="string">
            <text:p>ROY²/GROJ</text:p>
          </table:table-cell>
          <table:table-cell office:value-type="string">
            <text:p>ruddy, red</text:p>
          </table:table-cell>
          <table:table-cell office:value-type="string">
            <text:p>Ety/ROY²</text:p>
          </table:table-cell>
          <table:table-cell office:value-type="string">
            <text:p>RUYU</text:p>
          </table:table-cell>
          <table:table-cell office:value-type="string">
            <text:p>blaze (red)</text:p>
          </table:table-cell>
          <table:table-cell office:value-type="string">
            <text:p>PE17/183</text:p>
          </table:table-cell>
          <table:table-cell office:value-type="string">
            <text:p>Late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table:number-columns-repeated="8"/>
          <table:table-cell office:value-type="string">
            <text:p>S</text:p>
          </table:table-cell>
          <table:table-cell office:value-type="string">
            <text:p>privative</text:p>
          </table:table-cell>
          <table:table-cell office:value-type="string">
            <text:p>PE17/183-18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26">
            <text:p>826</text:p>
          </table:table-cell>
          <table:table-cell office:value-type="string">
            <text:p>Q. sa</text:p>
          </table:table-cell>
          <table:table-cell office:value-type="string">
            <text:p>that</text:p>
          </table:table-cell>
          <table:table-cell office:value-type="string">
            <text:p>SA</text:p>
          </table:table-cell>
          <table:table-cell office:value-type="string">
            <text:p>demonstrative</text:p>
          </table:table-cell>
          <table:table-cell office:value-type="string">
            <text:p>QL/81</text:p>
          </table:table-cell>
          <table:table-cell office:value-type="string">
            <text:p>S</text:p>
          </table:table-cell>
          <table:table-cell office:value-type="string">
            <text:p>demonstrative</text:p>
          </table:table-cell>
          <table:table-cell office:value-type="string">
            <text:p>Ety/S</text:p>
          </table:table-cell>
          <table:table-cell office:value-type="string">
            <text:p>Q. sa</text:p>
          </table:table-cell>
          <table:table-cell office:value-type="string">
            <text:p>that</text:p>
          </table:table-cell>
          <table:table-cell office:value-type="string">
            <text:p>VT49/20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27">
            <text:p>827</text:p>
          </table:table-cell>
          <table:table-cell table:number-columns-repeated="5"/>
          <table:table-cell office:value-type="string">
            <text:p>SAB</text:p>
          </table:table-cell>
          <table:table-cell office:value-type="string">
            <text:p>juice</text:p>
          </table:table-cell>
          <table:table-cell office:value-type="string">
            <text:p>Ety/SAB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table:number-columns-repeated="8"/>
          <table:table-cell office:value-type="string">
            <text:p>SAB</text:p>
          </table:table-cell>
          <table:table-cell office:value-type="string">
            <text:p>believe</text:p>
          </table:table-cell>
          <table:table-cell office:value-type="string">
            <text:p>PE22/15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table:number-columns-repeated="8"/>
          <table:table-cell office:value-type="string">
            <text:p>SAD</text:p>
          </table:table-cell>
          <table:table-cell office:value-type="string">
            <text:p>strip, flay, peel off</text:p>
          </table:table-cell>
          <table:table-cell office:value-type="string">
            <text:p>VT42/2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table:number-columns-repeated="5"/>
          <table:table-cell office:value-type="string">
            <text:p>SAG</text:p>
          </table:table-cell>
          <table:table-cell office:value-type="string">
            <text:p>*bitter, poison</text:p>
          </table:table-cell>
          <table:table-cell office:value-type="string">
            <text:p>Ety/SA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table:number-columns-repeated="2"/>
          <table:table-cell office:value-type="string">
            <text:p>SAHA/SAH͡YA</text:p>
          </table:table-cell>
          <table:table-cell office:value-type="string">
            <text:p>be hot</text:p>
          </table:table-cell>
          <table:table-cell office:value-type="string">
            <text:p>QL/8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table:number-columns-repeated="8"/>
          <table:table-cell office:value-type="string">
            <text:p>SAKA</text:p>
          </table:table-cell>
          <table:table-cell office:value-type="string">
            <text:p>draw, pull</text:p>
          </table:table-cell>
          <table:table-cell office:value-type="string">
            <text:p>VT43/2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33">
            <text:p>833</text:p>
          </table:table-cell>
          <table:table-cell table:number-columns-repeated="5"/>
          <table:table-cell office:value-type="string">
            <text:p>SAK</text:p>
          </table:table-cell>
          <table:table-cell office:value-type="string">
            <text:p>*hurt, injure</text:p>
          </table:table-cell>
          <table:table-cell office:value-type="string">
            <text:p>EtyAC/SAK</text:p>
          </table:table-cell>
          <table:table-cell office:value-type="string">
            <text:p>Q. sahta</text:p>
          </table:table-cell>
          <table:table-cell office:value-type="string">
            <text:p>marred</text:p>
          </table:table-cell>
          <table:table-cell office:value-type="string">
            <text:p>MR/405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table:number-columns-repeated="2"/>
          <table:table-cell office:value-type="string">
            <text:p>SAKA</text:p>
          </table:table-cell>
          <table:table-cell office:value-type="string">
            <text:p>*search</text:p>
          </table:table-cell>
          <table:table-cell office:value-type="string">
            <text:p>QL/8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table:number-columns-repeated="2"/>
          <table:table-cell office:value-type="string">
            <text:p>SALA</text:p>
          </table:table-cell>
          <table:table-cell office:value-type="string">
            <text:p>*harp(ing), lyre</text:p>
          </table:table-cell>
          <table:table-cell office:value-type="string">
            <text:p>QL/8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table:number-columns-repeated="2"/>
          <table:table-cell office:value-type="string">
            <text:p>SARA</text:p>
          </table:table-cell>
          <table:table-cell office:value-type="string">
            <text:p>*saw</text:p>
          </table:table-cell>
          <table:table-cell office:value-type="string">
            <text:p>QL/8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37">
            <text:p>837</text:p>
          </table:table-cell>
          <table:table-cell office:value-type="string">
            <text:p>Q. salqe</text:p>
          </table:table-cell>
          <table:table-cell office:value-type="string">
            <text:p>grass</text:p>
          </table:table-cell>
          <table:table-cell office:value-type="string">
            <text:p>SḶKḶ¹</text:p>
          </table:table-cell>
          <table:table-cell office:value-type="string">
            <text:p>*grass, mow</text:p>
          </table:table-cell>
          <table:table-cell office:value-type="string">
            <text:p>QL/84</text:p>
          </table:table-cell>
          <table:table-cell office:value-type="string">
            <text:p>SALAK-WĒ</text:p>
          </table:table-cell>
          <table:table-cell office:value-type="string">
            <text:p>*grass</text:p>
          </table:table-cell>
          <table:table-cell office:value-type="string">
            <text:p>Ety/SALÁK-(WĒ)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38">
            <text:p>838</text:p>
          </table:table-cell>
          <table:table-cell table:number-columns-repeated="2"/>
          <table:table-cell office:value-type="string">
            <text:p>SḶPḶ</text:p>
          </table:table-cell>
          <table:table-cell office:value-type="string">
            <text:p>*lick up, sip</text:p>
          </table:table-cell>
          <table:table-cell office:value-type="string">
            <text:p>QL/84</text:p>
          </table:table-cell>
          <table:table-cell office:value-type="string">
            <text:p>SALAP</text:p>
          </table:table-cell>
          <table:table-cell office:value-type="string">
            <text:p>lick up</text:p>
          </table:table-cell>
          <table:table-cell office:value-type="string">
            <text:p>Ety/SÁLAP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39">
            <text:p>839</text:p>
          </table:table-cell>
          <table:table-cell table:number-columns-repeated="5"/>
          <table:table-cell office:value-type="string">
            <text:p>SAM</text:p>
          </table:table-cell>
          <table:table-cell office:value-type="string">
            <text:p>unite, join</text:p>
          </table:table-cell>
          <table:table-cell office:value-type="string">
            <text:p>Ety/SAM</text:p>
          </table:table-cell>
          <table:table-cell office:value-type="string">
            <text:p>SAM</text:p>
          </table:table-cell>
          <table:table-cell office:value-type="string">
            <text:p>have</text:p>
          </table:table-cell>
          <table:table-cell office:value-type="string">
            <text:p>PE17/183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table:number-columns-repeated="2"/>
          <table:table-cell office:value-type="string">
            <text:p>G. sana-</text:p>
          </table:table-cell>
          <table:table-cell office:value-type="string">
            <text:p>know how to</text:p>
          </table:table-cell>
          <table:table-cell office:value-type="string">
            <text:p>GL/67</text:p>
          </table:table-cell>
          <table:table-cell table:number-columns-repeated="3"/>
          <table:table-cell office:value-type="string">
            <text:p>SAM/SAN</text:p>
          </table:table-cell>
          <table:table-cell office:value-type="string">
            <text:p>think</text:p>
          </table:table-cell>
          <table:table-cell office:value-type="string">
            <text:p>PE17/183; PE22/158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table:number-columns-repeated="2"/>
          <table:table-cell office:value-type="string">
            <text:p>SAPA</text:p>
          </table:table-cell>
          <table:table-cell office:value-type="string">
            <text:p>dig, excavate</text:p>
          </table:table-cell>
          <table:table-cell office:value-type="string">
            <text:p>QL/82</text:p>
          </table:table-cell>
          <table:table-cell table:number-columns-repeated="3"/>
          <table:table-cell office:value-type="string">
            <text:p>SAP</text:p>
          </table:table-cell>
          <table:table-cell office:value-type="string">
            <text:p>*dig</text:p>
          </table:table-cell>
          <table:table-cell office:value-type="string">
            <text:p>PE19/86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42">
            <text:p>842</text:p>
          </table:table-cell>
          <table:table-cell office:value-type="string">
            <text:p>S. sarn</text:p>
          </table:table-cell>
          <table:table-cell office:value-type="string">
            <text:p>stone</text:p>
          </table:table-cell>
          <table:table-cell office:value-type="string">
            <text:p>G. sarn</text:p>
          </table:table-cell>
          <table:table-cell office:value-type="string">
            <text:p>stone</text:p>
          </table:table-cell>
          <table:table-cell office:value-type="string">
            <text:p>GL/67</text:p>
          </table:table-cell>
          <table:table-cell office:value-type="string">
            <text:p>SAR</text:p>
          </table:table-cell>
          <table:table-cell office:value-type="string">
            <text:p>*stone</text:p>
          </table:table-cell>
          <table:table-cell office:value-type="string">
            <text:p>Ety/SAR</text:p>
          </table:table-cell>
          <table:table-cell office:value-type="string">
            <text:p>SAR</text:p>
          </table:table-cell>
          <table:table-cell office:value-type="string">
            <text:p>score, incise</text:p>
          </table:table-cell>
          <table:table-cell office:value-type="string">
            <text:p>WJ/39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table:number-columns-repeated="8"/>
          <table:table-cell office:value-type="string">
            <text:p>SAT</text:p>
          </table:table-cell>
          <table:table-cell office:value-type="string">
            <text:p>divide, apportion</text:p>
          </table:table-cell>
          <table:table-cell office:value-type="string">
            <text:p>VT48/1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table:number-columns-repeated="8"/>
          <table:table-cell office:value-type="string">
            <text:p>SAT(AR)</text:p>
          </table:table-cell>
          <table:table-cell office:value-type="string">
            <text:p>faithful</text:p>
          </table:table-cell>
          <table:table-cell office:value-type="string">
            <text:p>PE17/18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table:number-columns-repeated="8"/>
          <table:table-cell office:value-type="string">
            <text:p>SATH</text:p>
          </table:table-cell>
          <table:table-cell office:value-type="string">
            <text:p>pair</text:p>
          </table:table-cell>
          <table:table-cell office:value-type="string">
            <text:p>PE21/7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table:number-columns-repeated="8"/>
          <table:table-cell office:value-type="string">
            <text:p>SAWA</text:p>
          </table:table-cell>
          <table:table-cell office:value-type="string">
            <text:p>disgusting, foul, vile</text:p>
          </table:table-cell>
          <table:table-cell office:value-type="string">
            <text:p>PE17/18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47">
            <text:p>847</text:p>
          </table:table-cell>
          <table:table-cell table:number-columns-repeated="5"/>
          <table:table-cell office:value-type="string">
            <text:p>SAY</text:p>
          </table:table-cell>
          <table:table-cell office:value-type="string">
            <text:p>know, understand</text:p>
          </table:table-cell>
          <table:table-cell office:value-type="string">
            <text:p>Ety/SAY</text:p>
          </table:table-cell>
          <table:table-cell office:value-type="string">
            <text:p>Q. saila/S. sael</text:p>
          </table:table-cell>
          <table:table-cell office:value-type="string">
            <text:p>wise</text:p>
          </table:table-cell>
          <table:table-cell office:value-type="string">
            <text:p>VT41/18; MR/30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table:number-columns-repeated="2"/>
          <table:table-cell office:value-type="string">
            <text:p>SAẎA</text:p>
          </table:table-cell>
          <table:table-cell office:value-type="string">
            <text:p>hunger</text:p>
          </table:table-cell>
          <table:table-cell office:value-type="string">
            <text:p>QL/8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table:number-columns-repeated="2"/>
          <table:table-cell office:value-type="string">
            <text:p>SĒ</text:p>
          </table:table-cell>
          <table:table-cell office:value-type="string">
            <text:p>*as, like</text:p>
          </table:table-cell>
          <table:table-cell office:value-type="string">
            <text:p>QL/8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Q. Este</text:p>
          </table:table-cell>
          <table:table-cell office:value-type="string">
            <text:p>Rest</text:p>
          </table:table-cell>
          <table:table-cell table:number-columns-repeated="3"/>
          <table:table-cell office:value-type="string">
            <text:p>SED</text:p>
          </table:table-cell>
          <table:table-cell office:value-type="string">
            <text:p>rest</text:p>
          </table:table-cell>
          <table:table-cell office:value-type="string">
            <text:p>Ety/SED</text:p>
          </table:table-cell>
          <table:table-cell office:value-type="string">
            <text:p>SED</text:p>
          </table:table-cell>
          <table:table-cell office:value-type="string">
            <text:p>rest</text:p>
          </table:table-cell>
          <table:table-cell office:value-type="string">
            <text:p>PE19/91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table:number-columns-repeated="2"/>
          <table:table-cell office:value-type="string">
            <text:p>SEK</text:p>
          </table:table-cell>
          <table:table-cell office:value-type="string">
            <text:p>mid</text:p>
          </table:table-cell>
          <table:table-cell office:value-type="string">
            <text:p>GL/6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Q. selde</text:p>
          </table:table-cell>
          <table:table-cell office:value-type="string">
            <text:p>daughter</text:p>
          </table:table-cell>
          <table:table-cell table:number-columns-repeated="3"/>
          <table:table-cell office:value-type="string">
            <text:p>SEL(D)</text:p>
          </table:table-cell>
          <table:table-cell office:value-type="string">
            <text:p>child, {daughter}</text:p>
          </table:table-cell>
          <table:table-cell office:value-type="string">
            <text:p>Ety/SEL-D</text:p>
          </table:table-cell>
          <table:table-cell office:value-type="string">
            <text:p>S. sell</text:p>
          </table:table-cell>
          <table:table-cell office:value-type="string">
            <text:p>daughter</text:p>
          </table:table-cell>
          <table:table-cell office:value-type="string">
            <text:p>SD/129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table:number-columns-repeated="2"/>
          <table:table-cell office:value-type="string">
            <text:p>SELE</text:p>
          </table:table-cell>
          <table:table-cell office:value-type="string">
            <text:p>*bright</text:p>
          </table:table-cell>
          <table:table-cell office:value-type="string">
            <text:p>QL/8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table:number-columns-repeated="8"/>
          <table:table-cell office:value-type="string">
            <text:p>SEN</text:p>
          </table:table-cell>
          <table:table-cell office:value-type="string">
            <text:p>let loose, free</text:p>
          </table:table-cell>
          <table:table-cell office:value-type="string">
            <text:p>VT43/1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55">
            <text:p>855</text:p>
          </table:table-cell>
          <table:table-cell table:number-columns-repeated="5"/>
          <table:table-cell office:value-type="string">
            <text:p>SER</text:p>
          </table:table-cell>
          <table:table-cell office:value-type="string">
            <text:p>love, be fond of</text:p>
          </table:table-cell>
          <table:table-cell office:value-type="string">
            <text:p>Ety/SER</text:p>
          </table:table-cell>
          <table:table-cell office:value-type="string">
            <text:p>S. seron</text:p>
          </table:table-cell>
          <table:table-cell office:value-type="string">
            <text:p>lover</text:p>
          </table:table-cell>
          <table:table-cell office:value-type="string">
            <text:p>PM/348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table:number-columns-repeated="8"/>
          <table:table-cell office:value-type="string">
            <text:p>SEREK</text:p>
          </table:table-cell>
          <table:table-cell office:value-type="string">
            <text:p>blood</text:p>
          </table:table-cell>
          <table:table-cell office:value-type="string">
            <text:p>PE17/18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S. sí</text:p>
          </table:table-cell>
          <table:table-cell office:value-type="string">
            <text:p>here</text:p>
          </table:table-cell>
          <table:table-cell office:value-type="string">
            <text:p>SI(N)</text:p>
          </table:table-cell>
          <table:table-cell office:value-type="string">
            <text:p>this here by me</text:p>
          </table:table-cell>
          <table:table-cell office:value-type="string">
            <text:p>GL/68</text:p>
          </table:table-cell>
          <table:table-cell office:value-type="string">
            <text:p>SI</text:p>
          </table:table-cell>
          <table:table-cell office:value-type="string">
            <text:p>this, here, now</text:p>
          </table:table-cell>
          <table:table-cell office:value-type="string">
            <text:p>Ety/SI</text:p>
          </table:table-cell>
          <table:table-cell office:value-type="string">
            <text:p>SI(N)</text:p>
          </table:table-cell>
          <table:table-cell office:value-type="string">
            <text:p>this</text:p>
          </table:table-cell>
          <table:table-cell office:value-type="string">
            <text:p>PE17/6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table:number-columns-repeated="8"/>
          <table:table-cell office:value-type="string">
            <text:p>SIB</text:p>
          </table:table-cell>
          <table:table-cell office:value-type="string">
            <text:p>rest, quiet</text:p>
          </table:table-cell>
          <table:table-cell office:value-type="string">
            <text:p>VT44/3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59">
            <text:p>859</text:p>
          </table:table-cell>
          <table:table-cell table:number-columns-repeated="5"/>
          <table:table-cell office:value-type="string">
            <text:p>SIK</text:p>
          </table:table-cell>
          <table:table-cell office:value-type="string">
            <text:p>*dagger, knife</text:p>
          </table:table-cell>
          <table:table-cell office:value-type="string">
            <text:p>Ety/SI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Q. Silmaril</text:p>
          </table:table-cell>
          <table:table-cell/>
          <table:table-cell office:value-type="string">
            <text:p>SILI</text:p>
          </table:table-cell>
          <table:table-cell office:value-type="string">
            <text:p>*gleam</text:p>
          </table:table-cell>
          <table:table-cell office:value-type="string">
            <text:p>QL/83</text:p>
          </table:table-cell>
          <table:table-cell office:value-type="string">
            <text:p>SIL</text:p>
          </table:table-cell>
          <table:table-cell office:value-type="string">
            <text:p>shine silver</text:p>
          </table:table-cell>
          <table:table-cell office:value-type="string">
            <text:p>Ety/SIL</text:p>
          </table:table-cell>
          <table:table-cell office:value-type="string">
            <text:p>SIL</text:p>
          </table:table-cell>
          <table:table-cell office:value-type="string">
            <text:p>*shine (white)</text:p>
          </table:table-cell>
          <table:table-cell office:value-type="string">
            <text:p>Let/425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61">
            <text:p>861</text:p>
          </table:table-cell>
          <table:table-cell table:number-columns-repeated="2"/>
          <table:table-cell office:value-type="string">
            <text:p>SINI</text:p>
          </table:table-cell>
          <table:table-cell office:value-type="string">
            <text:p>pale blue</text:p>
          </table:table-cell>
          <table:table-cell office:value-type="string">
            <text:p>QL/83</text:p>
          </table:table-cell>
          <table:table-cell table:number-columns-repeated="3"/>
          <table:table-cell office:value-type="string">
            <text:p>Q. sinca</text:p>
          </table:table-cell>
          <table:table-cell office:value-type="string">
            <text:p>flint</text:p>
          </table:table-cell>
          <table:table-cell office:value-type="string">
            <text:p>LotR/979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62">
            <text:p>862</text:p>
          </table:table-cell>
          <table:table-cell table:number-columns-repeated="2"/>
          <table:table-cell office:value-type="string">
            <text:p>SIŊI</text:p>
          </table:table-cell>
          <table:table-cell office:value-type="string">
            <text:p>*salt</text:p>
          </table:table-cell>
          <table:table-cell office:value-type="string">
            <text:p>QL/8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table:number-columns-repeated="2"/>
          <table:table-cell office:value-type="string">
            <text:p>SIPI</text:p>
          </table:table-cell>
          <table:table-cell office:value-type="string">
            <text:p>whistle, pipe</text:p>
          </table:table-cell>
          <table:table-cell office:value-type="string">
            <text:p>QL/8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table:number-columns-repeated="2"/>
          <table:table-cell office:value-type="string">
            <text:p>SIQI</text:p>
          </table:table-cell>
          <table:table-cell office:value-type="string">
            <text:p>sigh, say alas</text:p>
          </table:table-cell>
          <table:table-cell office:value-type="string">
            <text:p>QL/8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S. sîr</text:p>
          </table:table-cell>
          <table:table-cell office:value-type="string">
            <text:p>river</text:p>
          </table:table-cell>
          <table:table-cell office:value-type="string">
            <text:p>SIŘI</text:p>
          </table:table-cell>
          <table:table-cell office:value-type="string">
            <text:p>flow</text:p>
          </table:table-cell>
          <table:table-cell office:value-type="string">
            <text:p>QL/84</text:p>
          </table:table-cell>
          <table:table-cell office:value-type="string">
            <text:p>SIR</text:p>
          </table:table-cell>
          <table:table-cell office:value-type="string">
            <text:p>flow</text:p>
          </table:table-cell>
          <table:table-cell office:value-type="string">
            <text:p>Ety/SIR</text:p>
          </table:table-cell>
          <table:table-cell office:value-type="string">
            <text:p>Q. sirya-</text:p>
          </table:table-cell>
          <table:table-cell office:value-type="string">
            <text:p>flow</text:p>
          </table:table-cell>
          <table:table-cell office:value-type="string">
            <text:p>PE22/134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table:number-columns-repeated="2"/>
          <table:table-cell office:value-type="string">
            <text:p>SIRIP</text:p>
          </table:table-cell>
          <table:table-cell office:value-type="string">
            <text:p>*stalk</text:p>
          </table:table-cell>
          <table:table-cell office:value-type="string">
            <text:p>QL/8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7">
            <text:p>867</text:p>
          </table:table-cell>
          <table:table-cell table:number-columns-repeated="2"/>
          <table:table-cell office:value-type="string">
            <text:p>SISI</text:p>
          </table:table-cell>
          <table:table-cell office:value-type="string">
            <text:p>*singe, etc.</text:p>
          </table:table-cell>
          <table:table-cell office:value-type="string">
            <text:p>QL/8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table:number-columns-repeated="2"/>
          <table:table-cell office:value-type="string">
            <text:p>SITI/SITU</text:p>
          </table:table-cell>
          <table:table-cell office:value-type="string">
            <text:p>*custom, habit</text:p>
          </table:table-cell>
          <table:table-cell office:value-type="string">
            <text:p>QL/8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69">
            <text:p>869</text:p>
          </table:table-cell>
          <table:table-cell table:number-columns-repeated="5"/>
          <table:table-cell office:value-type="string">
            <text:p>SIW</text:p>
          </table:table-cell>
          <table:table-cell office:value-type="string">
            <text:p>excite, urge</text:p>
          </table:table-cell>
          <table:table-cell office:value-type="string">
            <text:p>Ety/SIW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S. Esgalduin</text:p>
          </table:table-cell>
          <table:table-cell office:value-type="string">
            <text:p>River under Veil</text:p>
          </table:table-cell>
          <table:table-cell table:number-columns-repeated="3"/>
          <table:table-cell office:value-type="string">
            <text:p>SKAL¹</text:p>
          </table:table-cell>
          <table:table-cell office:value-type="string">
            <text:p>screen, hide</text:p>
          </table:table-cell>
          <table:table-cell office:value-type="string">
            <text:p>Ety/SKAL¹</text:p>
          </table:table-cell>
          <table:table-cell office:value-type="string">
            <text:p>SKAL</text:p>
          </table:table-cell>
          <table:table-cell office:value-type="string">
            <text:p>cover, veil, cloak</text:p>
          </table:table-cell>
          <table:table-cell office:value-type="string">
            <text:p>PE17/18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71">
            <text:p>871</text:p>
          </table:table-cell>
          <table:table-cell table:number-columns-repeated="5"/>
          <table:table-cell office:value-type="string">
            <text:p>SKAL²</text:p>
          </table:table-cell>
          <table:table-cell office:value-type="string">
            <text:p>small fish</text:p>
          </table:table-cell>
          <table:table-cell office:value-type="string">
            <text:p>Ety/SKAL²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72">
            <text:p>872</text:p>
          </table:table-cell>
          <table:table-cell table:number-columns-repeated="5"/>
          <table:table-cell office:value-type="string">
            <text:p>SKAR</text:p>
          </table:table-cell>
          <table:table-cell office:value-type="string">
            <text:p>tear, rend</text:p>
          </table:table-cell>
          <table:table-cell office:value-type="string">
            <text:p>Ety/SK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73">
            <text:p>873</text:p>
          </table:table-cell>
          <table:table-cell table:number-columns-repeated="5"/>
          <table:table-cell office:value-type="string">
            <text:p>SKAR²</text:p>
          </table:table-cell>
          <table:table-cell office:value-type="string">
            <text:p>stop, end; limit</text:p>
          </table:table-cell>
          <table:table-cell office:value-type="string">
            <text:p>EtyAC/SKAR²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74">
            <text:p>874</text:p>
          </table:table-cell>
          <table:table-cell table:number-columns-repeated="5"/>
          <table:table-cell office:value-type="string">
            <text:p>SKAT</text:p>
          </table:table-cell>
          <table:table-cell office:value-type="string">
            <text:p>break asunder</text:p>
          </table:table-cell>
          <table:table-cell office:value-type="string">
            <text:p>Ety/SKA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75">
            <text:p>875</text:p>
          </table:table-cell>
          <table:table-cell table:number-columns-repeated="5"/>
          <table:table-cell office:value-type="string">
            <text:p>SKEL</text:p>
          </table:table-cell>
          <table:table-cell office:value-type="string">
            <text:p>*skin</text:p>
          </table:table-cell>
          <table:table-cell office:value-type="string">
            <text:p>Ety/SKE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76">
            <text:p>876</text:p>
          </table:table-cell>
          <table:table-cell table:number-columns-repeated="8"/>
          <table:table-cell office:value-type="string">
            <text:p>SKEY</text:p>
          </table:table-cell>
          <table:table-cell office:value-type="string">
            <text:p>pass</text:p>
          </table:table-cell>
          <table:table-cell office:value-type="string">
            <text:p>PE22/15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77">
            <text:p>877</text:p>
          </table:table-cell>
          <table:table-cell table:number-columns-repeated="8"/>
          <table:table-cell office:value-type="string">
            <text:p>SKOR</text:p>
          </table:table-cell>
          <table:table-cell office:value-type="string">
            <text:p>rough, marred, unsymmetrical</text:p>
          </table:table-cell>
          <table:table-cell office:value-type="string">
            <text:p>PE17/18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78">
            <text:p>878</text:p>
          </table:table-cell>
          <table:table-cell table:number-columns-repeated="5"/>
          <table:table-cell office:value-type="string">
            <text:p>SKOR</text:p>
          </table:table-cell>
          <table:table-cell office:value-type="string">
            <text:p>expect, wait for</text:p>
          </table:table-cell>
          <table:table-cell office:value-type="string">
            <text:p>PE22/113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79">
            <text:p>879</text:p>
          </table:table-cell>
          <table:table-cell table:number-columns-repeated="8"/>
          <table:table-cell office:value-type="string">
            <text:p>SKŪ/KHŪ</text:p>
          </table:table-cell>
          <table:table-cell office:value-type="string">
            <text:p>curse</text:p>
          </table:table-cell>
          <table:table-cell office:value-type="string">
            <text:p>PE17/14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table:number-columns-repeated="5"/>
          <table:table-cell office:value-type="string">
            <text:p>SKWAR</text:p>
          </table:table-cell>
          <table:table-cell office:value-type="string">
            <text:p>crooked</text:p>
          </table:table-cell>
          <table:table-cell office:value-type="string">
            <text:p>Ety/SKW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81">
            <text:p>881</text:p>
          </table:table-cell>
          <table:table-cell table:number-columns-repeated="2"/>
          <table:table-cell office:value-type="string">
            <text:p>SAYAPA</text:p>
          </table:table-cell>
          <table:table-cell office:value-type="string">
            <text:p>*shoe</text:p>
          </table:table-cell>
          <table:table-cell office:value-type="string">
            <text:p>QL/82</text:p>
          </table:table-cell>
          <table:table-cell office:value-type="string">
            <text:p>SKYAP</text:p>
          </table:table-cell>
          <table:table-cell office:value-type="string">
            <text:p>*shoe</text:p>
          </table:table-cell>
          <table:table-cell office:value-type="string">
            <text:p>Ety/SKYAP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table:number-columns-repeated="8"/>
          <table:table-cell office:value-type="string">
            <text:p>SLAS</text:p>
          </table:table-cell>
          <table:table-cell office:value-type="string">
            <text:p>ear</text:p>
          </table:table-cell>
          <table:table-cell office:value-type="string">
            <text:p>PE17/7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Q. Ungoliante</text:p>
          </table:table-cell>
          <table:table-cell/>
          <table:table-cell office:value-type="string">
            <text:p>LI+YA</text:p>
          </table:table-cell>
          <table:table-cell office:value-type="string">
            <text:p>unite many in one</text:p>
          </table:table-cell>
          <table:table-cell office:value-type="string">
            <text:p>QL/53</text:p>
          </table:table-cell>
          <table:table-cell office:value-type="string">
            <text:p>SLIG</text:p>
          </table:table-cell>
          <table:table-cell office:value-type="string">
            <text:p>*entwine, thread; spider</text:p>
          </table:table-cell>
          <table:table-cell office:value-type="string">
            <text:p>Ety/SLIG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84">
            <text:p>884</text:p>
          </table:table-cell>
          <table:table-cell table:number-columns-repeated="5"/>
          <table:table-cell office:value-type="string">
            <text:p>SLIK</text:p>
          </table:table-cell>
          <table:table-cell office:value-type="string">
            <text:p>creep</text:p>
          </table:table-cell>
          <table:table-cell office:value-type="string">
            <text:p>PE22/113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85">
            <text:p>885</text:p>
          </table:table-cell>
          <table:table-cell table:number-columns-repeated="2"/>
          <table:table-cell office:value-type="string">
            <text:p>SḶŘḶ</text:p>
          </table:table-cell>
          <table:table-cell office:value-type="string">
            <text:p>*slender</text:p>
          </table:table-cell>
          <table:table-cell office:value-type="string">
            <text:p>QL/84</text:p>
          </table:table-cell>
          <table:table-cell office:value-type="string">
            <text:p>SLIN</text:p>
          </table:table-cell>
          <table:table-cell office:value-type="string">
            <text:p>*fine, delicate</text:p>
          </table:table-cell>
          <table:table-cell office:value-type="string">
            <text:p>Ety/SLIN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86">
            <text:p>886</text:p>
          </table:table-cell>
          <table:table-cell table:number-columns-repeated="2"/>
          <table:table-cell office:value-type="string">
            <text:p>G. lint</text:p>
          </table:table-cell>
          <table:table-cell office:value-type="string">
            <text:p>quick, agile, nimble</text:p>
          </table:table-cell>
          <table:table-cell office:value-type="string">
            <text:p>GL/54</text:p>
          </table:table-cell>
          <table:table-cell office:value-type="string">
            <text:p>(S)LIT</text:p>
          </table:table-cell>
          <table:table-cell office:value-type="string">
            <text:p>swiftly, speed</text:p>
          </table:table-cell>
          <table:table-cell office:value-type="string">
            <text:p>PE22/127</text:p>
          </table:table-cell>
          <table:table-cell office:value-type="string">
            <text:p>Q. linta</text:p>
          </table:table-cell>
          <table:table-cell office:value-type="string">
            <text:p>swift</text:p>
          </table:table-cell>
          <table:table-cell office:value-type="string">
            <text:p>LotR/37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87">
            <text:p>887</text:p>
          </table:table-cell>
          <table:table-cell table:number-columns-repeated="2"/>
          <table:table-cell office:value-type="string">
            <text:p>LEẆE</text:p>
          </table:table-cell>
          <table:table-cell office:value-type="string">
            <text:p>*sick</text:p>
          </table:table-cell>
          <table:table-cell office:value-type="string">
            <text:p>QL/53</text:p>
          </table:table-cell>
          <table:table-cell office:value-type="string">
            <text:p>SLIW</text:p>
          </table:table-cell>
          <table:table-cell office:value-type="string">
            <text:p>sickly</text:p>
          </table:table-cell>
          <table:table-cell office:value-type="string">
            <text:p>Ety/SLIW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table:number-columns-repeated="2"/>
          <table:table-cell office:value-type="string">
            <text:p>SḶKḶ²</text:p>
          </table:table-cell>
          <table:table-cell office:value-type="string">
            <text:p>rich, lush</text:p>
          </table:table-cell>
          <table:table-cell office:value-type="string">
            <text:p>QL/8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89">
            <text:p>889</text:p>
          </table:table-cell>
          <table:table-cell table:number-columns-repeated="2"/>
          <table:table-cell office:value-type="string">
            <text:p>LOŘO</text:p>
          </table:table-cell>
          <table:table-cell office:value-type="string">
            <text:p>*loud noise</text:p>
          </table:table-cell>
          <table:table-cell office:value-type="string">
            <text:p>QL/56</text:p>
          </table:table-cell>
          <table:table-cell table:number-columns-repeated="3"/>
          <table:table-cell office:value-type="string">
            <text:p>SLON</text:p>
          </table:table-cell>
          <table:table-cell office:value-type="string">
            <text:p>noise, sound</text:p>
          </table:table-cell>
          <table:table-cell office:value-type="string">
            <text:p>PE17/138; VT48/29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table:number-columns-repeated="8"/>
          <table:table-cell office:value-type="string">
            <text:p>SLOY</text:p>
          </table:table-cell>
          <table:table-cell office:value-type="string">
            <text:p>*poison</text:p>
          </table:table-cell>
          <table:table-cell office:value-type="string">
            <text:p>PE17/18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91">
            <text:p>891</text:p>
          </table:table-cell>
          <table:table-cell table:number-columns-repeated="2"/>
          <table:table-cell office:value-type="string">
            <text:p>SḶTḶ</text:p>
          </table:table-cell>
          <table:table-cell office:value-type="string">
            <text:p>*sift</text:p>
          </table:table-cell>
          <table:table-cell office:value-type="string">
            <text:p>QL/8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92">
            <text:p>892</text:p>
          </table:table-cell>
          <table:table-cell table:number-columns-repeated="5"/>
          <table:table-cell office:value-type="string">
            <text:p>SLUK</text:p>
          </table:table-cell>
          <table:table-cell office:value-type="string">
            <text:p>swallow</text:p>
          </table:table-cell>
          <table:table-cell office:value-type="string">
            <text:p>Ety/SLU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93">
            <text:p>893</text:p>
          </table:table-cell>
          <table:table-cell table:number-columns-repeated="5"/>
          <table:table-cell office:value-type="string">
            <text:p>SLUS/SRUS</text:p>
          </table:table-cell>
          <table:table-cell office:value-type="string">
            <text:p>whisper</text:p>
          </table:table-cell>
          <table:table-cell office:value-type="string">
            <text:p>Ety/SLU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94">
            <text:p>894</text:p>
          </table:table-cell>
          <table:table-cell table:number-columns-repeated="5"/>
          <table:table-cell office:value-type="string">
            <text:p>SMAG</text:p>
          </table:table-cell>
          <table:table-cell office:value-type="string">
            <text:p>soil, stain</text:p>
          </table:table-cell>
          <table:table-cell office:value-type="string">
            <text:p>Ety/SMA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95">
            <text:p>895</text:p>
          </table:table-cell>
          <table:table-cell table:number-columns-repeated="2"/>
          <table:table-cell office:value-type="string">
            <text:p>SṆKṆ</text:p>
          </table:table-cell>
          <table:table-cell office:value-type="string">
            <text:p>rend, tear</text:p>
          </table:table-cell>
          <table:table-cell office:value-type="string">
            <text:p>QL/85</text:p>
          </table:table-cell>
          <table:table-cell table:number-columns-repeated="3"/>
          <table:table-cell office:value-type="string">
            <text:p>SNAG</text:p>
          </table:table-cell>
          <table:table-cell office:value-type="string">
            <text:p>wound, gash</text:p>
          </table:table-cell>
          <table:table-cell office:value-type="string">
            <text:p>PE19/91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896">
            <text:p>896</text:p>
          </table:table-cell>
          <table:table-cell table:number-columns-repeated="5"/>
          <table:table-cell office:value-type="string">
            <text:p>SNAR</text:p>
          </table:table-cell>
          <table:table-cell office:value-type="string">
            <text:p>tie</text:p>
          </table:table-cell>
          <table:table-cell office:value-type="string">
            <text:p>Ety/SN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97">
            <text:p>897</text:p>
          </table:table-cell>
          <table:table-cell table:number-columns-repeated="5"/>
          <table:table-cell office:value-type="string">
            <text:p>SNAS/SNAT</text:p>
          </table:table-cell>
          <table:table-cell office:value-type="string">
            <text:p>*gore, triangle</text:p>
          </table:table-cell>
          <table:table-cell office:value-type="string">
            <text:p>Ety/SNA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98">
            <text:p>898</text:p>
          </table:table-cell>
          <table:table-cell table:number-columns-repeated="5"/>
          <table:table-cell office:value-type="string">
            <text:p>SNEW</text:p>
          </table:table-cell>
          <table:table-cell office:value-type="string">
            <text:p>entangle</text:p>
          </table:table-cell>
          <table:table-cell office:value-type="string">
            <text:p>Ety/SNEW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99">
            <text:p>899</text:p>
          </table:table-cell>
          <table:table-cell table:number-columns-repeated="2"/>
          <table:table-cell office:value-type="string">
            <text:p>SṆTṆ</text:p>
          </table:table-cell>
          <table:table-cell office:value-type="string">
            <text:p>esteem</text:p>
          </table:table-cell>
          <table:table-cell office:value-type="string">
            <text:p>QL/8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table:number-columns-repeated="2"/>
          <table:table-cell office:value-type="string">
            <text:p>SṆT͡YṆ</text:p>
          </table:table-cell>
          <table:table-cell office:value-type="string">
            <text:p>twinkle</text:p>
          </table:table-cell>
          <table:table-cell office:value-type="string">
            <text:p>QL/8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01">
            <text:p>901</text:p>
          </table:table-cell>
          <table:table-cell table:number-columns-repeated="5"/>
          <table:table-cell office:value-type="string">
            <text:p>SNUR</text:p>
          </table:table-cell>
          <table:table-cell office:value-type="string">
            <text:p>twist</text:p>
          </table:table-cell>
          <table:table-cell office:value-type="string">
            <text:p>Ety/SNU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table:number-columns-repeated="2"/>
          <table:table-cell office:value-type="string">
            <text:p>SŌ</text:p>
          </table:table-cell>
          <table:table-cell office:value-type="string">
            <text:p>*together</text:p>
          </table:table-cell>
          <table:table-cell office:value-type="string">
            <text:p>QL/8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03">
            <text:p>903</text:p>
          </table:table-cell>
          <table:table-cell table:number-columns-repeated="2"/>
          <table:table-cell office:value-type="string">
            <text:p>SOKO</text:p>
          </table:table-cell>
          <table:table-cell office:value-type="string">
            <text:p>*drink</text:p>
          </table:table-cell>
          <table:table-cell office:value-type="string">
            <text:p>QL/85</text:p>
          </table:table-cell>
          <table:table-cell office:value-type="string">
            <text:p>SUK/SUG</text:p>
          </table:table-cell>
          <table:table-cell office:value-type="string">
            <text:p>drink</text:p>
          </table:table-cell>
          <table:table-cell office:value-type="string">
            <text:p>Ety/SUK</text:p>
          </table:table-cell>
          <table:table-cell office:value-type="string">
            <text:p>SOK/SUK</text:p>
          </table:table-cell>
          <table:table-cell office:value-type="string">
            <text:p>drain, drink</text:p>
          </table:table-cell>
          <table:table-cell office:value-type="string">
            <text:p>PE18/94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04">
            <text:p>904</text:p>
          </table:table-cell>
          <table:table-cell table:number-columns-repeated="2"/>
          <table:table-cell office:value-type="string">
            <text:p>SOLO/THOL</text:p>
          </table:table-cell>
          <table:table-cell office:value-type="string">
            <text:p>*surf</text:p>
          </table:table-cell>
          <table:table-cell office:value-type="string">
            <text:p>QL/85; GL/73</text:p>
          </table:table-cell>
          <table:table-cell office:value-type="string">
            <text:p>SOL</text:p>
          </table:table-cell>
          <table:table-cell office:value-type="string">
            <text:p>*surf</text:p>
          </table:table-cell>
          <table:table-cell office:value-type="string">
            <text:p>Ety/SOL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table:number-columns-repeated="8"/>
          <table:table-cell office:value-type="string">
            <text:p>SOŊ</text:p>
          </table:table-cell>
          <table:table-cell office:value-type="string">
            <text:p>*mouth</text:p>
          </table:table-cell>
          <table:table-cell office:value-type="string">
            <text:p>PE17/12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table:number-columns-repeated="2"/>
          <table:table-cell office:value-type="string">
            <text:p>SORO/ÐORO</text:p>
          </table:table-cell>
          <table:table-cell office:value-type="string">
            <text:p>sit</text:p>
          </table:table-cell>
          <table:table-cell office:value-type="string">
            <text:p>QL/8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table:number-columns-repeated="8"/>
          <table:table-cell office:value-type="string">
            <text:p>SOTO</text:p>
          </table:table-cell>
          <table:table-cell office:value-type="string">
            <text:p>shelter, protect, defend</text:p>
          </table:table-cell>
          <table:table-cell office:value-type="string">
            <text:p>WJ/41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table:number-columns-repeated="2"/>
          <table:table-cell office:value-type="string">
            <text:p>SOTO/ÐOTO</text:p>
          </table:table-cell>
          <table:table-cell office:value-type="string">
            <text:p>drop, fall</text:p>
          </table:table-cell>
          <table:table-cell office:value-type="string">
            <text:p>QL/8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table:number-columns-repeated="2"/>
          <table:table-cell office:value-type="string">
            <text:p>SOVO/SOW̯O</text:p>
          </table:table-cell>
          <table:table-cell office:value-type="string">
            <text:p>wash</text:p>
          </table:table-cell>
          <table:table-cell office:value-type="string">
            <text:p>QL/8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table:number-columns-repeated="2"/>
          <table:table-cell office:value-type="string">
            <text:p>PALAS</text:p>
          </table:table-cell>
          <table:table-cell office:value-type="string">
            <text:p>*foam, splash</text:p>
          </table:table-cell>
          <table:table-cell office:value-type="string">
            <text:p>QL/72</text:p>
          </table:table-cell>
          <table:table-cell office:value-type="string">
            <text:p>SPAL(AS)</text:p>
          </table:table-cell>
          <table:table-cell office:value-type="string">
            <text:p>*foam</text:p>
          </table:table-cell>
          <table:table-cell office:value-type="string">
            <text:p>Ety/SPAL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11">
            <text:p>911</text:p>
          </table:table-cell>
          <table:table-cell table:number-columns-repeated="5"/>
          <table:table-cell office:value-type="string">
            <text:p>SPAN</text:p>
          </table:table-cell>
          <table:table-cell office:value-type="string">
            <text:p>white</text:p>
          </table:table-cell>
          <table:table-cell office:value-type="string">
            <text:p>Ety/SPAN</text:p>
          </table:table-cell>
          <table:table-cell office:value-type="string">
            <text:p>SPAN</text:p>
          </table:table-cell>
          <table:table-cell office:value-type="string">
            <text:p>cover, veil, cloak</text:p>
          </table:table-cell>
          <table:table-cell office:value-type="string">
            <text:p>PE17/184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S. fang</text:p>
          </table:table-cell>
          <table:table-cell office:value-type="string">
            <text:p>beard</text:p>
          </table:table-cell>
          <table:table-cell office:value-type="string">
            <text:p>G. fang</text:p>
          </table:table-cell>
          <table:table-cell office:value-type="string">
            <text:p>a long beard</text:p>
          </table:table-cell>
          <table:table-cell office:value-type="string">
            <text:p>GL/34</text:p>
          </table:table-cell>
          <table:table-cell office:value-type="string">
            <text:p>SPANAG</text:p>
          </table:table-cell>
          <table:table-cell office:value-type="string">
            <text:p>beard</text:p>
          </table:table-cell>
          <table:table-cell office:value-type="string">
            <text:p>Ety/SPÁNAG</text:p>
          </table:table-cell>
          <table:table-cell office:value-type="string">
            <text:p>S. fang</text:p>
          </table:table-cell>
          <table:table-cell office:value-type="string">
            <text:p>beard</text:p>
          </table:table-cell>
          <table:table-cell office:value-type="string">
            <text:p>PE17/84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13">
            <text:p>913</text:p>
          </table:table-cell>
          <table:table-cell table:number-columns-repeated="5"/>
          <table:table-cell office:value-type="string">
            <text:p>SPAR</text:p>
          </table:table-cell>
          <table:table-cell office:value-type="string">
            <text:p>hunt, pursue</text:p>
          </table:table-cell>
          <table:table-cell office:value-type="string">
            <text:p>Ety/SPAR</text:p>
          </table:table-cell>
          <table:table-cell office:value-type="string">
            <text:p>SPAR</text:p>
          </table:table-cell>
          <table:table-cell office:value-type="string">
            <text:p>hunt</text:p>
          </table:table-cell>
          <table:table-cell office:value-type="string">
            <text:p>PE17/8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14">
            <text:p>914</text:p>
          </table:table-cell>
          <table:table-cell table:number-columns-repeated="5"/>
          <table:table-cell office:value-type="string">
            <text:p>SPAR²</text:p>
          </table:table-cell>
          <table:table-cell office:value-type="string">
            <text:p>strew, spread</text:p>
          </table:table-cell>
          <table:table-cell office:value-type="string">
            <text:p>EtyAC/SPAR²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15">
            <text:p>915</text:p>
          </table:table-cell>
          <table:table-cell table:number-columns-repeated="5"/>
          <table:table-cell office:value-type="string">
            <text:p>SPAY</text:p>
          </table:table-cell>
          <table:table-cell office:value-type="string">
            <text:p>despise, contemn</text:p>
          </table:table-cell>
          <table:table-cell office:value-type="string">
            <text:p>Ety/SPAY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S. Glorfindel</text:p>
          </table:table-cell>
          <table:table-cell office:value-type="string">
            <text:p>Golden-hair</text:p>
          </table:table-cell>
          <table:table-cell office:value-type="string">
            <text:p>FIŘI</text:p>
          </table:table-cell>
          <table:table-cell office:value-type="string">
            <text:p>*hair</text:p>
          </table:table-cell>
          <table:table-cell office:value-type="string">
            <text:p>QL/38</text:p>
          </table:table-cell>
          <table:table-cell office:value-type="string">
            <text:p>SPIN</text:p>
          </table:table-cell>
          <table:table-cell office:value-type="string">
            <text:p>*hair</text:p>
          </table:table-cell>
          <table:table-cell office:value-type="string">
            <text:p>Ety/SPIN</text:p>
          </table:table-cell>
          <table:table-cell office:value-type="string">
            <text:p>SPIN(ID)</text:p>
          </table:table-cell>
          <table:table-cell office:value-type="string">
            <text:p>tress of hair</text:p>
          </table:table-cell>
          <table:table-cell office:value-type="string">
            <text:p>PE17/119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table:number-columns-repeated="8"/>
          <table:table-cell office:value-type="string">
            <text:p>SRAB</text:p>
          </table:table-cell>
          <table:table-cell office:value-type="string">
            <text:p>wild, not tamed</text:p>
          </table:table-cell>
          <table:table-cell office:value-type="string">
            <text:p>PE17/7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18">
            <text:p>918</text:p>
          </table:table-cell>
          <table:table-cell table:number-columns-repeated="5"/>
          <table:table-cell office:value-type="string">
            <text:p>RAG</text:p>
          </table:table-cell>
          <table:table-cell office:value-type="string">
            <text:p>*crooked</text:p>
          </table:table-cell>
          <table:table-cell office:value-type="string">
            <text:p>Ety/RAG</text:p>
          </table:table-cell>
          <table:table-cell office:value-type="string">
            <text:p>SRA(G)</text:p>
          </table:table-cell>
          <table:table-cell office:value-type="string">
            <text:p>awkward; awry</text:p>
          </table:table-cell>
          <table:table-cell office:value-type="string">
            <text:p>PE17/158, 185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table:number-columns-repeated="8"/>
          <table:table-cell office:value-type="string">
            <text:p>SRA(W)</text:p>
          </table:table-cell>
          <table:table-cell office:value-type="string">
            <text:p>body</text:p>
          </table:table-cell>
          <table:table-cell office:value-type="string">
            <text:p>VT47/3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table:number-columns-repeated="8"/>
          <table:table-cell office:value-type="string">
            <text:p>SRAYA</text:p>
          </table:table-cell>
          <table:table-cell office:value-type="string">
            <text:p>easy, pliant</text:p>
          </table:table-cell>
          <table:table-cell office:value-type="string">
            <text:p>PE17/18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21">
            <text:p>921</text:p>
          </table:table-cell>
          <table:table-cell table:number-columns-repeated="5"/>
          <table:table-cell office:value-type="string">
            <text:p>SRIP</text:p>
          </table:table-cell>
          <table:table-cell office:value-type="string">
            <text:p>scratch</text:p>
          </table:table-cell>
          <table:table-cell office:value-type="string">
            <text:p>Ety/SRIP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table:number-columns-repeated="8"/>
          <table:table-cell office:value-type="string">
            <text:p>SRIS</text:p>
          </table:table-cell>
          <table:table-cell office:value-type="string">
            <text:p>snow</text:p>
          </table:table-cell>
          <table:table-cell office:value-type="string">
            <text:p>PE17/16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table:number-columns-repeated="8"/>
          <table:table-cell office:value-type="string">
            <text:p>SRIT</text:p>
          </table:table-cell>
          <table:table-cell office:value-type="string">
            <text:p>complete a work</text:p>
          </table:table-cell>
          <table:table-cell office:value-type="string">
            <text:p>PE17/14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table:number-columns-repeated="2"/>
          <table:table-cell office:value-type="string">
            <text:p>SṚKṚ</text:p>
          </table:table-cell>
          <table:table-cell office:value-type="string">
            <text:p>fat</text:p>
          </table:table-cell>
          <table:table-cell office:value-type="string">
            <text:p>QL/8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25">
            <text:p>925</text:p>
          </table:table-cell>
          <table:table-cell table:number-columns-repeated="5"/>
          <table:table-cell office:value-type="string">
            <text:p>SRŌ</text:p>
          </table:table-cell>
          <table:table-cell office:value-type="string">
            <text:p>east</text:p>
          </table:table-cell>
          <table:table-cell office:value-type="string">
            <text:p>PE22/127</text:p>
          </table:table-cell>
          <table:table-cell office:value-type="string">
            <text:p>S. rhûn</text:p>
          </table:table-cell>
          <table:table-cell office:value-type="string">
            <text:p>east</text:p>
          </table:table-cell>
          <table:table-cell office:value-type="string">
            <text:p>LotR/111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table:number-columns-repeated="8"/>
          <table:table-cell office:value-type="string">
            <text:p>SRON</text:p>
          </table:table-cell>
          <table:table-cell office:value-type="string">
            <text:p>flesh, substance, matter</text:p>
          </table:table-cell>
          <table:table-cell office:value-type="string">
            <text:p>MR/23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table:number-columns-repeated="8"/>
          <table:table-cell office:value-type="string">
            <text:p>SRUGU</text:p>
          </table:table-cell>
          <table:table-cell office:value-type="string">
            <text:p>*evil, wicked</text:p>
          </table:table-cell>
          <table:table-cell office:value-type="string">
            <text:p>PE17/17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table:number-columns-repeated="2"/>
          <table:table-cell office:value-type="string">
            <text:p>SṢT͡YṢ</text:p>
          </table:table-cell>
          <table:table-cell office:value-type="string">
            <text:p>*ulcer, boil</text:p>
          </table:table-cell>
          <table:table-cell office:value-type="string">
            <text:p>QL/8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Q. sambe</text:p>
          </table:table-cell>
          <table:table-cell office:value-type="string">
            <text:p>room</text:p>
          </table:table-cell>
          <table:table-cell table:style-name="ce3" office:value-type="string">
            <text:p>SAMA</text:p>
          </table:table-cell>
          <table:table-cell office:value-type="string">
            <text:p>*chamber</text:p>
          </table:table-cell>
          <table:table-cell office:value-type="string">
            <text:p>QL/81; GL/72</text:p>
          </table:table-cell>
          <table:table-cell office:value-type="string">
            <text:p>STAB</text:p>
          </table:table-cell>
          <table:table-cell office:value-type="string">
            <text:p>*wood</text:p>
          </table:table-cell>
          <table:table-cell office:value-type="string">
            <text:p>Ety/STAB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S. Orthanc</text:p>
          </table:table-cell>
          <table:table-cell office:value-type="string">
            <text:p>Forked Height</text:p>
          </table:table-cell>
          <table:table-cell table:number-columns-repeated="3"/>
          <table:table-cell office:value-type="string">
            <text:p>STAK</text:p>
          </table:table-cell>
          <table:table-cell office:value-type="string">
            <text:p>split, insert</text:p>
          </table:table-cell>
          <table:table-cell office:value-type="string">
            <text:p>Ety/STAK</text:p>
          </table:table-cell>
          <table:table-cell office:value-type="string">
            <text:p>S. Orthanc</text:p>
          </table:table-cell>
          <table:table-cell office:value-type="string">
            <text:p>Forked Height</text:p>
          </table:table-cell>
          <table:table-cell office:value-type="string">
            <text:p>UT/40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31">
            <text:p>931</text:p>
          </table:table-cell>
          <table:table-cell table:number-columns-repeated="5"/>
          <table:table-cell office:value-type="string">
            <text:p>STAL</text:p>
          </table:table-cell>
          <table:table-cell office:value-type="string">
            <text:p>steep</text:p>
          </table:table-cell>
          <table:table-cell office:value-type="string">
            <text:p>Ety/STA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32">
            <text:p>932</text:p>
          </table:table-cell>
          <table:table-cell table:number-columns-repeated="5"/>
          <table:table-cell office:value-type="string">
            <text:p>STALAG</text:p>
          </table:table-cell>
          <table:table-cell office:value-type="string">
            <text:p>*stalwart, steady, firm</text:p>
          </table:table-cell>
          <table:table-cell office:value-type="string">
            <text:p>Ety/STÁLAG</text:p>
          </table:table-cell>
          <table:table-cell office:value-type="string">
            <text:p>STAL</text:p>
          </table:table-cell>
          <table:table-cell office:value-type="string">
            <text:p>strong</text:p>
          </table:table-cell>
          <table:table-cell office:value-type="string">
            <text:p>PE17/115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33">
            <text:p>933</text:p>
          </table:table-cell>
          <table:table-cell table:number-columns-repeated="5"/>
          <table:table-cell office:value-type="string">
            <text:p>STAN</text:p>
          </table:table-cell>
          <table:table-cell office:value-type="string">
            <text:p>fix, decide</text:p>
          </table:table-cell>
          <table:table-cell office:value-type="string">
            <text:p>Ety/STA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34">
            <text:p>934</text:p>
          </table:table-cell>
          <table:table-cell table:number-columns-repeated="5"/>
          <table:table-cell office:value-type="string">
            <text:p>STAR(AN)</text:p>
          </table:table-cell>
          <table:table-cell office:value-type="string">
            <text:p>stiff</text:p>
          </table:table-cell>
          <table:table-cell office:value-type="string">
            <text:p>Ety/STAR, STARA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table:number-columns-repeated="8"/>
          <table:table-cell office:value-type="string">
            <text:p>STEL</text:p>
          </table:table-cell>
          <table:table-cell office:value-type="string">
            <text:p>remain firm</text:p>
          </table:table-cell>
          <table:table-cell office:value-type="string">
            <text:p>WJ/31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36">
            <text:p>936</text:p>
          </table:table-cell>
          <table:table-cell table:number-columns-repeated="5"/>
          <table:table-cell office:value-type="string">
            <text:p>STELEG</text:p>
          </table:table-cell>
          <table:table-cell office:value-type="string">
            <text:p>*point (of spear)</text:p>
          </table:table-cell>
          <table:table-cell office:value-type="string">
            <text:p>Ety/STELE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S./N. thent</text:p>
          </table:table-cell>
          <table:table-cell office:value-type="string">
            <text:p>short</text:p>
          </table:table-cell>
          <table:table-cell table:number-columns-repeated="3"/>
          <table:table-cell office:value-type="string">
            <text:p>STINTĀ</text:p>
          </table:table-cell>
          <table:table-cell office:value-type="string">
            <text:p>short</text:p>
          </table:table-cell>
          <table:table-cell office:value-type="string">
            <text:p>Ety/STINTĀ</text:p>
          </table:table-cell>
          <table:table-cell office:value-type="string">
            <text:p>STEN</text:p>
          </table:table-cell>
          <table:table-cell office:value-type="string">
            <text:p>cut short, limit</text:p>
          </table:table-cell>
          <table:table-cell office:value-type="string">
            <text:p>PE17/185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38">
            <text:p>938</text:p>
          </table:table-cell>
          <table:table-cell table:number-columns-repeated="8"/>
          <table:table-cell office:value-type="string">
            <text:p>STIN</text:p>
          </table:table-cell>
          <table:table-cell office:value-type="string">
            <text:p>grey</text:p>
          </table:table-cell>
          <table:table-cell office:value-type="string">
            <text:p>PE17/18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9">
            <text:p>939</text:p>
          </table:table-cell>
          <table:table-cell table:number-columns-repeated="8"/>
          <table:table-cell office:value-type="string">
            <text:p>STOR/THOR</text:p>
          </table:table-cell>
          <table:table-cell office:value-type="string">
            <text:p>steadfast</text:p>
          </table:table-cell>
          <table:table-cell office:value-type="string">
            <text:p>PE17/18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Q. sundo</text:p>
          </table:table-cell>
          <table:table-cell office:value-type="string">
            <text:p>base, root</text:p>
          </table:table-cell>
          <table:table-cell table:number-columns-repeated="3"/>
          <table:table-cell office:value-type="string">
            <text:p>S(T)UD</text:p>
          </table:table-cell>
          <table:table-cell office:value-type="string">
            <text:p>base, ground</text:p>
          </table:table-cell>
          <table:table-cell office:value-type="string">
            <text:p>Ety/SUD; EtyAC/SUD</text:p>
          </table:table-cell>
          <table:table-cell office:value-type="string">
            <text:p>S. thond</text:p>
          </table:table-cell>
          <table:table-cell office:value-type="string">
            <text:p>root</text:p>
          </table:table-cell>
          <table:table-cell office:value-type="string">
            <text:p>LotR/1115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41">
            <text:p>941</text:p>
          </table:table-cell>
          <table:table-cell table:number-columns-repeated="2"/>
          <table:table-cell office:value-type="string">
            <text:p>SUH͡YU</text:p>
          </table:table-cell>
          <table:table-cell office:value-type="string">
            <text:p>air, breath, exhale</text:p>
          </table:table-cell>
          <table:table-cell table:style-name="ce3" office:value-type="string">
            <text:p>QL/86</text:p>
          </table:table-cell>
          <table:table-cell table:number-columns-repeated="3"/>
          <table:table-cell office:value-type="string">
            <text:p>SŪ</text:p>
          </table:table-cell>
          <table:table-cell office:value-type="string">
            <text:p>blow</text:p>
          </table:table-cell>
          <table:table-cell office:value-type="string">
            <text:p>NM/237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42">
            <text:p>942</text:p>
          </table:table-cell>
          <table:table-cell table:number-columns-repeated="2"/>
          <table:table-cell office:value-type="string">
            <text:p>SUQU</text:p>
          </table:table-cell>
          <table:table-cell office:value-type="string">
            <text:p>*descend</text:p>
          </table:table-cell>
          <table:table-cell office:value-type="string">
            <text:p>QL/87</text:p>
          </table:table-cell>
          <table:table-cell office:value-type="string">
            <text:p>SUB</text:p>
          </table:table-cell>
          <table:table-cell office:value-type="string">
            <text:p>sink</text:p>
          </table:table-cell>
          <table:table-cell office:value-type="string">
            <text:p>PE22/127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43">
            <text:p>943</text:p>
          </table:table-cell>
          <table:table-cell table:number-columns-repeated="2"/>
          <table:table-cell office:value-type="string">
            <text:p>SUKU</text:p>
          </table:table-cell>
          <table:table-cell office:value-type="string">
            <text:p>*resin, gum</text:p>
          </table:table-cell>
          <table:table-cell office:value-type="string">
            <text:p>QL/8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4">
            <text:p>944</text:p>
          </table:table-cell>
          <table:table-cell table:number-columns-repeated="2"/>
          <table:table-cell table:style-name="ce4" office:value-type="string">
            <text:p>SUKU/ÐUKU</text:p>
          </table:table-cell>
          <table:table-cell office:value-type="string">
            <text:p>*sweet</text:p>
          </table:table-cell>
          <table:table-cell office:value-type="string">
            <text:p>QL/8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45">
            <text:p>945</text:p>
          </table:table-cell>
          <table:table-cell table:number-columns-repeated="2"/>
          <table:table-cell table:style-name="ce4" office:value-type="string">
            <text:p>SULU</text:p>
          </table:table-cell>
          <table:table-cell office:value-type="string">
            <text:p>*support</text:p>
          </table:table-cell>
          <table:table-cell office:value-type="string">
            <text:p>QL/87</text:p>
          </table:table-cell>
          <table:table-cell office:value-type="string">
            <text:p>SULUK</text:p>
          </table:table-cell>
          <table:table-cell office:value-type="string">
            <text:p>*root (edible)</text:p>
          </table:table-cell>
          <table:table-cell office:value-type="string">
            <text:p>Ety/SÚLUK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46">
            <text:p>946</text:p>
          </table:table-cell>
          <table:table-cell table:number-columns-repeated="2"/>
          <table:table-cell office:value-type="string">
            <text:p>SURU</text:p>
          </table:table-cell>
          <table:table-cell office:value-type="string">
            <text:p>blow</text:p>
          </table:table-cell>
          <table:table-cell office:value-type="string">
            <text:p>PE13/148, 163</text:p>
          </table:table-cell>
          <table:table-cell table:number-columns-repeated="3"/>
          <table:table-cell office:value-type="string">
            <text:p>SUR(U)</text:p>
          </table:table-cell>
          <table:table-cell office:value-type="string">
            <text:p>noise of wind</text:p>
          </table:table-cell>
          <table:table-cell office:value-type="string">
            <text:p>PE17/62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47">
            <text:p>947</text:p>
          </table:table-cell>
          <table:table-cell table:number-columns-repeated="2"/>
          <table:table-cell office:value-type="string">
            <text:p>SṢT</text:p>
          </table:table-cell>
          <table:table-cell office:value-type="string">
            <text:p>*hiss, spit</text:p>
          </table:table-cell>
          <table:table-cell office:value-type="string">
            <text:p>PE13/163</text:p>
          </table:table-cell>
          <table:table-cell office:value-type="string">
            <text:p>SUS/SIS</text:p>
          </table:table-cell>
          <table:table-cell office:value-type="string">
            <text:p>hiss</text:p>
          </table:table-cell>
          <table:table-cell office:value-type="string">
            <text:p>Ety/SUS; EtyAC/SIS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48">
            <text:p>948</text:p>
          </table:table-cell>
          <table:table-cell table:number-columns-repeated="2"/>
          <table:table-cell office:value-type="string">
            <text:p>SUẈU</text:p>
          </table:table-cell>
          <table:table-cell office:value-type="string">
            <text:p>*feminine patronymic</text:p>
          </table:table-cell>
          <table:table-cell office:value-type="string">
            <text:p>QL/8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9">
            <text:p>949</text:p>
          </table:table-cell>
          <table:table-cell table:number-columns-repeated="8"/>
          <table:table-cell office:value-type="string">
            <text:p>SWĀ</text:p>
          </table:table-cell>
          <table:table-cell office:value-type="string">
            <text:p>sound of wind</text:p>
          </table:table-cell>
          <table:table-cell office:value-type="string">
            <text:p>NM/23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table:number-columns-repeated="5"/>
          <table:table-cell office:value-type="string">
            <text:p>SWAD</text:p>
          </table:table-cell>
          <table:table-cell office:value-type="string">
            <text:p>*sponge, fungus</text:p>
          </table:table-cell>
          <table:table-cell office:value-type="string">
            <text:p>Ety/SWA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Q. hwesta</text:p>
          </table:table-cell>
          <table:table-cell office:value-type="string">
            <text:p>breeze</text:p>
          </table:table-cell>
          <table:table-cell table:number-columns-repeated="3"/>
          <table:table-cell office:value-type="string">
            <text:p>SWES</text:p>
          </table:table-cell>
          <table:table-cell office:value-type="string">
            <text:p>noise of blowing</text:p>
          </table:table-cell>
          <table:table-cell office:value-type="string">
            <text:p>Ety/SWES</text:p>
          </table:table-cell>
          <table:table-cell office:value-type="string">
            <text:p>Q. hwesta</text:p>
          </table:table-cell>
          <table:table-cell office:value-type="string">
            <text:p>breeze</text:p>
          </table:table-cell>
          <table:table-cell office:value-type="string">
            <text:p>LotR/1123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52">
            <text:p>952</text:p>
          </table:table-cell>
          <table:table-cell table:number-columns-repeated="5"/>
          <table:table-cell office:value-type="string">
            <text:p>SWIN</text:p>
          </table:table-cell>
          <table:table-cell office:value-type="string">
            <text:p>whirl, eddy</text:p>
          </table:table-cell>
          <table:table-cell office:value-type="string">
            <text:p>Ety/SWI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Q. Sangahyando</text:p>
          </table:table-cell>
          <table:table-cell office:value-type="string">
            <text:p>Throng-cleaver</text:p>
          </table:table-cell>
          <table:table-cell office:value-type="string">
            <text:p>HYAŘA</text:p>
          </table:table-cell>
          <table:table-cell office:value-type="string">
            <text:p>plough through</text:p>
          </table:table-cell>
          <table:table-cell office:value-type="string">
            <text:p>QL/41</text:p>
          </table:table-cell>
          <table:table-cell office:value-type="string">
            <text:p>SYAD</text:p>
          </table:table-cell>
          <table:table-cell office:value-type="string">
            <text:p>shear through, cleave</text:p>
          </table:table-cell>
          <table:table-cell office:value-type="string">
            <text:p>Ety/SYAD</text:p>
          </table:table-cell>
          <table:table-cell office:value-type="string">
            <text:p>SYAD</text:p>
          </table:table-cell>
          <table:table-cell office:value-type="string">
            <text:p>compress</text:p>
          </table:table-cell>
          <table:table-cell office:value-type="string">
            <text:p>PE18/101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54">
            <text:p>954</text:p>
          </table:table-cell>
          <table:table-cell table:number-columns-repeated="5"/>
          <table:table-cell office:value-type="string">
            <text:p>SYAL</text:p>
          </table:table-cell>
          <table:table-cell office:value-type="string">
            <text:p>shell</text:p>
          </table:table-cell>
          <table:table-cell office:value-type="string">
            <text:p>Ety/SYA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Q. ta</text:p>
          </table:table-cell>
          <table:table-cell office:value-type="string">
            <text:p>that</text:p>
          </table:table-cell>
          <table:table-cell office:value-type="string">
            <text:p>TA/TAMA</text:p>
          </table:table-cell>
          <table:table-cell office:value-type="string">
            <text:p>demonstrative [this]</text:p>
          </table:table-cell>
          <table:table-cell office:value-type="string">
            <text:p>QL/87</text:p>
          </table:table-cell>
          <table:table-cell office:value-type="string">
            <text:p>TA</text:p>
          </table:table-cell>
          <table:table-cell office:value-type="string">
            <text:p>that</text:p>
          </table:table-cell>
          <table:table-cell office:value-type="string">
            <text:p>Ety/TA</text:p>
          </table:table-cell>
          <table:table-cell office:value-type="string">
            <text:p>TĀ</text:p>
          </table:table-cell>
          <table:table-cell office:value-type="string">
            <text:p>there, then</text:p>
          </table:table-cell>
          <table:table-cell office:value-type="string">
            <text:p>PE17/9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Q. tára</text:p>
          </table:table-cell>
          <table:table-cell office:value-type="string">
            <text:p>lofty, high</text:p>
          </table:table-cell>
          <table:table-cell office:value-type="string">
            <text:p>TAHA</text:p>
          </table:table-cell>
          <table:table-cell office:value-type="string">
            <text:p>*high</text:p>
          </table:table-cell>
          <table:table-cell office:value-type="string">
            <text:p>QL/87</text:p>
          </table:table-cell>
          <table:table-cell office:value-type="string">
            <text:p>TĀ/TAƷ</text:p>
          </table:table-cell>
          <table:table-cell office:value-type="string">
            <text:p>high, lofty; noble</text:p>
          </table:table-cell>
          <table:table-cell office:value-type="string">
            <text:p>Ety/TĀ</text:p>
          </table:table-cell>
          <table:table-cell office:value-type="string">
            <text:p>TĀ/TAG</text:p>
          </table:table-cell>
          <table:table-cell office:value-type="string">
            <text:p>high</text:p>
          </table:table-cell>
          <table:table-cell office:value-type="string">
            <text:p>PE17/186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57">
            <text:p>957</text:p>
          </table:table-cell>
          <table:table-cell table:number-columns-repeated="2"/>
          <table:table-cell office:value-type="string">
            <text:p>TAÐA</text:p>
          </table:table-cell>
          <table:table-cell office:value-type="string">
            <text:p>*enclosure</text:p>
          </table:table-cell>
          <table:table-cell office:value-type="string">
            <text:p>QL/8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58">
            <text:p>958</text:p>
          </table:table-cell>
          <table:table-cell table:number-columns-repeated="2"/>
          <table:table-cell office:value-type="string">
            <text:p>TAKA</text:p>
          </table:table-cell>
          <table:table-cell office:value-type="string">
            <text:p>fix, fasten</text:p>
          </table:table-cell>
          <table:table-cell office:value-type="string">
            <text:p>QL/88</text:p>
          </table:table-cell>
          <table:table-cell office:value-type="string">
            <text:p>TAK</text:p>
          </table:table-cell>
          <table:table-cell office:value-type="string">
            <text:p>fix, make fast</text:p>
          </table:table-cell>
          <table:table-cell office:value-type="string">
            <text:p>Ety/TAK</text:p>
          </table:table-cell>
          <table:table-cell office:value-type="string">
            <text:p>TAK</text:p>
          </table:table-cell>
          <table:table-cell office:value-type="string">
            <text:p>fix, fasten</text:p>
          </table:table-cell>
          <table:table-cell office:value-type="string">
            <text:p>PE18/10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59">
            <text:p>959</text:p>
          </table:table-cell>
          <table:table-cell office:value-type="string">
            <text:p>S. tâl</text:p>
          </table:table-cell>
          <table:table-cell office:value-type="string">
            <text:p>foot</text:p>
          </table:table-cell>
          <table:table-cell office:value-type="string">
            <text:p>TALA</text:p>
          </table:table-cell>
          <table:table-cell office:value-type="string">
            <text:p>support</text:p>
          </table:table-cell>
          <table:table-cell office:value-type="string">
            <text:p>QL/88</text:p>
          </table:table-cell>
          <table:table-cell office:value-type="string">
            <text:p>TAL</text:p>
          </table:table-cell>
          <table:table-cell office:value-type="string">
            <text:p>foot</text:p>
          </table:table-cell>
          <table:table-cell office:value-type="string">
            <text:p>Ety/TAL</text:p>
          </table:table-cell>
          <table:table-cell office:value-type="string">
            <text:p>TAL</text:p>
          </table:table-cell>
          <table:table-cell office:value-type="string">
            <text:p>foot</text:p>
          </table:table-cell>
          <table:table-cell office:value-type="string">
            <text:p>PE21/7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table:number-columns-repeated="5"/>
          <table:table-cell office:value-type="string">
            <text:p>TAL</text:p>
          </table:table-cell>
          <table:table-cell office:value-type="string">
            <text:p>appraise, esteem</text:p>
          </table:table-cell>
          <table:table-cell office:value-type="string">
            <text:p>PE22/110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61">
            <text:p>961</text:p>
          </table:table-cell>
          <table:table-cell table:number-columns-repeated="2"/>
          <table:table-cell office:value-type="string">
            <text:p>TAW̯A</text:p>
          </table:table-cell>
          <table:table-cell office:value-type="string">
            <text:p>*base</text:p>
          </table:table-cell>
          <table:table-cell office:value-type="string">
            <text:p>QL/90</text:p>
          </table:table-cell>
          <table:table-cell office:value-type="string">
            <text:p>TALAM</text:p>
          </table:table-cell>
          <table:table-cell office:value-type="string">
            <text:p>floor, base, ground</text:p>
          </table:table-cell>
          <table:table-cell office:value-type="string">
            <text:p>Ety/TAL</text:p>
          </table:table-cell>
          <table:table-cell office:value-type="string">
            <text:p>TALAM</text:p>
          </table:table-cell>
          <table:table-cell office:value-type="string">
            <text:p>flat space</text:p>
          </table:table-cell>
          <table:table-cell office:value-type="string">
            <text:p>PE17/52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Q. talta</text:p>
          </table:table-cell>
          <table:table-cell office:value-type="string">
            <text:p>tottering; sloping</text:p>
          </table:table-cell>
          <table:table-cell office:value-type="string">
            <text:p>TḶTḶ</text:p>
          </table:table-cell>
          <table:table-cell office:value-type="string">
            <text:p>*slope</text:p>
          </table:table-cell>
          <table:table-cell office:value-type="string">
            <text:p>QL/93</text:p>
          </table:table-cell>
          <table:table-cell office:value-type="string">
            <text:p>TALAT</text:p>
          </table:table-cell>
          <table:table-cell office:value-type="string">
            <text:p>slope, lean, tip</text:p>
          </table:table-cell>
          <table:table-cell office:value-type="string">
            <text:p>Ety/TALÁT</text:p>
          </table:table-cell>
          <table:table-cell office:value-type="string">
            <text:p>TALAT</text:p>
          </table:table-cell>
          <table:table-cell office:value-type="string">
            <text:p>slipping, sliding, falling down</text:p>
          </table:table-cell>
          <table:table-cell office:value-type="string">
            <text:p>Let/347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63">
            <text:p>963</text:p>
          </table:table-cell>
          <table:table-cell table:number-columns-repeated="2"/>
          <table:table-cell office:value-type="string">
            <text:p>TAMA</text:p>
          </table:table-cell>
          <table:table-cell office:value-type="string">
            <text:p>beat; smelt, forge</text:p>
          </table:table-cell>
          <table:table-cell office:value-type="string">
            <text:p>QL/88</text:p>
          </table:table-cell>
          <table:table-cell office:value-type="string">
            <text:p>TAM</text:p>
          </table:table-cell>
          <table:table-cell office:value-type="string">
            <text:p>knock</text:p>
          </table:table-cell>
          <table:table-cell office:value-type="string">
            <text:p>Ety/TAM</text:p>
          </table:table-cell>
          <table:table-cell office:value-type="string">
            <text:p>TAM</text:p>
          </table:table-cell>
          <table:table-cell office:value-type="string">
            <text:p>construct</text:p>
          </table:table-cell>
          <table:table-cell office:value-type="string">
            <text:p>PE17/107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64">
            <text:p>964</text:p>
          </table:table-cell>
          <table:table-cell table:number-columns-repeated="5"/>
          <table:table-cell office:value-type="string">
            <text:p>TAN</text:p>
          </table:table-cell>
          <table:table-cell office:value-type="string">
            <text:p>make, fashion</text:p>
          </table:table-cell>
          <table:table-cell office:value-type="string">
            <text:p>Ety/TAN</text:p>
          </table:table-cell>
          <table:table-cell office:value-type="string">
            <text:p>TAN</text:p>
          </table:table-cell>
          <table:table-cell office:value-type="string">
            <text:p>make with tools</text:p>
          </table:table-cell>
          <table:table-cell office:value-type="string">
            <text:p>PE17/96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65">
            <text:p>965</text:p>
          </table:table-cell>
          <table:table-cell table:number-columns-repeated="8"/>
          <table:table-cell office:value-type="string">
            <text:p>TANA</text:p>
          </table:table-cell>
          <table:table-cell office:value-type="string">
            <text:p>show, indicate</text:p>
          </table:table-cell>
          <table:table-cell office:value-type="string">
            <text:p>MR/38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66">
            <text:p>966</text:p>
          </table:table-cell>
          <table:table-cell table:number-columns-repeated="2"/>
          <table:table-cell office:value-type="string">
            <text:p>TAN</text:p>
          </table:table-cell>
          <table:table-cell office:value-type="string">
            <text:p>*fire, kindle</text:p>
          </table:table-cell>
          <table:table-cell office:value-type="string">
            <text:p>GL/6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67">
            <text:p>967</text:p>
          </table:table-cell>
          <table:table-cell table:number-columns-repeated="2"/>
          <table:table-cell office:value-type="string">
            <text:p>TAŊA</text:p>
          </table:table-cell>
          <table:table-cell office:value-type="string">
            <text:p>touch, be next to</text:p>
          </table:table-cell>
          <table:table-cell office:value-type="string">
            <text:p>QL/8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68">
            <text:p>968</text:p>
          </table:table-cell>
          <table:table-cell table:number-columns-repeated="5"/>
          <table:table-cell office:value-type="string">
            <text:p>TAP</text:p>
          </table:table-cell>
          <table:table-cell office:value-type="string">
            <text:p>stop</text:p>
          </table:table-cell>
          <table:table-cell office:value-type="string">
            <text:p>Ety/TAP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69">
            <text:p>969</text:p>
          </table:table-cell>
          <table:table-cell table:number-columns-repeated="2"/>
          <table:table-cell office:value-type="string">
            <text:p>TAPA</text:p>
          </table:table-cell>
          <table:table-cell office:value-type="string">
            <text:p>*taper, stretch out</text:p>
          </table:table-cell>
          <table:table-cell office:value-type="string">
            <text:p>QL/8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table:number-columns-repeated="2"/>
          <table:table-cell office:value-type="string">
            <text:p>TAQA</text:p>
          </table:table-cell>
          <table:table-cell office:value-type="string">
            <text:p>fashion</text:p>
          </table:table-cell>
          <table:table-cell office:value-type="string">
            <text:p>QL/8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1">
            <text:p>971</text:p>
          </table:table-cell>
          <table:table-cell table:number-columns-repeated="5"/>
          <table:table-cell office:value-type="string">
            <text:p>THAR</text:p>
          </table:table-cell>
          <table:table-cell office:value-type="string">
            <text:p>stand</text:p>
          </table:table-cell>
          <table:table-cell office:value-type="string">
            <text:p>PE22/126</text:p>
          </table:table-cell>
          <table:table-cell office:value-type="string">
            <text:p>TAR</text:p>
          </table:table-cell>
          <table:table-cell office:value-type="string">
            <text:p>stand</text:p>
          </table:table-cell>
          <table:table-cell office:value-type="string">
            <text:p>PE17/186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S. tarlang</text:p>
          </table:table-cell>
          <table:table-cell office:value-type="string">
            <text:p>stiff-neck</text:p>
          </table:table-cell>
          <table:table-cell table:number-columns-repeated="3"/>
          <table:table-cell office:value-type="string">
            <text:p>TARAG</text:p>
          </table:table-cell>
          <table:table-cell office:value-type="string">
            <text:p>*tough, stiff</text:p>
          </table:table-cell>
          <table:table-cell office:value-type="string">
            <text:p>Ety/TÁRAG</text:p>
          </table:table-cell>
          <table:table-cell office:value-type="string">
            <text:p>S. tarch</text:p>
          </table:table-cell>
          <table:table-cell office:value-type="string">
            <text:p>stiff, rough</text:p>
          </table:table-cell>
          <table:table-cell office:value-type="string">
            <text:p>RC/536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73">
            <text:p>973</text:p>
          </table:table-cell>
          <table:table-cell table:number-columns-repeated="2"/>
          <table:table-cell office:value-type="string">
            <text:p>TARA²</text:p>
          </table:table-cell>
          <table:table-cell office:value-type="string">
            <text:p>*horn</text:p>
          </table:table-cell>
          <table:table-cell office:value-type="string">
            <text:p>QL/89</text:p>
          </table:table-cell>
          <table:table-cell office:value-type="string">
            <text:p>TARAK</text:p>
          </table:table-cell>
          <table:table-cell office:value-type="string">
            <text:p>horn (of animals)</text:p>
          </table:table-cell>
          <table:table-cell office:value-type="string">
            <text:p>Ety/TARÁK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74">
            <text:p>974</text:p>
          </table:table-cell>
          <table:table-cell table:number-columns-repeated="5"/>
          <table:table-cell office:value-type="string">
            <text:p>TARAS</text:p>
          </table:table-cell>
          <table:table-cell office:value-type="string">
            <text:p>*trouble</text:p>
          </table:table-cell>
          <table:table-cell office:value-type="string">
            <text:p>Ety/TARA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table:number-columns-repeated="5"/>
          <table:table-cell office:value-type="string">
            <text:p>TAS</text:p>
          </table:table-cell>
          <table:table-cell office:value-type="string">
            <text:p>point out, indicate</text:p>
          </table:table-cell>
          <table:table-cell office:value-type="string">
            <text:p>VT47/11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6">
            <text:p>976</text:p>
          </table:table-cell>
          <table:table-cell table:number-columns-repeated="2"/>
          <table:table-cell office:value-type="string">
            <text:p>TASA</text:p>
          </table:table-cell>
          <table:table-cell office:value-type="string">
            <text:p>*fringe</text:p>
          </table:table-cell>
          <table:table-cell office:value-type="string">
            <text:p>QL/89</text:p>
          </table:table-cell>
          <table:table-cell office:value-type="string">
            <text:p>TAS</text:p>
          </table:table-cell>
          <table:table-cell office:value-type="string">
            <text:p>*fringe</text:p>
          </table:table-cell>
          <table:table-cell office:value-type="string">
            <text:p>PE22/50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77">
            <text:p>977</text:p>
          </table:table-cell>
          <table:table-cell table:number-columns-repeated="2"/>
          <table:table-cell office:value-type="string">
            <text:p>G. tathrin</text:p>
          </table:table-cell>
          <table:table-cell office:value-type="string">
            <text:p>willow</text:p>
          </table:table-cell>
          <table:table-cell office:value-type="string">
            <text:p>GL/69</text:p>
          </table:table-cell>
          <table:table-cell office:value-type="string">
            <text:p>TATHAR</text:p>
          </table:table-cell>
          <table:table-cell office:value-type="string">
            <text:p>*willow</text:p>
          </table:table-cell>
          <table:table-cell office:value-type="string">
            <text:p>Ety/TATHAR</text:p>
          </table:table-cell>
          <table:table-cell office:value-type="string">
            <text:p>TAÞAR</text:p>
          </table:table-cell>
          <table:table-cell office:value-type="string">
            <text:p>*willow</text:p>
          </table:table-cell>
          <table:table-cell office:value-type="string">
            <text:p>PE17/81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78">
            <text:p>978</text:p>
          </table:table-cell>
          <table:table-cell table:number-columns-repeated="2"/>
          <table:table-cell office:value-type="string">
            <text:p>TAÞA</text:p>
          </table:table-cell>
          <table:table-cell office:value-type="string">
            <text:p>count</text:p>
          </table:table-cell>
          <table:table-cell office:value-type="string">
            <text:p>QL/9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S. taur</text:p>
          </table:table-cell>
          <table:table-cell office:value-type="string">
            <text:p>forest</text:p>
          </table:table-cell>
          <table:table-cell office:value-type="string">
            <text:p>TAVA</text:p>
          </table:table-cell>
          <table:table-cell office:value-type="string">
            <text:p>beam</text:p>
          </table:table-cell>
          <table:table-cell office:value-type="string">
            <text:p>QL/90</text:p>
          </table:table-cell>
          <table:table-cell office:value-type="string">
            <text:p>TAWAR</text:p>
          </table:table-cell>
          <table:table-cell office:value-type="string">
            <text:p>wood, forest</text:p>
          </table:table-cell>
          <table:table-cell office:value-type="string">
            <text:p>Ety/TÁWAR</text:p>
          </table:table-cell>
          <table:table-cell office:value-type="string">
            <text:p>TAW</text:p>
          </table:table-cell>
          <table:table-cell office:value-type="string">
            <text:p>wood</text:p>
          </table:table-cell>
          <table:table-cell office:value-type="string">
            <text:p>PE17/11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Q. taile</text:p>
          </table:table-cell>
          <table:table-cell office:value-type="string">
            <text:p>lengthening</text:p>
          </table:table-cell>
          <table:table-cell table:number-columns-repeated="3"/>
          <table:table-cell office:value-type="string">
            <text:p>TAY</text:p>
          </table:table-cell>
          <table:table-cell office:value-type="string">
            <text:p>extend, make long(er)</text:p>
          </table:table-cell>
          <table:table-cell office:value-type="string">
            <text:p>Ety/TAY</text:p>
          </table:table-cell>
          <table:table-cell office:value-type="string">
            <text:p>TAY</text:p>
          </table:table-cell>
          <table:table-cell office:value-type="string">
            <text:p>stretch</text:p>
          </table:table-cell>
          <table:table-cell office:value-type="string">
            <text:p>PE17/138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table:number-columns-repeated="8"/>
          <table:table-cell office:value-type="string">
            <text:p>TAYA</text:p>
          </table:table-cell>
          <table:table-cell office:value-type="string">
            <text:p>mark, line, limit</text:p>
          </table:table-cell>
          <table:table-cell office:value-type="string">
            <text:p>WJ/30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table:number-columns-repeated="2"/>
          <table:table-cell office:value-type="string">
            <text:p>TEFE</text:p>
          </table:table-cell>
          <table:table-cell office:value-type="string">
            <text:p>*hate</text:p>
          </table:table-cell>
          <table:table-cell office:value-type="string">
            <text:p>QL/9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83">
            <text:p>983</text:p>
          </table:table-cell>
          <table:table-cell office:value-type="string">
            <text:p>Q. tie</text:p>
          </table:table-cell>
          <table:table-cell office:value-type="string">
            <text:p>road, path</text:p>
          </table:table-cell>
          <table:table-cell office:value-type="string">
            <text:p>TEHE</text:p>
          </table:table-cell>
          <table:table-cell office:value-type="string">
            <text:p>pull</text:p>
          </table:table-cell>
          <table:table-cell office:value-type="string">
            <text:p>QL/90</text:p>
          </table:table-cell>
          <table:table-cell table:style-name="ce3" office:value-type="string">
            <text:p>{TEƷ}/TEÑ</text:p>
          </table:table-cell>
          <table:table-cell office:value-type="string">
            <text:p>line, direction</text:p>
          </table:table-cell>
          <table:table-cell office:value-type="string">
            <text:p>Ety/TEƷ, TEÑ</text:p>
          </table:table-cell>
          <table:table-cell office:value-type="string">
            <text:p>TEG</text:p>
          </table:table-cell>
          <table:table-cell office:value-type="string">
            <text:p>line</text:p>
          </table:table-cell>
          <table:table-cell office:value-type="string">
            <text:p>PE19/97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84">
            <text:p>984</text:p>
          </table:table-cell>
          <table:table-cell table:number-columns-repeated="2"/>
          <table:table-cell office:value-type="string">
            <text:p>TEKE</text:p>
          </table:table-cell>
          <table:table-cell office:value-type="string">
            <text:p>make marks</text:p>
          </table:table-cell>
          <table:table-cell office:value-type="string">
            <text:p>QL/90</text:p>
          </table:table-cell>
          <table:table-cell office:value-type="string">
            <text:p>TEK</text:p>
          </table:table-cell>
          <table:table-cell office:value-type="string">
            <text:p>make a mark</text:p>
          </table:table-cell>
          <table:table-cell office:value-type="string">
            <text:p>Ety/TEK</text:p>
          </table:table-cell>
          <table:table-cell office:value-type="string">
            <text:p>TEK</text:p>
          </table:table-cell>
          <table:table-cell office:value-type="string">
            <text:p>write</text:p>
          </table:table-cell>
          <table:table-cell office:value-type="string">
            <text:p>PE22/149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table:number-columns-repeated="2"/>
          <table:table-cell office:value-type="string">
            <text:p>TEL+U</text:p>
          </table:table-cell>
          <table:table-cell office:value-type="string">
            <text:p>finish, end, complete</text:p>
          </table:table-cell>
          <table:table-cell office:value-type="string">
            <text:p>QL/91</text:p>
          </table:table-cell>
          <table:table-cell table:number-columns-repeated="3"/>
          <table:table-cell office:value-type="string">
            <text:p>TEL</text:p>
          </table:table-cell>
          <table:table-cell office:value-type="string">
            <text:p>close, end, complete</text:p>
          </table:table-cell>
          <table:table-cell office:value-type="string">
            <text:p>PE22/135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86">
            <text:p>986</text:p>
          </table:table-cell>
          <table:table-cell office:value-type="string">
            <text:p>Q. telco/pelko</text:p>
          </table:table-cell>
          <table:table-cell office:value-type="string">
            <text:p>leg; stem</text:p>
          </table:table-cell>
          <table:table-cell table:style-name="ce3" office:value-type="string">
            <text:p>PELE²</text:p>
          </table:table-cell>
          <table:table-cell office:value-type="string">
            <text:p>*revolve</text:p>
          </table:table-cell>
          <table:table-cell office:value-type="string">
            <text:p>QL/73</text:p>
          </table:table-cell>
          <table:table-cell office:value-type="string">
            <text:p>TELEK</text:p>
          </table:table-cell>
          <table:table-cell office:value-type="string">
            <text:p>stalk, stem, leg</text:p>
          </table:table-cell>
          <table:table-cell office:value-type="string">
            <text:p>Ety/TÉLEK</text:p>
          </table:table-cell>
          <table:table-cell office:value-type="string">
            <text:p>Q. telco</text:p>
          </table:table-cell>
          <table:table-cell office:value-type="string">
            <text:p>stem; leg</text:p>
          </table:table-cell>
          <table:table-cell office:value-type="string">
            <text:p>LotR/1118; PE17/122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Q. Teler</text:p>
          </table:table-cell>
          <table:table-cell/>
          <table:table-cell office:value-type="string">
            <text:p>TELED</text:p>
          </table:table-cell>
          <table:table-cell office:value-type="string">
            <text:p>?</text:p>
          </table:table-cell>
          <table:table-cell office:value-type="string">
            <text:p>PE13/154</text:p>
          </table:table-cell>
          <table:table-cell office:value-type="string">
            <text:p>TELES</text:p>
          </table:table-cell>
          <table:table-cell office:value-type="string">
            <text:p>hindmost, tarrier</text:p>
          </table:table-cell>
          <table:table-cell office:value-type="string">
            <text:p>Ety/TELES</text:p>
          </table:table-cell>
          <table:table-cell office:value-type="string">
            <text:p>TELES</text:p>
          </table:table-cell>
          <table:table-cell office:value-type="string">
            <text:p>come at rear</text:p>
          </table:table-cell>
          <table:table-cell office:value-type="string">
            <text:p>PE22/13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88">
            <text:p>988</text:p>
          </table:table-cell>
          <table:table-cell office:value-type="string">
            <text:p>Q. telumë</text:p>
          </table:table-cell>
          <table:table-cell office:value-type="string">
            <text:p>dome (of heaven)</text:p>
          </table:table-cell>
          <table:table-cell office:value-type="string">
            <text:p>TELE</text:p>
          </table:table-cell>
          <table:table-cell office:value-type="string">
            <text:p>cover in</text:p>
          </table:table-cell>
          <table:table-cell office:value-type="string">
            <text:p>QL/90</text:p>
          </table:table-cell>
          <table:table-cell office:value-type="string">
            <text:p>TEL(U)</text:p>
          </table:table-cell>
          <table:table-cell office:value-type="string">
            <text:p>*roof</text:p>
          </table:table-cell>
          <table:table-cell office:value-type="string">
            <text:p>Ety/TEL</text:p>
          </table:table-cell>
          <table:table-cell office:value-type="string">
            <text:p>TELU</text:p>
          </table:table-cell>
          <table:table-cell office:value-type="string">
            <text:p>roof in</text:p>
          </table:table-cell>
          <table:table-cell office:value-type="string">
            <text:p>WJ/41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table:number-columns-repeated="2"/>
          <table:table-cell office:value-type="string">
            <text:p>TEME</text:p>
          </table:table-cell>
          <table:table-cell office:value-type="string">
            <text:p>tie</text:p>
          </table:table-cell>
          <table:table-cell office:value-type="string">
            <text:p>QL/9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table:number-columns-repeated="8"/>
          <table:table-cell office:value-type="string">
            <text:p>TEN</text:p>
          </table:table-cell>
          <table:table-cell office:value-type="string">
            <text:p>point, toward</text:p>
          </table:table-cell>
          <table:table-cell office:value-type="string">
            <text:p>VT49/2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table:number-columns-repeated="2"/>
          <table:table-cell office:value-type="string">
            <text:p>TENE</text:p>
          </table:table-cell>
          <table:table-cell office:value-type="string">
            <text:p>touch, feel</text:p>
          </table:table-cell>
          <table:table-cell office:value-type="string">
            <text:p>QL/9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table:number-columns-repeated="2"/>
          <table:table-cell office:value-type="string">
            <text:p>TEŊE</text:p>
          </table:table-cell>
          <table:table-cell office:value-type="string">
            <text:p>know, understand</text:p>
          </table:table-cell>
          <table:table-cell office:value-type="string">
            <text:p>QL/91</text:p>
          </table:table-cell>
          <table:table-cell table:number-columns-repeated="3"/>
          <table:table-cell office:value-type="string">
            <text:p>TEÑ</text:p>
          </table:table-cell>
          <table:table-cell office:value-type="string">
            <text:p>indicate, signify</text:p>
          </table:table-cell>
          <table:table-cell office:value-type="string">
            <text:p>WJ/394</text:p>
          </table:table-cell>
          <table:table-cell office:value-type="string">
            <text:p>Skip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93">
            <text:p>993</text:p>
          </table:table-cell>
          <table:table-cell office:value-type="string">
            <text:p>Q. ter</text:p>
          </table:table-cell>
          <table:table-cell office:value-type="string">
            <text:p>through</text:p>
          </table:table-cell>
          <table:table-cell office:value-type="string">
            <text:p>TEŘE</text:p>
          </table:table-cell>
          <table:table-cell office:value-type="string">
            <text:p>boring</text:p>
          </table:table-cell>
          <table:table-cell office:value-type="string">
            <text:p>QL/91</text:p>
          </table:table-cell>
          <table:table-cell office:value-type="string">
            <text:p>TER(ES)</text:p>
          </table:table-cell>
          <table:table-cell office:value-type="string">
            <text:p>pierce</text:p>
          </table:table-cell>
          <table:table-cell office:value-type="string">
            <text:p>Ety/TER</text:p>
          </table:table-cell>
          <table:table-cell office:value-type="string">
            <text:p>TER</text:p>
          </table:table-cell>
          <table:table-cell office:value-type="string">
            <text:p>pierce</text:p>
          </table:table-cell>
          <table:table-cell office:value-type="string">
            <text:p>PE17/3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table:number-columns-repeated="2"/>
          <table:table-cell office:value-type="string">
            <text:p>TETE</text:p>
          </table:table-cell>
          <table:table-cell office:value-type="string">
            <text:p>bud, blossom</text:p>
          </table:table-cell>
          <table:table-cell office:value-type="string">
            <text:p>QL/9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table:number-columns-repeated="5"/>
          <table:table-cell office:value-type="string">
            <text:p>THA</text:p>
          </table:table-cell>
          <table:table-cell office:value-type="string">
            <text:p>forward</text:p>
          </table:table-cell>
          <table:table-cell office:value-type="string">
            <text:p>PE22/97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table:number-columns-repeated="8"/>
          <table:table-cell office:value-type="string">
            <text:p>ÞĂ/AÞA</text:p>
          </table:table-cell>
          <table:table-cell office:value-type="string">
            <text:p>be helpful; agree</text:p>
          </table:table-cell>
          <table:table-cell office:value-type="string">
            <text:p>PE22/16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97">
            <text:p>997</text:p>
          </table:table-cell>
          <table:table-cell office:value-type="string">
            <text:p>Q. sanga</text:p>
          </table:table-cell>
          <table:table-cell office:value-type="string">
            <text:p>throng, press</text:p>
          </table:table-cell>
          <table:table-cell office:value-type="string">
            <text:p>SAŊA [ÞAŊA]</text:p>
          </table:table-cell>
          <table:table-cell office:value-type="string">
            <text:p>pack tight, press</text:p>
          </table:table-cell>
          <table:table-cell office:value-type="string">
            <text:p>QL/81</text:p>
          </table:table-cell>
          <table:table-cell office:value-type="string">
            <text:p>STAG</text:p>
          </table:table-cell>
          <table:table-cell office:value-type="string">
            <text:p>press, compress</text:p>
          </table:table-cell>
          <table:table-cell office:value-type="string">
            <text:p>Ety/STAG</text:p>
          </table:table-cell>
          <table:table-cell office:value-type="string">
            <text:p>THAG</text:p>
          </table:table-cell>
          <table:table-cell office:value-type="string">
            <text:p>oppress, crush, press</text:p>
          </table:table-cell>
          <table:table-cell office:value-type="string">
            <text:p>VT43/22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S. Gilthoniel</text:p>
          </table:table-cell>
          <table:table-cell office:value-type="string">
            <text:p>Star-kindler</text:p>
          </table:table-cell>
          <table:table-cell office:value-type="string">
            <text:p>TAN</text:p>
          </table:table-cell>
          <table:table-cell office:value-type="string">
            <text:p>*fire, kindle</text:p>
          </table:table-cell>
          <table:table-cell office:value-type="string">
            <text:p>GL/69</text:p>
          </table:table-cell>
          <table:table-cell table:number-columns-repeated="3"/>
          <table:table-cell office:value-type="string">
            <text:p>{TAN}/THAN</text:p>
          </table:table-cell>
          <table:table-cell office:value-type="string">
            <text:p>kindle; fire</text:p>
          </table:table-cell>
          <table:table-cell office:value-type="string">
            <text:p>PE17/23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TARA¹</text:p>
          </table:table-cell>
          <table:table-cell office:value-type="string">
            <text:p>*across</text:p>
          </table:table-cell>
          <table:table-cell office:value-type="string">
            <text:p>QL/89</text:p>
          </table:table-cell>
          <table:table-cell office:value-type="string">
            <text:p>THAR</text:p>
          </table:table-cell>
          <table:table-cell office:value-type="string">
            <text:p>across, beyond</text:p>
          </table:table-cell>
          <table:table-cell office:value-type="string">
            <text:p>Ety/THAR</text:p>
          </table:table-cell>
          <table:table-cell office:value-type="string">
            <text:p>ÞAR</text:p>
          </table:table-cell>
          <table:table-cell office:value-type="string">
            <text:p>*across</text:p>
          </table:table-cell>
          <table:table-cell office:value-type="string">
            <text:p>PE17/14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table:number-columns-repeated="8"/>
          <table:table-cell office:value-type="string">
            <text:p>THAR</text:p>
          </table:table-cell>
          <table:table-cell office:value-type="string">
            <text:p>vigour</text:p>
          </table:table-cell>
          <table:table-cell office:value-type="string">
            <text:p>PE17/18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 table:number-columns-repeated="8"/>
          <table:table-cell office:value-type="string">
            <text:p>THAW</text:p>
          </table:table-cell>
          <table:table-cell office:value-type="string">
            <text:p>cruel</text:p>
          </table:table-cell>
          <table:table-cell office:value-type="string">
            <text:p>PE17/184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02">
            <text:p>1002</text:p>
          </table:table-cell>
          <table:table-cell table:number-columns-repeated="5"/>
          <table:table-cell office:value-type="string">
            <text:p>THĒ</text:p>
          </table:table-cell>
          <table:table-cell office:value-type="string">
            <text:p>look (see or seem)</text:p>
          </table:table-cell>
          <table:table-cell office:value-type="string">
            <text:p>Ety/THĒ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03">
            <text:p>1003</text:p>
          </table:table-cell>
          <table:table-cell table:number-columns-repeated="5"/>
          <table:table-cell office:value-type="string">
            <text:p>THEL(ES)</text:p>
          </table:table-cell>
          <table:table-cell office:value-type="string">
            <text:p>sister</text:p>
          </table:table-cell>
          <table:table-cell office:value-type="string">
            <text:p>Ety/THEL</text:p>
          </table:table-cell>
          <table:table-cell office:value-type="string">
            <text:p>Q. meletheldi</text:p>
          </table:table-cell>
          <table:table-cell office:value-type="string">
            <text:p>love-sisters</text:p>
          </table:table-cell>
          <table:table-cell office:value-type="string">
            <text:p>NM/2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4">
            <text:p>1004</text:p>
          </table:table-cell>
          <table:table-cell table:number-columns-repeated="2"/>
          <table:table-cell office:value-type="string">
            <text:p>SERE [ÞERE]</text:p>
          </table:table-cell>
          <table:table-cell office:value-type="string">
            <text:p>twine, tie, bind</text:p>
          </table:table-cell>
          <table:table-cell office:value-type="string">
            <text:p>QL/83</text:p>
          </table:table-cell>
          <table:table-cell table:number-columns-repeated="3"/>
          <table:table-cell office:value-type="string">
            <text:p>THER</text:p>
          </table:table-cell>
          <table:table-cell office:value-type="string">
            <text:p>sew</text:p>
          </table:table-cell>
          <table:table-cell office:value-type="string">
            <text:p>PE17/33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S. Ithil</text:p>
          </table:table-cell>
          <table:table-cell office:value-type="string">
            <text:p>Moon</text:p>
          </table:table-cell>
          <table:table-cell office:value-type="string">
            <text:p>G. Thilim</text:p>
          </table:table-cell>
          <table:table-cell office:value-type="string">
            <text:p>*Moon</text:p>
          </table:table-cell>
          <table:table-cell office:value-type="string">
            <text:p>PE14/13</text:p>
          </table:table-cell>
          <table:table-cell office:value-type="string">
            <text:p>THIL</text:p>
          </table:table-cell>
          <table:table-cell office:value-type="string">
            <text:p>*shine silver</text:p>
          </table:table-cell>
          <table:table-cell office:value-type="string">
            <text:p>Ety/THIL</text:p>
          </table:table-cell>
          <table:table-cell office:value-type="string">
            <text:p>THIL</text:p>
          </table:table-cell>
          <table:table-cell office:value-type="string">
            <text:p>white light</text:p>
          </table:table-cell>
          <table:table-cell office:value-type="string">
            <text:p>Let/425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S. thind</text:p>
          </table:table-cell>
          <table:table-cell office:value-type="string">
            <text:p>grey</text:p>
          </table:table-cell>
          <table:table-cell table:number-columns-repeated="3"/>
          <table:table-cell office:value-type="string">
            <text:p>THIN</text:p>
          </table:table-cell>
          <table:table-cell office:value-type="string">
            <text:p>*grey</text:p>
          </table:table-cell>
          <table:table-cell office:value-type="string">
            <text:p>Ety/THIN</text:p>
          </table:table-cell>
          <table:table-cell office:value-type="string">
            <text:p>THIN</text:p>
          </table:table-cell>
          <table:table-cell office:value-type="string">
            <text:p>*grey</text:p>
          </table:table-cell>
          <table:table-cell office:value-type="string">
            <text:p>WJ/38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7">
            <text:p>1007</text:p>
          </table:table-cell>
          <table:table-cell table:number-columns-repeated="8"/>
          <table:table-cell office:value-type="string">
            <text:p>ÞOL/STOL</text:p>
          </table:table-cell>
          <table:table-cell office:value-type="string">
            <text:p>stand up, top</text:p>
          </table:table-cell>
          <table:table-cell office:value-type="string">
            <text:p>PE17/186, 18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S. Dorthonion</text:p>
          </table:table-cell>
          <table:table-cell office:value-type="string">
            <text:p>Land of Pines</text:p>
          </table:table-cell>
          <table:table-cell table:number-columns-repeated="3"/>
          <table:table-cell office:value-type="string">
            <text:p>THŌN</text:p>
          </table:table-cell>
          <table:table-cell office:value-type="string">
            <text:p>*pine</text:p>
          </table:table-cell>
          <table:table-cell office:value-type="string">
            <text:p>Ety/THŌN</text:p>
          </table:table-cell>
          <table:table-cell office:value-type="string">
            <text:p>S. thôn</text:p>
          </table:table-cell>
          <table:table-cell office:value-type="string">
            <text:p>pine-tree</text:p>
          </table:table-cell>
          <table:table-cell office:value-type="string">
            <text:p>RC/384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S. thoron</text:p>
          </table:table-cell>
          <table:table-cell office:value-type="string">
            <text:p>eagle</text:p>
          </table:table-cell>
          <table:table-cell office:value-type="string">
            <text:p>ŠORO² [ÞORO]</text:p>
          </table:table-cell>
          <table:table-cell office:value-type="string">
            <text:p>eagle</text:p>
          </table:table-cell>
          <table:table-cell office:value-type="string">
            <text:p>QL/86</text:p>
          </table:table-cell>
          <table:table-cell office:value-type="string">
            <text:p>THOR(ON)</text:p>
          </table:table-cell>
          <table:table-cell office:value-type="string">
            <text:p>come swooping down</text:p>
          </table:table-cell>
          <table:table-cell office:value-type="string">
            <text:p>Ety/THOR</text:p>
          </table:table-cell>
          <table:table-cell office:value-type="string">
            <text:p>THORONO</text:p>
          </table:table-cell>
          <table:table-cell office:value-type="string">
            <text:p>eagle</text:p>
          </table:table-cell>
          <table:table-cell office:value-type="string">
            <text:p>Let/42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10">
            <text:p>1010</text:p>
          </table:table-cell>
          <table:table-cell table:number-columns-repeated="8"/>
          <table:table-cell office:value-type="string">
            <text:p>ÞOS</text:p>
          </table:table-cell>
          <table:table-cell office:value-type="string">
            <text:p>frighten, terrify</text:p>
          </table:table-cell>
          <table:table-cell office:value-type="string">
            <text:p>PE17/87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11">
            <text:p>1011</text:p>
          </table:table-cell>
          <table:table-cell table:number-columns-repeated="8"/>
          <table:table-cell office:value-type="string">
            <text:p>ÞOWO/ÞAWA</text:p>
          </table:table-cell>
          <table:table-cell office:value-type="string">
            <text:p>stink</text:p>
          </table:table-cell>
          <table:table-cell office:value-type="string">
            <text:p>PE17/6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12">
            <text:p>1012</text:p>
          </table:table-cell>
          <table:table-cell office:value-type="string">
            <text:p>Q. súle</text:p>
          </table:table-cell>
          <table:table-cell office:value-type="string">
            <text:p>breath; spirit</text:p>
          </table:table-cell>
          <table:table-cell table:number-columns-repeated="3"/>
          <table:table-cell office:value-type="string">
            <text:p>THŪ</text:p>
          </table:table-cell>
          <table:table-cell office:value-type="string">
            <text:p>puff, blow</text:p>
          </table:table-cell>
          <table:table-cell office:value-type="string">
            <text:p>Ety/THŪ</text:p>
          </table:table-cell>
          <table:table-cell office:value-type="string">
            <text:p>THŪ</text:p>
          </table:table-cell>
          <table:table-cell office:value-type="string">
            <text:p>blow</text:p>
          </table:table-cell>
          <table:table-cell office:value-type="string">
            <text:p>NM/23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013">
            <text:p>1013</text:p>
          </table:table-cell>
          <table:table-cell office:value-type="string">
            <text:p>S. Garthúrian</text:p>
          </table:table-cell>
          <table:table-cell office:value-type="string">
            <text:p>Hidden Realm</text:p>
          </table:table-cell>
          <table:table-cell office:value-type="string">
            <text:p>FURU/HURU</text:p>
          </table:table-cell>
          <table:table-cell office:value-type="string">
            <text:p>*conceal</text:p>
          </table:table-cell>
          <table:table-cell office:value-type="string">
            <text:p>QL/39</text:p>
          </table:table-cell>
          <table:table-cell office:value-type="string">
            <text:p>THUR</text:p>
          </table:table-cell>
          <table:table-cell office:value-type="string">
            <text:p>fence, hedge in, secrete</text:p>
          </table:table-cell>
          <table:table-cell office:value-type="string">
            <text:p>Ety/THUR</text:p>
          </table:table-cell>
          <table:table-cell office:value-type="string">
            <text:p>S. Thurin</text:p>
          </table:table-cell>
          <table:table-cell office:value-type="string">
            <text:p>Secret</text:p>
          </table:table-cell>
          <table:table-cell office:value-type="string">
            <text:p>UT/157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14">
            <text:p>1014</text:p>
          </table:table-cell>
          <table:table-cell table:number-columns-repeated="5"/>
          <table:table-cell office:value-type="string">
            <text:p>THUS</text:p>
          </table:table-cell>
          <table:table-cell office:value-type="string">
            <text:p>*smell, stench</text:p>
          </table:table-cell>
          <table:table-cell office:value-type="string">
            <text:p>Ety/THUS</text:p>
          </table:table-cell>
          <table:table-cell office:value-type="string">
            <text:p>THUS</text:p>
          </table:table-cell>
          <table:table-cell office:value-type="string">
            <text:p>evil mist; blow</text:p>
          </table:table-cell>
          <table:table-cell office:value-type="string">
            <text:p>PE17/183; NM/237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TIFI</text:p>
          </table:table-cell>
          <table:table-cell office:value-type="string">
            <text:p>*flute, hoot</text:p>
          </table:table-cell>
          <table:table-cell office:value-type="string">
            <text:p>QL/9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16">
            <text:p>1016</text:p>
          </table:table-cell>
          <table:table-cell table:number-columns-repeated="5"/>
          <table:table-cell office:value-type="string">
            <text:p>TIK</text:p>
          </table:table-cell>
          <table:table-cell office:value-type="string">
            <text:p>*dot</text:p>
          </table:table-cell>
          <table:table-cell office:value-type="string">
            <text:p>Ety/TI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TILI¹</text:p>
          </table:table-cell>
          <table:table-cell office:value-type="string">
            <text:p>*shine blue</text:p>
          </table:table-cell>
          <table:table-cell office:value-type="string">
            <text:p>QL/9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18">
            <text:p>1018</text:p>
          </table:table-cell>
          <table:table-cell office:value-type="string">
            <text:p>Q. tilde</text:p>
          </table:table-cell>
          <table:table-cell office:value-type="string">
            <text:p>point</text:p>
          </table:table-cell>
          <table:table-cell office:value-type="string">
            <text:p>TILI²/T͡YILI</text:p>
          </table:table-cell>
          <table:table-cell office:value-type="string">
            <text:p>*tip, hair</text:p>
          </table:table-cell>
          <table:table-cell office:value-type="string">
            <text:p>QL/92</text:p>
          </table:table-cell>
          <table:table-cell office:value-type="string">
            <text:p>TIL</text:p>
          </table:table-cell>
          <table:table-cell office:value-type="string">
            <text:p>point, horn</text:p>
          </table:table-cell>
          <table:table-cell office:value-type="string">
            <text:p>Ety/TIL</text:p>
          </table:table-cell>
          <table:table-cell office:value-type="string">
            <text:p>TIL</text:p>
          </table:table-cell>
          <table:table-cell office:value-type="string">
            <text:p>point</text:p>
          </table:table-cell>
          <table:table-cell office:value-type="string">
            <text:p>VT47/26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Q. tinwe</text:p>
          </table:table-cell>
          <table:table-cell office:value-type="string">
            <text:p>star</text:p>
          </table:table-cell>
          <table:table-cell office:value-type="string">
            <text:p>TINI</text:p>
          </table:table-cell>
          <table:table-cell office:value-type="string">
            <text:p>twinkle</text:p>
          </table:table-cell>
          <table:table-cell office:value-type="string">
            <text:p>QL/92</text:p>
          </table:table-cell>
          <table:table-cell office:value-type="string">
            <text:p>TIN</text:p>
          </table:table-cell>
          <table:table-cell office:value-type="string">
            <text:p>sparkle, emit beams</text:p>
          </table:table-cell>
          <table:table-cell office:value-type="string">
            <text:p>Ety/TIN</text:p>
          </table:table-cell>
          <table:table-cell office:value-type="string">
            <text:p>TIN</text:p>
          </table:table-cell>
          <table:table-cell office:value-type="string">
            <text:p>sparkle, spark</text:p>
          </table:table-cell>
          <table:table-cell office:value-type="string">
            <text:p>PE17/66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20">
            <text:p>1020</text:p>
          </table:table-cell>
          <table:table-cell table:number-columns-repeated="5"/>
          <table:table-cell office:value-type="string">
            <text:p>TING/TANG</text:p>
          </table:table-cell>
          <table:table-cell office:value-type="string">
            <text:p>onomatopoeic</text:p>
          </table:table-cell>
          <table:table-cell office:value-type="string">
            <text:p>Ety/TIN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21">
            <text:p>1021</text:p>
          </table:table-cell>
          <table:table-cell office:value-type="string">
            <text:p>Q. tinco</text:p>
          </table:table-cell>
          <table:table-cell office:value-type="string">
            <text:p>metal</text:p>
          </table:table-cell>
          <table:table-cell table:number-columns-repeated="3"/>
          <table:table-cell office:value-type="string">
            <text:p>TINKŌ</text:p>
          </table:table-cell>
          <table:table-cell office:value-type="string">
            <text:p>metal</text:p>
          </table:table-cell>
          <table:table-cell office:value-type="string">
            <text:p>Ety/TINKŌ</text:p>
          </table:table-cell>
          <table:table-cell office:value-type="string">
            <text:p>Q. tinco</text:p>
          </table:table-cell>
          <table:table-cell office:value-type="string">
            <text:p>metal</text:p>
          </table:table-cell>
          <table:table-cell office:value-type="string">
            <text:p>LotR/112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table:number-columns-repeated="2"/>
          <table:table-cell office:value-type="string">
            <text:p>TIPI</text:p>
          </table:table-cell>
          <table:table-cell office:value-type="string">
            <text:p>*spray</text:p>
          </table:table-cell>
          <table:table-cell office:value-type="string">
            <text:p>QL/9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3">
            <text:p>1023</text:p>
          </table:table-cell>
          <table:table-cell table:number-columns-repeated="2"/>
          <table:table-cell office:value-type="string">
            <text:p>TIQI</text:p>
          </table:table-cell>
          <table:table-cell office:value-type="string">
            <text:p>*melt, thaw</text:p>
          </table:table-cell>
          <table:table-cell office:value-type="string">
            <text:p>QL/9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table:number-columns-repeated="2"/>
          <table:table-cell office:value-type="string">
            <text:p>TIRI</text:p>
          </table:table-cell>
          <table:table-cell office:value-type="string">
            <text:p>watch; guard; observe</text:p>
          </table:table-cell>
          <table:table-cell office:value-type="string">
            <text:p>QL/93</text:p>
          </table:table-cell>
          <table:table-cell office:value-type="string">
            <text:p>TIR</text:p>
          </table:table-cell>
          <table:table-cell office:value-type="string">
            <text:p>watch, guard</text:p>
          </table:table-cell>
          <table:table-cell office:value-type="string">
            <text:p>Ety/TIR</text:p>
          </table:table-cell>
          <table:table-cell office:value-type="string">
            <text:p>TIR</text:p>
          </table:table-cell>
          <table:table-cell office:value-type="string">
            <text:p>watch, observe</text:p>
          </table:table-cell>
          <table:table-cell office:value-type="string">
            <text:p>PE17/18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25">
            <text:p>1025</text:p>
          </table:table-cell>
          <table:table-cell table:number-columns-repeated="2"/>
          <table:table-cell office:value-type="string">
            <text:p>TIŘI</text:p>
          </table:table-cell>
          <table:table-cell office:value-type="string">
            <text:p>stick up</text:p>
          </table:table-cell>
          <table:table-cell office:value-type="string">
            <text:p>QL/9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26">
            <text:p>1026</text:p>
          </table:table-cell>
          <table:table-cell table:number-columns-repeated="5"/>
          <table:table-cell office:value-type="string">
            <text:p>TIT</text:p>
          </table:table-cell>
          <table:table-cell office:value-type="string">
            <text:p>*little, tiny</text:p>
          </table:table-cell>
          <table:table-cell office:value-type="string">
            <text:p>Ety/TIT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27">
            <text:p>1027</text:p>
          </table:table-cell>
          <table:table-cell table:number-columns-repeated="2"/>
          <table:table-cell office:value-type="string">
            <text:p>TIW̯I</text:p>
          </table:table-cell>
          <table:table-cell office:value-type="string">
            <text:p>thick</text:p>
          </table:table-cell>
          <table:table-cell office:value-type="string">
            <text:p>QL/93</text:p>
          </table:table-cell>
          <table:table-cell office:value-type="string">
            <text:p>TIW</text:p>
          </table:table-cell>
          <table:table-cell office:value-type="string">
            <text:p>fat, thick</text:p>
          </table:table-cell>
          <table:table-cell office:value-type="string">
            <text:p>Ety/TIW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28">
            <text:p>1028</text:p>
          </table:table-cell>
          <table:table-cell table:number-columns-repeated="2"/>
          <table:table-cell office:value-type="string">
            <text:p>TḶDḶ</text:p>
          </table:table-cell>
          <table:table-cell office:value-type="string">
            <text:p>*cover</text:p>
          </table:table-cell>
          <table:table-cell office:value-type="string">
            <text:p>QL/9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TḶPḶ</text:p>
          </table:table-cell>
          <table:table-cell office:value-type="string">
            <text:p>*support, prop</text:p>
          </table:table-cell>
          <table:table-cell office:value-type="string">
            <text:p>QL/9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0">
            <text:p>1030</text:p>
          </table:table-cell>
          <table:table-cell table:number-columns-repeated="2"/>
          <table:table-cell office:value-type="string">
            <text:p>TṂPṂ</text:p>
          </table:table-cell>
          <table:table-cell office:value-type="string">
            <text:p>build</text:p>
          </table:table-cell>
          <table:table-cell office:value-type="string">
            <text:p>QL/9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1">
            <text:p>1031</text:p>
          </table:table-cell>
          <table:table-cell table:number-columns-repeated="2"/>
          <table:table-cell office:value-type="string">
            <text:p>TṆQṆ</text:p>
          </table:table-cell>
          <table:table-cell office:value-type="string">
            <text:p>*hear</text:p>
          </table:table-cell>
          <table:table-cell office:value-type="string">
            <text:p>QL/9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2">
            <text:p>1032</text:p>
          </table:table-cell>
          <table:table-cell table:number-columns-repeated="2"/>
          <table:table-cell office:value-type="string">
            <text:p>TṆTṆ</text:p>
          </table:table-cell>
          <table:table-cell office:value-type="string">
            <text:p>*bounce</text:p>
          </table:table-cell>
          <table:table-cell office:value-type="string">
            <text:p>QL/93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3">
            <text:p>1033</text:p>
          </table:table-cell>
          <table:table-cell table:number-columns-repeated="2"/>
          <table:table-cell office:value-type="string">
            <text:p>TOKO</text:p>
          </table:table-cell>
          <table:table-cell office:value-type="string">
            <text:p>handle; appraise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4">
            <text:p>1034</text:p>
          </table:table-cell>
          <table:table-cell table:number-columns-repeated="5"/>
          <table:table-cell office:value-type="string">
            <text:p>TON</text:p>
          </table:table-cell>
          <table:table-cell office:value-type="string">
            <text:p>tap, knock</text:p>
          </table:table-cell>
          <table:table-cell office:value-type="string">
            <text:p>PE22/103</text:p>
          </table:table-cell>
          <table:table-cell office:value-type="string">
            <text:p>TOK/NOK</text:p>
          </table:table-cell>
          <table:table-cell office:value-type="string">
            <text:p>non-resonant sounds</text:p>
          </table:table-cell>
          <table:table-cell office:value-type="string">
            <text:p>PE17/138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035">
            <text:p>1035</text:p>
          </table:table-cell>
          <table:table-cell office:value-type="string">
            <text:p>Q. tol(le)</text:p>
          </table:table-cell>
          <table:table-cell office:value-type="string">
            <text:p>island</text:p>
          </table:table-cell>
          <table:table-cell office:value-type="string">
            <text:p>TOLO</text:p>
          </table:table-cell>
          <table:table-cell office:value-type="string">
            <text:p>*stick up</text:p>
          </table:table-cell>
          <table:table-cell office:value-type="string">
            <text:p>QL/94</text:p>
          </table:table-cell>
          <table:table-cell office:value-type="string">
            <text:p>TOL²</text:p>
          </table:table-cell>
          <table:table-cell office:value-type="string">
            <text:p>*stand up</text:p>
          </table:table-cell>
          <table:table-cell office:value-type="string">
            <text:p>Ety/TOL²</text:p>
          </table:table-cell>
          <table:table-cell office:value-type="string">
            <text:p>TOL</text:p>
          </table:table-cell>
          <table:table-cell office:value-type="string">
            <text:p>stick up or out</text:p>
          </table:table-cell>
          <table:table-cell office:value-type="string">
            <text:p>VT47/28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36">
            <text:p>1036</text:p>
          </table:table-cell>
          <table:table-cell table:number-columns-repeated="8"/>
          <table:table-cell office:value-type="string">
            <text:p>TOLOB</text:p>
          </table:table-cell>
          <table:table-cell office:value-type="string">
            <text:p>*protuberance</text:p>
          </table:table-cell>
          <table:table-cell office:value-type="string">
            <text:p>VT47/1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37">
            <text:p>1037</text:p>
          </table:table-cell>
          <table:table-cell table:number-columns-repeated="2"/>
          <table:table-cell office:value-type="string">
            <text:p>Q. tolto</text:p>
          </table:table-cell>
          <table:table-cell office:value-type="string">
            <text:p>eight</text:p>
          </table:table-cell>
          <table:table-cell office:value-type="string">
            <text:p>PE14/49, 82</text:p>
          </table:table-cell>
          <table:table-cell office:value-type="string">
            <text:p>TOL¹+OTH/OT</text:p>
          </table:table-cell>
          <table:table-cell office:value-type="string">
            <text:p>eight</text:p>
          </table:table-cell>
          <table:table-cell office:value-type="string">
            <text:p>Ety/TOL¹-OTH/OT</text:p>
          </table:table-cell>
          <table:table-cell office:value-type="string">
            <text:p>{TOLOT}/TOLOD</text:p>
          </table:table-cell>
          <table:table-cell office:value-type="string">
            <text:p>eight</text:p>
          </table:table-cell>
          <table:table-cell office:value-type="string">
            <text:p>VT47/11, 3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OLI</text:p>
          </table:table-cell>
          <table:table-cell office:value-type="string">
            <text:p>*doll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9">
            <text:p>1039</text:p>
          </table:table-cell>
          <table:table-cell table:number-columns-repeated="2"/>
          <table:table-cell office:value-type="string">
            <text:p>TOL+U</text:p>
          </table:table-cell>
          <table:table-cell office:value-type="string">
            <text:p>*roll (up)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0">
            <text:p>1040</text:p>
          </table:table-cell>
          <table:table-cell table:number-columns-repeated="2"/>
          <table:table-cell office:value-type="string">
            <text:p>TOMPO</text:p>
          </table:table-cell>
          <table:table-cell office:value-type="string">
            <text:p>*bang, drum</text:p>
          </table:table-cell>
          <table:table-cell office:value-type="string">
            <text:p>QL/94</text:p>
          </table:table-cell>
          <table:table-cell table:number-columns-repeated="3"/>
          <table:table-cell office:value-type="string">
            <text:p>TOM</text:p>
          </table:table-cell>
          <table:table-cell office:value-type="string">
            <text:p>of resonant sounds</text:p>
          </table:table-cell>
          <table:table-cell office:value-type="string">
            <text:p>PE17/138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41">
            <text:p>1041</text:p>
          </table:table-cell>
          <table:table-cell table:number-columns-repeated="2"/>
          <table:table-cell office:value-type="string">
            <text:p>TOŊO</text:p>
          </table:table-cell>
          <table:table-cell office:value-type="string">
            <text:p>to hammer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2">
            <text:p>1042</text:p>
          </table:table-cell>
          <table:table-cell table:number-columns-repeated="2"/>
          <table:table-cell office:value-type="string">
            <text:p>TOQO</text:p>
          </table:table-cell>
          <table:table-cell office:value-type="string">
            <text:p>bear fruit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43">
            <text:p>1043</text:p>
          </table:table-cell>
          <table:table-cell table:number-columns-repeated="5"/>
          <table:table-cell office:value-type="string">
            <text:p>TOR</text:p>
          </table:table-cell>
          <table:table-cell office:value-type="string">
            <text:p>brother</text:p>
          </table:table-cell>
          <table:table-cell office:value-type="string">
            <text:p>Ety/TOR</text:p>
          </table:table-cell>
          <table:table-cell office:value-type="string">
            <text:p>Q. melotorni</text:p>
          </table:table-cell>
          <table:table-cell office:value-type="string">
            <text:p>love-brother</text:p>
          </table:table-cell>
          <table:table-cell office:value-type="string">
            <text:p>NM/2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44">
            <text:p>1044</text:p>
          </table:table-cell>
          <table:table-cell table:number-columns-repeated="8"/>
          <table:table-cell office:value-type="string">
            <text:p>TOR</text:p>
          </table:table-cell>
          <table:table-cell office:value-type="string">
            <text:p>secrete, hide</text:p>
          </table:table-cell>
          <table:table-cell office:value-type="string">
            <text:p>PE17/188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5">
            <text:p>1045</text:p>
          </table:table-cell>
          <table:table-cell table:number-columns-repeated="2"/>
          <table:table-cell office:value-type="string">
            <text:p>TORO</text:p>
          </table:table-cell>
          <table:table-cell office:value-type="string">
            <text:p>*bake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46">
            <text:p>1046</text:p>
          </table:table-cell>
          <table:table-cell table:number-columns-repeated="2"/>
          <table:table-cell office:value-type="string">
            <text:p>OWO/TOU̯</text:p>
          </table:table-cell>
          <table:table-cell office:value-type="string">
            <text:p>*wool</text:p>
          </table:table-cell>
          <table:table-cell office:value-type="string">
            <text:p>QL/71; GL/71</text:p>
          </table:table-cell>
          <table:table-cell office:value-type="string">
            <text:p>TOW</text:p>
          </table:table-cell>
          <table:table-cell office:value-type="string">
            <text:p>*wool</text:p>
          </table:table-cell>
          <table:table-cell office:value-type="string">
            <text:p>Ety/TOW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47">
            <text:p>1047</text:p>
          </table:table-cell>
          <table:table-cell table:number-columns-repeated="2"/>
          <table:table-cell office:value-type="string">
            <text:p>TṚKṚ</text:p>
          </table:table-cell>
          <table:table-cell office:value-type="string">
            <text:p>*root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8">
            <text:p>1048</text:p>
          </table:table-cell>
          <table:table-cell table:number-columns-repeated="2"/>
          <table:table-cell office:value-type="string">
            <text:p>TṚQṚ</text:p>
          </table:table-cell>
          <table:table-cell office:value-type="string">
            <text:p>*preserve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9">
            <text:p>1049</text:p>
          </table:table-cell>
          <table:table-cell table:number-columns-repeated="2"/>
          <table:table-cell office:value-type="string">
            <text:p>TṚT͡YṚ</text:p>
          </table:table-cell>
          <table:table-cell office:value-type="string">
            <text:p>*part</text:p>
          </table:table-cell>
          <table:table-cell office:value-type="string">
            <text:p>QL/9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TUAKK</text:p>
          </table:table-cell>
          <table:table-cell office:value-type="string">
            <text:p>axe</text:p>
          </table:table-cell>
          <table:table-cell office:value-type="string">
            <text:p>QL/9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51">
            <text:p>1051</text:p>
          </table:table-cell>
          <table:table-cell office:value-type="string">
            <text:p>Q. tumbo</text:p>
          </table:table-cell>
          <table:table-cell office:value-type="string">
            <text:p>valley</text:p>
          </table:table-cell>
          <table:table-cell office:value-type="string">
            <text:p>TUM(B)U</text:p>
          </table:table-cell>
          <table:table-cell office:value-type="string">
            <text:p>*deep</text:p>
          </table:table-cell>
          <table:table-cell office:value-type="string">
            <text:p>QL/95</text:p>
          </table:table-cell>
          <table:table-cell office:value-type="string">
            <text:p>TUB</text:p>
          </table:table-cell>
          <table:table-cell office:value-type="string">
            <text:p>go down (below ground level)</text:p>
          </table:table-cell>
          <table:table-cell office:value-type="string">
            <text:p>Ety/TUB; PE22/127</text:p>
          </table:table-cell>
          <table:table-cell office:value-type="string">
            <text:p>TUMBU</text:p>
          </table:table-cell>
          <table:table-cell office:value-type="string">
            <text:p>deep vale</text:p>
          </table:table-cell>
          <table:table-cell office:value-type="string">
            <text:p>NM/35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52">
            <text:p>1052</text:p>
          </table:table-cell>
          <table:table-cell table:number-columns-repeated="5"/>
          <table:table-cell office:value-type="string">
            <text:p>TUG</text:p>
          </table:table-cell>
          <table:table-cell office:value-type="string">
            <text:p>*strength</text:p>
          </table:table-cell>
          <table:table-cell office:value-type="string">
            <text:p>Ety/TU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53">
            <text:p>1053</text:p>
          </table:table-cell>
          <table:table-cell table:number-columns-repeated="5"/>
          <table:table-cell office:value-type="string">
            <text:p>TUK</text:p>
          </table:table-cell>
          <table:table-cell office:value-type="string">
            <text:p>draw, bring</text:p>
          </table:table-cell>
          <table:table-cell office:value-type="string">
            <text:p>Ety/TU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54">
            <text:p>1054</text:p>
          </table:table-cell>
          <table:table-cell table:number-columns-repeated="2"/>
          <table:table-cell office:value-type="string">
            <text:p>TUKSA</text:p>
          </table:table-cell>
          <table:table-cell office:value-type="string">
            <text:p>*hundred</text:p>
          </table:table-cell>
          <table:table-cell office:value-type="string">
            <text:p>QL/9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55">
            <text:p>1055</text:p>
          </table:table-cell>
          <table:table-cell table:number-columns-repeated="2"/>
          <table:table-cell office:value-type="string">
            <text:p>TUKU</text:p>
          </table:table-cell>
          <table:table-cell office:value-type="string">
            <text:p>*search, find</text:p>
          </table:table-cell>
          <table:table-cell office:value-type="string">
            <text:p>QL/9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ULU</text:p>
          </table:table-cell>
          <table:table-cell office:value-type="string">
            <text:p>fetch, bring; come</text:p>
          </table:table-cell>
          <table:table-cell office:value-type="string">
            <text:p>QL/95</text:p>
          </table:table-cell>
          <table:table-cell office:value-type="string">
            <text:p>TUL</text:p>
          </table:table-cell>
          <table:table-cell office:value-type="string">
            <text:p>come, approach</text:p>
          </table:table-cell>
          <table:table-cell office:value-type="string">
            <text:p>Ety/TUL</text:p>
          </table:table-cell>
          <table:table-cell office:value-type="string">
            <text:p>TUL</text:p>
          </table:table-cell>
          <table:table-cell office:value-type="string">
            <text:p>come, approach</text:p>
          </table:table-cell>
          <table:table-cell office:value-type="string">
            <text:p>PE22/168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Q. Tulkas</text:p>
          </table:table-cell>
          <table:table-cell/>
          <table:table-cell office:value-type="string">
            <text:p>TULUK</text:p>
          </table:table-cell>
          <table:table-cell office:value-type="string">
            <text:p>*steady, firm</text:p>
          </table:table-cell>
          <table:table-cell office:value-type="string">
            <text:p>QL/95</text:p>
          </table:table-cell>
          <table:table-cell office:value-type="string">
            <text:p>TULUK</text:p>
          </table:table-cell>
          <table:table-cell office:value-type="string">
            <text:p>*support; steady</text:p>
          </table:table-cell>
          <table:table-cell office:value-type="string">
            <text:p>Ety/TULUK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058">
            <text:p>1058</text:p>
          </table:table-cell>
          <table:table-cell table:number-columns-repeated="2"/>
          <table:table-cell office:value-type="string">
            <text:p>TUMU¹</text:p>
          </table:table-cell>
          <table:table-cell office:value-type="string">
            <text:p>swell (with the idea of hollowness)</text:p>
          </table:table-cell>
          <table:table-cell office:value-type="string">
            <text:p>QL/95</text:p>
          </table:table-cell>
          <table:table-cell office:value-type="string">
            <text:p>TUMPU</text:p>
          </table:table-cell>
          <table:table-cell office:value-type="string">
            <text:p>hump</text:p>
          </table:table-cell>
          <table:table-cell office:value-type="string">
            <text:p>Ety/TUMPU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059">
            <text:p>1059</text:p>
          </table:table-cell>
          <table:table-cell table:number-columns-repeated="5"/>
          <table:table-cell office:value-type="string">
            <text:p>TUN</text:p>
          </table:table-cell>
          <table:table-cell office:value-type="string">
            <text:p>*tall, mound</text:p>
          </table:table-cell>
          <table:table-cell office:value-type="string">
            <text:p>Ety/TU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0">
            <text:p>1060</text:p>
          </table:table-cell>
          <table:table-cell table:number-columns-repeated="2"/>
          <table:table-cell office:value-type="string">
            <text:p>TUN+TƎ</text:p>
          </table:table-cell>
          <table:table-cell office:value-type="string">
            <text:p>*see, notice</text:p>
          </table:table-cell>
          <table:table-cell office:value-type="string">
            <text:p>QL/9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61">
            <text:p>1061</text:p>
          </table:table-cell>
          <table:table-cell table:number-columns-repeated="2"/>
          <table:table-cell office:value-type="string">
            <text:p>TUPU</text:p>
          </table:table-cell>
          <table:table-cell office:value-type="string">
            <text:p>*cover</text:p>
          </table:table-cell>
          <table:table-cell office:value-type="string">
            <text:p>QL/95</text:p>
          </table:table-cell>
          <table:table-cell office:value-type="string">
            <text:p>TOP/TUP</text:p>
          </table:table-cell>
          <table:table-cell office:value-type="string">
            <text:p>cover, roof</text:p>
          </table:table-cell>
          <table:table-cell office:value-type="string">
            <text:p>Ety/TOP, TUP</text:p>
          </table:table-cell>
          <table:table-cell office:value-type="string">
            <text:p>TUP</text:p>
          </table:table-cell>
          <table:table-cell office:value-type="string">
            <text:p>cover over</text:p>
          </table:table-cell>
          <table:table-cell office:value-type="string">
            <text:p>PE17/7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62">
            <text:p>1062</text:p>
          </table:table-cell>
          <table:table-cell table:number-columns-repeated="2"/>
          <table:table-cell office:value-type="string">
            <text:p>TURU</text:p>
          </table:table-cell>
          <table:table-cell office:value-type="string">
            <text:p>am strong</text:p>
          </table:table-cell>
          <table:table-cell office:value-type="string">
            <text:p>QL/95</text:p>
          </table:table-cell>
          <table:table-cell office:value-type="string">
            <text:p>TUR</text:p>
          </table:table-cell>
          <table:table-cell office:value-type="string">
            <text:p>power, mastery</text:p>
          </table:table-cell>
          <table:table-cell office:value-type="string">
            <text:p>Ety/TUR</text:p>
          </table:table-cell>
          <table:table-cell office:value-type="string">
            <text:p>TUR</text:p>
          </table:table-cell>
          <table:table-cell office:value-type="string">
            <text:p>power, mastery</text:p>
          </table:table-cell>
          <table:table-cell office:value-type="string">
            <text:p>PE22/151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63">
            <text:p>1063</text:p>
          </table:table-cell>
          <table:table-cell office:value-type="string">
            <text:p>Q. turca</text:p>
          </table:table-cell>
          <table:table-cell office:value-type="string">
            <text:p>strong</text:p>
          </table:table-cell>
          <table:table-cell office:value-type="string">
            <text:p>Q. turka</text:p>
          </table:table-cell>
          <table:table-cell office:value-type="string">
            <text:p>strong</text:p>
          </table:table-cell>
          <table:table-cell office:value-type="string">
            <text:p>PE16/137</text:p>
          </table:table-cell>
          <table:table-cell table:number-columns-repeated="3"/>
          <table:table-cell office:value-type="string">
            <text:p>TURUK</text:p>
          </table:table-cell>
          <table:table-cell office:value-type="string">
            <text:p>*strong</text:p>
          </table:table-cell>
          <table:table-cell office:value-type="string">
            <text:p>PE17/22</text:p>
          </table:table-cell>
          <table:table-cell office:value-type="string">
            <text:p>Skip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064">
            <text:p>1064</text:p>
          </table:table-cell>
          <table:table-cell table:number-columns-repeated="5"/>
          <table:table-cell office:value-type="string">
            <text:p>TURUM</text:p>
          </table:table-cell>
          <table:table-cell office:value-type="string">
            <text:p>*shield</text:p>
          </table:table-cell>
          <table:table-cell office:value-type="string">
            <text:p>Ety/TURÚM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TUŘU/TUSU</text:p>
          </table:table-cell>
          <table:table-cell office:value-type="string">
            <text:p>kindle</text:p>
          </table:table-cell>
          <table:table-cell office:value-type="string">
            <text:p>QL/9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66">
            <text:p>1066</text:p>
          </table:table-cell>
          <table:table-cell table:number-columns-repeated="5"/>
          <table:table-cell office:value-type="string">
            <text:p>TUS</text:p>
          </table:table-cell>
          <table:table-cell office:value-type="string">
            <text:p>*bush</text:p>
          </table:table-cell>
          <table:table-cell office:value-type="string">
            <text:p>Ety/TU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7">
            <text:p>1067</text:p>
          </table:table-cell>
          <table:table-cell table:number-columns-repeated="2"/>
          <table:table-cell office:value-type="string">
            <text:p>TUVU</text:p>
          </table:table-cell>
          <table:table-cell office:value-type="string">
            <text:p>*receive</text:p>
          </table:table-cell>
          <table:table-cell office:value-type="string">
            <text:p>QL/9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Q. tuile</text:p>
          </table:table-cell>
          <table:table-cell office:value-type="string">
            <text:p>spring</text:p>
          </table:table-cell>
          <table:table-cell office:value-type="string">
            <text:p>TUẎU</text:p>
          </table:table-cell>
          <table:table-cell office:value-type="string">
            <text:p>*spring, sprout</text:p>
          </table:table-cell>
          <table:table-cell office:value-type="string">
            <text:p>QL/96</text:p>
          </table:table-cell>
          <table:table-cell office:value-type="string">
            <text:p>TUY</text:p>
          </table:table-cell>
          <table:table-cell office:value-type="string">
            <text:p>sprout, spring</text:p>
          </table:table-cell>
          <table:table-cell office:value-type="string">
            <text:p>Ety/TUY</text:p>
          </table:table-cell>
          <table:table-cell office:value-type="string">
            <text:p>TUJU</text:p>
          </table:table-cell>
          <table:table-cell office:value-type="string">
            <text:p>sprout, bud</text:p>
          </table:table-cell>
          <table:table-cell office:value-type="string">
            <text:p>VT39/7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69">
            <text:p>1069</text:p>
          </table:table-cell>
          <table:table-cell table:number-columns-repeated="2"/>
          <table:table-cell office:value-type="string">
            <text:p>TYAKA</text:p>
          </table:table-cell>
          <table:table-cell office:value-type="string">
            <text:p>hew</text:p>
          </table:table-cell>
          <table:table-cell office:value-type="string">
            <text:p>QL/4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70">
            <text:p>1070</text:p>
          </table:table-cell>
          <table:table-cell table:number-columns-repeated="2"/>
          <table:table-cell office:value-type="string">
            <text:p>TYALA</text:p>
          </table:table-cell>
          <table:table-cell office:value-type="string">
            <text:p>*play</text:p>
          </table:table-cell>
          <table:table-cell office:value-type="string">
            <text:p>QL/49</text:p>
          </table:table-cell>
          <table:table-cell office:value-type="string">
            <text:p>TYAL</text:p>
          </table:table-cell>
          <table:table-cell office:value-type="string">
            <text:p>play</text:p>
          </table:table-cell>
          <table:table-cell office:value-type="string">
            <text:p>Ety/TYAL</text:p>
          </table:table-cell>
          <table:table-cell office:value-type="string">
            <text:p>Q. tyalie</text:p>
          </table:table-cell>
          <table:table-cell office:value-type="string">
            <text:p>mirth</text:p>
          </table:table-cell>
          <table:table-cell office:value-type="string">
            <text:p>PE21/8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table:number-columns-repeated="2"/>
          <table:table-cell office:value-type="string">
            <text:p>TYASA</text:p>
          </table:table-cell>
          <table:table-cell office:value-type="string">
            <text:p>taste, choose</text:p>
          </table:table-cell>
          <table:table-cell office:value-type="string">
            <text:p>QL/49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table:number-columns-repeated="2"/>
          <table:table-cell office:value-type="string">
            <text:p>TYETE</text:p>
          </table:table-cell>
          <table:table-cell office:value-type="string">
            <text:p>give suck</text:p>
          </table:table-cell>
          <table:table-cell office:value-type="string">
            <text:p>QL/5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TYOSO</text:p>
          </table:table-cell>
          <table:table-cell office:value-type="string">
            <text:p>cough</text:p>
          </table:table-cell>
          <table:table-cell office:value-type="string">
            <text:p>QL/5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4">
            <text:p>1074</text:p>
          </table:table-cell>
          <table:table-cell table:number-columns-repeated="2"/>
          <table:table-cell office:value-type="string">
            <text:p>TYUKU</text:p>
          </table:table-cell>
          <table:table-cell office:value-type="string">
            <text:p>chew</text:p>
          </table:table-cell>
          <table:table-cell office:value-type="string">
            <text:p>QL/5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Q. tyulma</text:p>
          </table:table-cell>
          <table:table-cell office:value-type="string">
            <text:p>mast</text:p>
          </table:table-cell>
          <table:table-cell office:value-type="string">
            <text:p>TYULU</text:p>
          </table:table-cell>
          <table:table-cell office:value-type="string">
            <text:p>tall</text:p>
          </table:table-cell>
          <table:table-cell office:value-type="string">
            <text:p>QL/50</text:p>
          </table:table-cell>
          <table:table-cell office:value-type="string">
            <text:p>TYUL</text:p>
          </table:table-cell>
          <table:table-cell office:value-type="string">
            <text:p>stand up (straight)</text:p>
          </table:table-cell>
          <table:table-cell office:value-type="string">
            <text:p>Ety/TYUL</text:p>
          </table:table-cell>
          <table:table-cell office:value-type="string">
            <text:p>KYULMĀ</text:p>
          </table:table-cell>
          <table:table-cell office:value-type="string">
            <text:p>mast</text:p>
          </table:table-cell>
          <table:table-cell office:value-type="string">
            <text:p>PE21/80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76">
            <text:p>1076</text:p>
          </table:table-cell>
          <table:table-cell table:number-columns-repeated="2"/>
          <table:table-cell office:value-type="string">
            <text:p>TYURU</text:p>
          </table:table-cell>
          <table:table-cell office:value-type="string">
            <text:p>curdle</text:p>
          </table:table-cell>
          <table:table-cell office:value-type="string">
            <text:p>QL/5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7">
            <text:p>1077</text:p>
          </table:table-cell>
          <table:table-cell table:number-columns-repeated="2"/>
          <table:table-cell office:value-type="string">
            <text:p>ÞṆKṆ</text:p>
          </table:table-cell>
          <table:table-cell office:value-type="string">
            <text:p>*hate</text:p>
          </table:table-cell>
          <table:table-cell office:value-type="string">
            <text:p>QL/8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8">
            <text:p>1078</text:p>
          </table:table-cell>
          <table:table-cell table:number-columns-repeated="2"/>
          <table:table-cell office:value-type="string">
            <text:p>Ū¹</text:p>
          </table:table-cell>
          <table:table-cell office:value-type="string">
            <text:p>under</text:p>
          </table:table-cell>
          <table:table-cell office:value-type="string">
            <text:p>QL/9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79">
            <text:p>1079</text:p>
          </table:table-cell>
          <table:table-cell table:number-columns-repeated="2"/>
          <table:table-cell office:value-type="string">
            <text:p>Ū²</text:p>
          </table:table-cell>
          <table:table-cell office:value-type="string">
            <text:p>not</text:p>
          </table:table-cell>
          <table:table-cell office:value-type="string">
            <text:p>QL/96, 98</text:p>
          </table:table-cell>
          <table:table-cell office:value-type="string">
            <text:p>GŪ/MŪ</text:p>
          </table:table-cell>
          <table:table-cell office:value-type="string">
            <text:p>no, not</text:p>
          </table:table-cell>
          <table:table-cell office:value-type="string">
            <text:p>Ety/GŪ, MŪ</text:p>
          </table:table-cell>
          <table:table-cell office:value-type="string">
            <text:p>Ū</text:p>
          </table:table-cell>
          <table:table-cell office:value-type="string">
            <text:p>denial of fact</text:p>
          </table:table-cell>
          <table:table-cell office:value-type="string">
            <text:p>PE17/14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Q. -uva</text:p>
          </table:table-cell>
          <table:table-cell office:value-type="string">
            <text:p>future</text:p>
          </table:table-cell>
          <table:table-cell table:number-columns-repeated="3"/>
          <table:table-cell office:value-type="string">
            <text:p>UB</text:p>
          </table:table-cell>
          <table:table-cell office:value-type="string">
            <text:p>ponder, have in mind</text:p>
          </table:table-cell>
          <table:table-cell office:value-type="string">
            <text:p>VT48/32</text:p>
          </table:table-cell>
          <table:table-cell office:value-type="string">
            <text:p>UB</text:p>
          </table:table-cell>
          <table:table-cell office:value-type="string">
            <text:p>ponder; *impend</text:p>
          </table:table-cell>
          <table:table-cell office:value-type="string">
            <text:p>PE22/132, 167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81">
            <text:p>1081</text:p>
          </table:table-cell>
          <table:table-cell table:number-columns-repeated="8"/>
          <table:table-cell office:value-type="string">
            <text:p>UG</text:p>
          </table:table-cell>
          <table:table-cell office:value-type="string">
            <text:p>dislike</text:p>
          </table:table-cell>
          <table:table-cell office:value-type="string">
            <text:p>PE22/16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2">
            <text:p>1082</text:p>
          </table:table-cell>
          <table:table-cell table:number-columns-repeated="2"/>
          <table:table-cell office:value-type="string">
            <text:p>U̯IRI</text:p>
          </table:table-cell>
          <table:table-cell office:value-type="string">
            <text:p>*look</text:p>
          </table:table-cell>
          <table:table-cell office:value-type="string">
            <text:p>GL/4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(U)ḶQ(U)Ḷ</text:p>
          </table:table-cell>
          <table:table-cell office:value-type="string">
            <text:p>rend</text:p>
          </table:table-cell>
          <table:table-cell office:value-type="string">
            <text:p>QL/9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Q. Ulmo</text:p>
          </table:table-cell>
          <table:table-cell/>
          <table:table-cell office:value-type="string">
            <text:p>ULU¹</text:p>
          </table:table-cell>
          <table:table-cell office:value-type="string">
            <text:p>pour, flow fast</text:p>
          </table:table-cell>
          <table:table-cell office:value-type="string">
            <text:p>QL/97</text:p>
          </table:table-cell>
          <table:table-cell office:value-type="string">
            <text:p>ULU</text:p>
          </table:table-cell>
          <table:table-cell office:value-type="string">
            <text:p>pour, flow</text:p>
          </table:table-cell>
          <table:table-cell office:value-type="string">
            <text:p>Ety/ULU</text:p>
          </table:table-cell>
          <table:table-cell office:value-type="string">
            <text:p>UL</text:p>
          </table:table-cell>
          <table:table-cell office:value-type="string">
            <text:p>pour out</text:p>
          </table:table-cell>
          <table:table-cell office:value-type="string">
            <text:p>WJ/40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85">
            <text:p>1085</text:p>
          </table:table-cell>
          <table:table-cell table:number-columns-repeated="2"/>
          <table:table-cell office:value-type="string">
            <text:p>ULU²</text:p>
          </table:table-cell>
          <table:table-cell office:value-type="string">
            <text:p>*negative</text:p>
          </table:table-cell>
          <table:table-cell office:value-type="string">
            <text:p>QL/9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86">
            <text:p>1086</text:p>
          </table:table-cell>
          <table:table-cell table:number-columns-repeated="5"/>
          <table:table-cell office:value-type="string">
            <text:p>ULUG</text:p>
          </table:table-cell>
          <table:table-cell office:value-type="string">
            <text:p>*hideous, deformed</text:p>
          </table:table-cell>
          <table:table-cell office:value-type="string">
            <text:p>Ety/ÚLUG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7">
            <text:p>1087</text:p>
          </table:table-cell>
          <table:table-cell table:number-columns-repeated="2"/>
          <table:table-cell office:value-type="string">
            <text:p>ULUKU</text:p>
          </table:table-cell>
          <table:table-cell office:value-type="string">
            <text:p>wolf</text:p>
          </table:table-cell>
          <table:table-cell office:value-type="string">
            <text:p>QL/9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8">
            <text:p>1088</text:p>
          </table:table-cell>
          <table:table-cell table:number-columns-repeated="2"/>
          <table:table-cell office:value-type="string">
            <text:p>ULUN(T)</text:p>
          </table:table-cell>
          <table:table-cell office:value-type="string">
            <text:p>*camel</text:p>
          </table:table-cell>
          <table:table-cell office:value-type="string">
            <text:p>QL/9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89">
            <text:p>1089</text:p>
          </table:table-cell>
          <table:table-cell table:number-columns-repeated="5"/>
          <table:table-cell office:value-type="string">
            <text:p>UB</text:p>
          </table:table-cell>
          <table:table-cell office:value-type="string">
            <text:p>abound</text:p>
          </table:table-cell>
          <table:table-cell office:value-type="string">
            <text:p>Ety/UB</text:p>
          </table:table-cell>
          <table:table-cell office:value-type="string">
            <text:p>UM</text:p>
          </table:table-cell>
          <table:table-cell office:value-type="string">
            <text:p>abound</text:p>
          </table:table-cell>
          <table:table-cell office:value-type="string">
            <text:p>VT48/32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090">
            <text:p>1090</text:p>
          </table:table-cell>
          <table:table-cell table:number-columns-repeated="2"/>
          <table:table-cell office:value-type="string">
            <text:p>UMU/UVU</text:p>
          </table:table-cell>
          <table:table-cell office:value-type="string">
            <text:p>*negative</text:p>
          </table:table-cell>
          <table:table-cell office:value-type="string">
            <text:p>QL/98</text:p>
          </table:table-cell>
          <table:table-cell office:value-type="string">
            <text:p>UGU/UMU</text:p>
          </table:table-cell>
          <table:table-cell office:value-type="string">
            <text:p>negative stems</text:p>
          </table:table-cell>
          <table:table-cell office:value-type="string">
            <text:p>Ety/UGU</text:p>
          </table:table-cell>
          <table:table-cell office:value-type="string">
            <text:p>UGU/UMU</text:p>
          </table:table-cell>
          <table:table-cell office:value-type="string">
            <text:p>expressing privation</text:p>
          </table:table-cell>
          <table:table-cell office:value-type="string">
            <text:p>PE17/143, 172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91">
            <text:p>1091</text:p>
          </table:table-cell>
          <table:table-cell office:value-type="string">
            <text:p>S. Ungoliant</text:p>
          </table:table-cell>
          <table:table-cell/>
          <table:table-cell office:value-type="string">
            <text:p>GUŊU</text:p>
          </table:table-cell>
          <table:table-cell office:value-type="string">
            <text:p>*spider</text:p>
          </table:table-cell>
          <table:table-cell office:value-type="string">
            <text:p>QL/98</text:p>
          </table:table-cell>
          <table:table-cell office:value-type="string">
            <text:p>UÑG</text:p>
          </table:table-cell>
          <table:table-cell office:value-type="string">
            <text:p>*gloom</text:p>
          </table:table-cell>
          <table:table-cell office:value-type="string">
            <text:p>Ety/UÑG</text:p>
          </table:table-cell>
          <table:table-cell office:value-type="string">
            <text:p>UÑG</text:p>
          </table:table-cell>
          <table:table-cell office:value-type="string">
            <text:p>spider</text:p>
          </table:table-cell>
          <table:table-cell office:value-type="string">
            <text:p>PE22/160</text:p>
          </table:table-cell>
          <table:table-cell office:value-type="string">
            <text:p>Full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(U)ṆQ(U)Ṇ¹</text:p>
          </table:table-cell>
          <table:table-cell office:value-type="string">
            <text:p>*loop</text:p>
          </table:table-cell>
          <table:table-cell office:value-type="string">
            <text:p>QL/9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3">
            <text:p>1093</text:p>
          </table:table-cell>
          <table:table-cell table:number-columns-repeated="2"/>
          <table:table-cell office:value-type="string">
            <text:p>(U)ṆQ(U)Ṇ²</text:p>
          </table:table-cell>
          <table:table-cell office:value-type="string">
            <text:p>*ear</text:p>
          </table:table-cell>
          <table:table-cell office:value-type="string">
            <text:p>QL/9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94">
            <text:p>1094</text:p>
          </table:table-cell>
          <table:table-cell table:number-columns-repeated="5"/>
          <table:table-cell office:value-type="string">
            <text:p>UNUK</text:p>
          </table:table-cell>
          <table:table-cell office:value-type="string">
            <text:p>*hollow</text:p>
          </table:table-cell>
          <table:table-cell office:value-type="string">
            <text:p>Ety/UNU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5">
            <text:p>1095</text:p>
          </table:table-cell>
          <table:table-cell table:number-columns-repeated="2"/>
          <table:table-cell office:value-type="string">
            <text:p>UQU</text:p>
          </table:table-cell>
          <table:table-cell office:value-type="string">
            <text:p>wet</text:p>
          </table:table-cell>
          <table:table-cell office:value-type="string">
            <text:p>QL/9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96">
            <text:p>1096</text:p>
          </table:table-cell>
          <table:table-cell office:value-type="string">
            <text:p>Q. Úr(in)</text:p>
          </table:table-cell>
          <table:table-cell office:value-type="string">
            <text:p>Sun</text:p>
          </table:table-cell>
          <table:table-cell office:value-type="string">
            <text:p>URU</text:p>
          </table:table-cell>
          <table:table-cell office:value-type="string">
            <text:p>*fire</text:p>
          </table:table-cell>
          <table:table-cell office:value-type="string">
            <text:p>QL/98</text:p>
          </table:table-cell>
          <table:table-cell office:value-type="string">
            <text:p>{UR}</text:p>
          </table:table-cell>
          <table:table-cell office:value-type="string">
            <text:p>be hot</text:p>
          </table:table-cell>
          <table:table-cell office:value-type="string">
            <text:p>Ety/UR</text:p>
          </table:table-cell>
          <table:table-cell office:value-type="string">
            <text:p>UR</text:p>
          </table:table-cell>
          <table:table-cell office:value-type="string">
            <text:p>heat</text:p>
          </table:table-cell>
          <table:table-cell office:value-type="string">
            <text:p>PE22/16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97">
            <text:p>1097</text:p>
          </table:table-cell>
          <table:table-cell table:number-columns-repeated="2"/>
          <table:table-cell office:value-type="string">
            <text:p>UŘU/GUDH</text:p>
          </table:table-cell>
          <table:table-cell office:value-type="string">
            <text:p>*burn</text:p>
          </table:table-cell>
          <table:table-cell office:value-type="string">
            <text:p>QL/98; GL/4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98">
            <text:p>1098</text:p>
          </table:table-cell>
          <table:table-cell table:number-columns-repeated="5"/>
          <table:table-cell office:value-type="string">
            <text:p>UR</text:p>
          </table:table-cell>
          <table:table-cell office:value-type="string">
            <text:p>wide, large, great</text:p>
          </table:table-cell>
          <table:table-cell office:value-type="string">
            <text:p>Ety/U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9">
            <text:p>1099</text:p>
          </table:table-cell>
          <table:table-cell table:number-columns-repeated="8"/>
          <table:table-cell office:value-type="string">
            <text:p>URUN</text:p>
          </table:table-cell>
          <table:table-cell office:value-type="string">
            <text:p>copper</text:p>
          </table:table-cell>
          <table:table-cell office:value-type="string">
            <text:p>PM/366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table:number-columns-repeated="2"/>
          <table:table-cell office:value-type="string">
            <text:p>USU</text:p>
          </table:table-cell>
          <table:table-cell office:value-type="string">
            <text:p>get out, escape</text:p>
          </table:table-cell>
          <table:table-cell office:value-type="string">
            <text:p>QL/98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Q. usque</text:p>
          </table:table-cell>
          <table:table-cell office:value-type="string">
            <text:p>dusk; smoke; fog</text:p>
          </table:table-cell>
          <table:table-cell office:value-type="string">
            <text:p>ṢQṢ</text:p>
          </table:table-cell>
          <table:table-cell office:value-type="string">
            <text:p>*fog, mist</text:p>
          </table:table-cell>
          <table:table-cell office:value-type="string">
            <text:p>QL/98</text:p>
          </table:table-cell>
          <table:table-cell office:value-type="string">
            <text:p>USUK</text:p>
          </table:table-cell>
          <table:table-cell office:value-type="string">
            <text:p>*reek, smoke</text:p>
          </table:table-cell>
          <table:table-cell office:value-type="string">
            <text:p>Ety/USUK</text:p>
          </table:table-cell>
          <table:table-cell office:value-type="string">
            <text:p>USUK</text:p>
          </table:table-cell>
          <table:table-cell office:value-type="string">
            <text:p>dusk, evening</text:p>
          </table:table-cell>
          <table:table-cell office:value-type="string">
            <text:p>PE21/71</text:p>
          </table:table-cell>
          <table:table-cell office:value-type="string">
            <text:p>Full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02">
            <text:p>1102</text:p>
          </table:table-cell>
          <table:table-cell table:number-columns-repeated="8"/>
          <table:table-cell office:value-type="string">
            <text:p>UTHU</text:p>
          </table:table-cell>
          <table:table-cell office:value-type="string">
            <text:p>bad; unsuitable</text:p>
          </table:table-cell>
          <table:table-cell office:value-type="string">
            <text:p>PE17/189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03">
            <text:p>1103</text:p>
          </table:table-cell>
          <table:table-cell table:number-columns-repeated="5"/>
          <table:table-cell office:value-type="string">
            <text:p>UY</text:p>
          </table:table-cell>
          <table:table-cell office:value-type="string">
            <text:p>*long trailing plant</text:p>
          </table:table-cell>
          <table:table-cell office:value-type="string">
            <text:p>Ety/UY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4">
            <text:p>1104</text:p>
          </table:table-cell>
          <table:table-cell table:number-columns-repeated="2"/>
          <table:table-cell office:value-type="string">
            <text:p>VARA</text:p>
          </table:table-cell>
          <table:table-cell office:value-type="string">
            <text:p>*separate</text:p>
          </table:table-cell>
          <table:table-cell office:value-type="string">
            <text:p>QL/10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5">
            <text:p>1105</text:p>
          </table:table-cell>
          <table:table-cell table:number-columns-repeated="2"/>
          <table:table-cell office:value-type="string">
            <text:p>VAQA</text:p>
          </table:table-cell>
          <table:table-cell office:value-type="string">
            <text:p>vanquish</text:p>
          </table:table-cell>
          <table:table-cell office:value-type="string">
            <text:p>QL/10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VASA</text:p>
          </table:table-cell>
          <table:table-cell office:value-type="string">
            <text:p>*wing</text:p>
          </table:table-cell>
          <table:table-cell office:value-type="string">
            <text:p>QL/10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7">
            <text:p>1107</text:p>
          </table:table-cell>
          <table:table-cell table:number-columns-repeated="2"/>
          <table:table-cell office:value-type="string">
            <text:p>VEHE</text:p>
          </table:table-cell>
          <table:table-cell office:value-type="string">
            <text:p>*death</text:p>
          </table:table-cell>
          <table:table-cell office:value-type="string">
            <text:p>QL/10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8">
            <text:p>1108</text:p>
          </table:table-cell>
          <table:table-cell table:number-columns-repeated="2"/>
          <table:table-cell office:value-type="string">
            <text:p>VELU</text:p>
          </table:table-cell>
          <table:table-cell office:value-type="string">
            <text:p>unroll</text:p>
          </table:table-cell>
          <table:table-cell office:value-type="string">
            <text:p>QL/100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9">
            <text:p>1109</text:p>
          </table:table-cell>
          <table:table-cell table:number-columns-repeated="2"/>
          <table:table-cell office:value-type="string">
            <text:p>VETE</text:p>
          </table:table-cell>
          <table:table-cell office:value-type="string">
            <text:p>*chin</text:p>
          </table:table-cell>
          <table:table-cell office:value-type="string">
            <text:p>QL/10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10">
            <text:p>1110</text:p>
          </table:table-cell>
          <table:table-cell office:value-type="string">
            <text:p>Q. ve</text:p>
          </table:table-cell>
          <table:table-cell office:value-type="string">
            <text:p>as, like</text:p>
          </table:table-cell>
          <table:table-cell office:value-type="string">
            <text:p>VĪ</text:p>
          </table:table-cell>
          <table:table-cell office:value-type="string">
            <text:p>as</text:p>
          </table:table-cell>
          <table:table-cell office:value-type="string">
            <text:p>QL/101</text:p>
          </table:table-cell>
          <table:table-cell table:number-columns-repeated="3"/>
          <table:table-cell office:value-type="string">
            <text:p>BĒ</text:p>
          </table:table-cell>
          <table:table-cell office:value-type="string">
            <text:p>as, like</text:p>
          </table:table-cell>
          <table:table-cell office:value-type="string">
            <text:p>VT49/32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11">
            <text:p>1111</text:p>
          </table:table-cell>
          <table:table-cell table:number-columns-repeated="2"/>
          <table:table-cell office:value-type="string">
            <text:p>VIKI</text:p>
          </table:table-cell>
          <table:table-cell office:value-type="string">
            <text:p>*sticky</text:p>
          </table:table-cell>
          <table:table-cell office:value-type="string">
            <text:p>QL/10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2">
            <text:p>1112</text:p>
          </table:table-cell>
          <table:table-cell table:number-columns-repeated="2"/>
          <table:table-cell office:value-type="string">
            <text:p>VILI</text:p>
          </table:table-cell>
          <table:table-cell office:value-type="string">
            <text:p>*air</text:p>
          </table:table-cell>
          <table:table-cell office:value-type="string">
            <text:p>QL/10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VITI</text:p>
          </table:table-cell>
          <table:table-cell office:value-type="string">
            <text:p>*juice, sap</text:p>
          </table:table-cell>
          <table:table-cell office:value-type="string">
            <text:p>QL/10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4">
            <text:p>1114</text:p>
          </table:table-cell>
          <table:table-cell table:number-columns-repeated="2"/>
          <table:table-cell office:value-type="string">
            <text:p>VḶKḶ</text:p>
          </table:table-cell>
          <table:table-cell office:value-type="string">
            <text:p>*cut, cruel</text:p>
          </table:table-cell>
          <table:table-cell office:value-type="string">
            <text:p>QL/101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5">
            <text:p>1115</text:p>
          </table:table-cell>
          <table:table-cell table:number-columns-repeated="2"/>
          <table:table-cell office:value-type="string">
            <text:p>VḶŘḶ</text:p>
          </table:table-cell>
          <table:table-cell office:value-type="string">
            <text:p>*worth, value</text:p>
          </table:table-cell>
          <table:table-cell office:value-type="string">
            <text:p>QL/10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6">
            <text:p>1116</text:p>
          </table:table-cell>
          <table:table-cell table:number-columns-repeated="2"/>
          <table:table-cell office:value-type="string">
            <text:p>VḶTḶ</text:p>
          </table:table-cell>
          <table:table-cell office:value-type="string">
            <text:p>release, set free</text:p>
          </table:table-cell>
          <table:table-cell office:value-type="string">
            <text:p>QL/10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7">
            <text:p>1117</text:p>
          </table:table-cell>
          <table:table-cell table:number-columns-repeated="2"/>
          <table:table-cell office:value-type="string">
            <text:p>VŌRI</text:p>
          </table:table-cell>
          <table:table-cell office:value-type="string">
            <text:p>fur</text:p>
          </table:table-cell>
          <table:table-cell office:value-type="string">
            <text:p>QL/10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8">
            <text:p>1118</text:p>
          </table:table-cell>
          <table:table-cell table:number-columns-repeated="2"/>
          <table:table-cell office:value-type="string">
            <text:p>VṚKṚ</text:p>
          </table:table-cell>
          <table:table-cell office:value-type="string">
            <text:p>*fear</text:p>
          </table:table-cell>
          <table:table-cell office:value-type="string">
            <text:p>QL/10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9">
            <text:p>1119</text:p>
          </table:table-cell>
          <table:table-cell table:number-columns-repeated="2"/>
          <table:table-cell office:value-type="string">
            <text:p>VṚT</text:p>
          </table:table-cell>
          <table:table-cell office:value-type="string">
            <text:p>*change</text:p>
          </table:table-cell>
          <table:table-cell office:value-type="string">
            <text:p>QL/10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20">
            <text:p>1120</text:p>
          </table:table-cell>
          <table:table-cell table:number-columns-repeated="2"/>
          <table:table-cell office:value-type="string">
            <text:p>VṚT͡YṚ</text:p>
          </table:table-cell>
          <table:table-cell office:value-type="string">
            <text:p>serve</text:p>
          </table:table-cell>
          <table:table-cell office:value-type="string">
            <text:p>QL/10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21">
            <text:p>1121</text:p>
          </table:table-cell>
          <table:table-cell office:value-type="string">
            <text:p>S. gwae</text:p>
          </table:table-cell>
          <table:table-cell office:value-type="string">
            <text:p>wind</text:p>
          </table:table-cell>
          <table:table-cell office:value-type="string">
            <text:p>GWĀ</text:p>
          </table:table-cell>
          <table:table-cell office:value-type="string">
            <text:p>*wind</text:p>
          </table:table-cell>
          <table:table-cell office:value-type="string">
            <text:p>QL/102</text:p>
          </table:table-cell>
          <table:table-cell office:value-type="string">
            <text:p>WĀ(WA)</text:p>
          </table:table-cell>
          <table:table-cell office:value-type="string">
            <text:p>blow</text:p>
          </table:table-cell>
          <table:table-cell office:value-type="string">
            <text:p>Ety/WĀ</text:p>
          </table:table-cell>
          <table:table-cell office:value-type="string">
            <text:p>WĀ</text:p>
          </table:table-cell>
          <table:table-cell office:value-type="string">
            <text:p>noise of wind</text:p>
          </table:table-cell>
          <table:table-cell office:value-type="string">
            <text:p>PE17/34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Q. vanwa</text:p>
          </table:table-cell>
          <table:table-cell office:value-type="string">
            <text:p>lost</text:p>
          </table:table-cell>
          <table:table-cell office:value-type="string">
            <text:p>AVA</text:p>
          </table:table-cell>
          <table:table-cell office:value-type="string">
            <text:p>go away, depart, leave</text:p>
          </table:table-cell>
          <table:table-cell office:value-type="string">
            <text:p>QL/33</text:p>
          </table:table-cell>
          <table:table-cell office:value-type="string">
            <text:p>AWA</text:p>
          </table:table-cell>
          <table:table-cell office:value-type="string">
            <text:p>away, forth; out</text:p>
          </table:table-cell>
          <table:table-cell office:value-type="string">
            <text:p>Ety/AWA</text:p>
          </table:table-cell>
          <table:table-cell office:value-type="string">
            <text:p>WĀ/AWA</text:p>
          </table:table-cell>
          <table:table-cell office:value-type="string">
            <text:p>away; depart</text:p>
          </table:table-cell>
          <table:table-cell office:value-type="string">
            <text:p>PE17/63, 14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23">
            <text:p>1123</text:p>
          </table:table-cell>
          <table:table-cell table:number-columns-repeated="5"/>
          <table:table-cell office:value-type="string">
            <text:p>WAD</text:p>
          </table:table-cell>
          <table:table-cell office:value-type="string">
            <text:p>err, stray</text:p>
          </table:table-cell>
          <table:table-cell office:value-type="string">
            <text:p>PE22/102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ẆAÐA</text:p>
          </table:table-cell>
          <table:table-cell office:value-type="string">
            <text:p>dwell</text:p>
          </table:table-cell>
          <table:table-cell office:value-type="string">
            <text:p>QL/102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25">
            <text:p>1125</text:p>
          </table:table-cell>
          <table:table-cell table:number-columns-repeated="5"/>
          <table:table-cell office:value-type="string">
            <text:p>WAƷ</text:p>
          </table:table-cell>
          <table:table-cell office:value-type="string">
            <text:p>stain, soil</text:p>
          </table:table-cell>
          <table:table-cell office:value-type="string">
            <text:p>Ety/WAƷ</text:p>
          </table:table-cell>
          <table:table-cell office:value-type="string">
            <text:p>S. Agarwaen</text:p>
          </table:table-cell>
          <table:table-cell office:value-type="string">
            <text:p>Blood-stained</text:p>
          </table:table-cell>
          <table:table-cell office:value-type="string">
            <text:p>S/210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26">
            <text:p>1126</text:p>
          </table:table-cell>
          <table:table-cell table:number-columns-repeated="5"/>
          <table:table-cell office:value-type="string">
            <text:p>WAR</text:p>
          </table:table-cell>
          <table:table-cell office:value-type="string">
            <text:p>yield, let down, betray</text:p>
          </table:table-cell>
          <table:table-cell office:value-type="string">
            <text:p>Ety/W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27">
            <text:p>1127</text:p>
          </table:table-cell>
          <table:table-cell office:value-type="string">
            <text:p>S. gwath</text:p>
          </table:table-cell>
          <table:table-cell office:value-type="string">
            <text:p>shadow</text:p>
          </table:table-cell>
          <table:table-cell table:number-columns-repeated="3"/>
          <table:table-cell office:value-type="string">
            <text:p>WATH</text:p>
          </table:table-cell>
          <table:table-cell office:value-type="string">
            <text:p>shade</text:p>
          </table:table-cell>
          <table:table-cell office:value-type="string">
            <text:p>Ety/WATH</text:p>
          </table:table-cell>
          <table:table-cell office:value-type="string">
            <text:p>WATH(AR)</text:p>
          </table:table-cell>
          <table:table-cell office:value-type="string">
            <text:p>*shadow</text:p>
          </table:table-cell>
          <table:table-cell office:value-type="string">
            <text:p>VT42/9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S. gwae</text:p>
          </table:table-cell>
          <table:table-cell office:value-type="string">
            <text:p>wind</text:p>
          </table:table-cell>
          <table:table-cell table:number-columns-repeated="3"/>
          <table:table-cell office:value-type="string">
            <text:p>WAIWA</text:p>
          </table:table-cell>
          <table:table-cell office:value-type="string">
            <text:p>blow</text:p>
          </table:table-cell>
          <table:table-cell office:value-type="string">
            <text:p>Ety/WĀ</text:p>
          </table:table-cell>
          <table:table-cell office:value-type="string">
            <text:p>WAY</text:p>
          </table:table-cell>
          <table:table-cell office:value-type="string">
            <text:p>blow (of wind)</text:p>
          </table:table-cell>
          <table:table-cell office:value-type="string">
            <text:p>PE17/189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29">
            <text:p>1129</text:p>
          </table:table-cell>
          <table:table-cell table:number-columns-repeated="5"/>
          <table:table-cell office:value-type="string">
            <text:p>WA-N</text:p>
          </table:table-cell>
          <table:table-cell office:value-type="string">
            <text:p>goose</text:p>
          </table:table-cell>
          <table:table-cell office:value-type="string">
            <text:p>Ety/WA-N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/>
          <table:table-cell office:value-type="string">
            <text:p>VAẎA</text:p>
          </table:table-cell>
          <table:table-cell office:value-type="string">
            <text:p>enfold, wind about</text:p>
          </table:table-cell>
          <table:table-cell office:value-type="string">
            <text:p>QL/100</text:p>
          </table:table-cell>
          <table:table-cell office:value-type="string">
            <text:p>WAY</text:p>
          </table:table-cell>
          <table:table-cell office:value-type="string">
            <text:p>enfold</text:p>
          </table:table-cell>
          <table:table-cell office:value-type="string">
            <text:p>Ety/WAY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31">
            <text:p>1131</text:p>
          </table:table-cell>
          <table:table-cell table:number-columns-repeated="2"/>
          <table:table-cell office:value-type="string">
            <text:p>WI</text:p>
          </table:table-cell>
          <table:table-cell office:value-type="string">
            <text:p>dual</text:p>
          </table:table-cell>
          <table:table-cell office:value-type="string">
            <text:p>QL/33</text:p>
          </table:table-cell>
          <table:table-cell table:number-columns-repeated="3"/>
          <table:table-cell office:value-type="string">
            <text:p>WE</text:p>
          </table:table-cell>
          <table:table-cell office:value-type="string">
            <text:p>dual</text:p>
          </table:table-cell>
          <table:table-cell office:value-type="string">
            <text:p>VT48/10</text:p>
          </table:table-cell>
          <table:table-cell office:value-type="string">
            <text:p>Ski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32">
            <text:p>1132</text:p>
          </table:table-cell>
          <table:table-cell table:number-columns-repeated="8"/>
          <table:table-cell office:value-type="string">
            <text:p>WE/EWE</text:p>
          </table:table-cell>
          <table:table-cell office:value-type="string">
            <text:p>person, being</text:p>
          </table:table-cell>
          <table:table-cell office:value-type="string">
            <text:p>PE17/190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33">
            <text:p>1133</text:p>
          </table:table-cell>
          <table:table-cell table:number-columns-repeated="5"/>
          <table:table-cell office:value-type="string">
            <text:p>WED</text:p>
          </table:table-cell>
          <table:table-cell office:value-type="string">
            <text:p>bind</text:p>
          </table:table-cell>
          <table:table-cell office:value-type="string">
            <text:p>Ety/WED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34">
            <text:p>1134</text:p>
          </table:table-cell>
          <table:table-cell table:number-columns-repeated="2"/>
          <table:table-cell office:value-type="string">
            <text:p>WAIK</text:p>
          </table:table-cell>
          <table:table-cell office:value-type="string">
            <text:p>*man, male</text:p>
          </table:table-cell>
          <table:table-cell office:value-type="string">
            <text:p>PE13/117</text:p>
          </table:table-cell>
          <table:table-cell office:value-type="string">
            <text:p>WEG</text:p>
          </table:table-cell>
          <table:table-cell office:value-type="string">
            <text:p>(manly) vigour</text:p>
          </table:table-cell>
          <table:table-cell office:value-type="string">
            <text:p>Ety/WEG</text:p>
          </table:table-cell>
          <table:table-cell office:value-type="string">
            <text:p>WEG</text:p>
          </table:table-cell>
          <table:table-cell office:value-type="string">
            <text:p>live, be active</text:p>
          </table:table-cell>
          <table:table-cell office:value-type="string">
            <text:p>PE17/189</text:p>
          </table:table-cell>
          <table:table-cell office:value-type="string">
            <text:p>Full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135">
            <text:p>1135</text:p>
          </table:table-cell>
          <table:table-cell office:value-type="string">
            <text:p>S. gwend</text:p>
          </table:table-cell>
          <table:table-cell office:value-type="string">
            <text:p>maiden</text:p>
          </table:table-cell>
          <table:table-cell office:value-type="string">
            <text:p>GWENE</text:p>
          </table:table-cell>
          <table:table-cell office:value-type="string">
            <text:p>*maiden; woman</text:p>
          </table:table-cell>
          <table:table-cell office:value-type="string">
            <text:p>QL/103</text:p>
          </table:table-cell>
          <table:table-cell office:value-type="string">
            <text:p>WEN(ED)</text:p>
          </table:table-cell>
          <table:table-cell office:value-type="string">
            <text:p>maiden</text:p>
          </table:table-cell>
          <table:table-cell office:value-type="string">
            <text:p>Ety/WEN</text:p>
          </table:table-cell>
          <table:table-cell office:value-type="string">
            <text:p>WEN(ED)</text:p>
          </table:table-cell>
          <table:table-cell office:value-type="string">
            <text:p>girl, maiden</text:p>
          </table:table-cell>
          <table:table-cell office:value-type="string">
            <text:p>PE17/191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136">
            <text:p>1136</text:p>
          </table:table-cell>
          <table:table-cell office:value-type="string">
            <text:p>S. gwing</text:p>
          </table:table-cell>
          <table:table-cell office:value-type="string">
            <text:p>foam</text:p>
          </table:table-cell>
          <table:table-cell office:value-type="string">
            <text:p>GWIŊI</text:p>
          </table:table-cell>
          <table:table-cell office:value-type="string">
            <text:p>*foam</text:p>
          </table:table-cell>
          <table:table-cell office:value-type="string">
            <text:p>QL/104</text:p>
          </table:table-cell>
          <table:table-cell office:value-type="string">
            <text:p>WIG</text:p>
          </table:table-cell>
          <table:table-cell office:value-type="string">
            <text:p>*foam</text:p>
          </table:table-cell>
          <table:table-cell office:value-type="string">
            <text:p>Ety/WIG</text:p>
          </table:table-cell>
          <table:table-cell office:value-type="string">
            <text:p>Q. winge</text:p>
          </table:table-cell>
          <table:table-cell office:value-type="string">
            <text:p>foam, spray</text:p>
          </table:table-cell>
          <table:table-cell office:value-type="string">
            <text:p>PM/392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137">
            <text:p>1137</text:p>
          </table:table-cell>
          <table:table-cell office:value-type="string">
            <text:p>Q. wilwarin</text:p>
          </table:table-cell>
          <table:table-cell office:value-type="string">
            <text:p>butterfly</text:p>
          </table:table-cell>
          <table:table-cell office:value-type="string">
            <text:p>GWILI¹</text:p>
          </table:table-cell>
          <table:table-cell office:value-type="string">
            <text:p>*fly</text:p>
          </table:table-cell>
          <table:table-cell office:value-type="string">
            <text:p>QL/104</text:p>
          </table:table-cell>
          <table:table-cell/>
          <table:table-cell office:value-type="string">
            <text:p>fly, float in air</text:p>
          </table:table-cell>
          <table:table-cell office:value-type="string">
            <text:p>Ety/WIL</text:p>
          </table:table-cell>
          <table:table-cell office:value-type="string">
            <text:p>Q. †wilya</text:p>
          </table:table-cell>
          <table:table-cell office:value-type="string">
            <text:p>air, sky</text:p>
          </table:table-cell>
          <table:table-cell office:value-type="string">
            <text:p>LotR/1123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38">
            <text:p>1138</text:p>
          </table:table-cell>
          <table:table-cell table:number-columns-repeated="2"/>
          <table:table-cell office:value-type="string">
            <text:p>WIKI</text:p>
          </table:table-cell>
          <table:table-cell office:value-type="string">
            <text:p>*corner</text:p>
          </table:table-cell>
          <table:table-cell office:value-type="string">
            <text:p>QL/10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39">
            <text:p>1139</text:p>
          </table:table-cell>
          <table:table-cell office:value-type="string">
            <text:p>Q. vinya</text:p>
          </table:table-cell>
          <table:table-cell office:value-type="string">
            <text:p>young, new</text:p>
          </table:table-cell>
          <table:table-cell office:value-type="string">
            <text:p>GUI̯U̯</text:p>
          </table:table-cell>
          <table:table-cell office:value-type="string">
            <text:p>*young</text:p>
          </table:table-cell>
          <table:table-cell office:value-type="string">
            <text:p>GL/42</text:p>
          </table:table-cell>
          <table:table-cell office:value-type="string">
            <text:p>WIN</text:p>
          </table:table-cell>
          <table:table-cell office:value-type="string">
            <text:p>new, fresh, young</text:p>
          </table:table-cell>
          <table:table-cell office:value-type="string">
            <text:p>EtyAC/WIR</text:p>
          </table:table-cell>
          <table:table-cell office:value-type="string">
            <text:p>WIN</text:p>
          </table:table-cell>
          <table:table-cell office:value-type="string">
            <text:p>young</text:p>
          </table:table-cell>
          <table:table-cell office:value-type="string">
            <text:p>PE17/191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140">
            <text:p>1140</text:p>
          </table:table-cell>
          <table:table-cell table:number-columns-repeated="5"/>
          <table:table-cell office:value-type="string">
            <text:p>WIR</text:p>
          </table:table-cell>
          <table:table-cell office:value-type="string">
            <text:p>new, fresh, young</text:p>
          </table:table-cell>
          <table:table-cell office:value-type="string">
            <text:p>EtyAC/WI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41">
            <text:p>1141</text:p>
          </table:table-cell>
          <table:table-cell office:value-type="string">
            <text:p>Q. Vaire</text:p>
          </table:table-cell>
          <table:table-cell office:value-type="string">
            <text:p>Weaver</text:p>
          </table:table-cell>
          <table:table-cell office:value-type="string">
            <text:p>GWERE</text:p>
          </table:table-cell>
          <table:table-cell office:value-type="string">
            <text:p>whirl, twirl, twist</text:p>
          </table:table-cell>
          <table:table-cell office:value-type="string">
            <text:p>QL/103</text:p>
          </table:table-cell>
          <table:table-cell office:value-type="string">
            <text:p>WEY</text:p>
          </table:table-cell>
          <table:table-cell office:value-type="string">
            <text:p>wind, weave</text:p>
          </table:table-cell>
          <table:table-cell office:value-type="string">
            <text:p>Ety/WEY</text:p>
          </table:table-cell>
          <table:table-cell office:value-type="string">
            <text:p>{WER}/WIRI</text:p>
          </table:table-cell>
          <table:table-cell office:value-type="string">
            <text:p>weave</text:p>
          </table:table-cell>
          <table:table-cell office:value-type="string">
            <text:p>PE17/33, 158</text:p>
          </table:table-cell>
          <table:table-cell office:value-type="string">
            <text:p>Full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42">
            <text:p>1142</text:p>
          </table:table-cell>
          <table:table-cell table:number-columns-repeated="8"/>
          <table:table-cell office:value-type="string">
            <text:p>WIS</text:p>
          </table:table-cell>
          <table:table-cell office:value-type="string">
            <text:p>alter, change, shift</text:p>
          </table:table-cell>
          <table:table-cell office:value-type="string">
            <text:p>PE17/191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43">
            <text:p>1143</text:p>
          </table:table-cell>
          <table:table-cell table:number-columns-repeated="5"/>
          <table:table-cell office:value-type="string">
            <text:p>WIS</text:p>
          </table:table-cell>
          <table:table-cell office:value-type="string">
            <text:p>air</text:p>
          </table:table-cell>
          <table:table-cell office:value-type="string">
            <text:p>Ety/WI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44">
            <text:p>1144</text:p>
          </table:table-cell>
          <table:table-cell office:value-type="string">
            <text:p>S. go-/gwa-</text:p>
          </table:table-cell>
          <table:table-cell office:value-type="string">
            <text:p>together</text:p>
          </table:table-cell>
          <table:table-cell office:value-type="string">
            <text:p>ŋu̯a</text:p>
          </table:table-cell>
          <table:table-cell office:value-type="string">
            <text:p>*together</text:p>
          </table:table-cell>
          <table:table-cell office:value-type="string">
            <text:p>GL/41</text:p>
          </table:table-cell>
          <table:table-cell office:value-type="string">
            <text:p>WO</text:p>
          </table:table-cell>
          <table:table-cell office:value-type="string">
            <text:p>together</text:p>
          </table:table-cell>
          <table:table-cell office:value-type="string">
            <text:p>Ety/WŌ</text:p>
          </table:table-cell>
          <table:table-cell office:value-type="string">
            <text:p>WO</text:p>
          </table:table-cell>
          <table:table-cell office:value-type="string">
            <text:p>together</text:p>
          </table:table-cell>
          <table:table-cell office:value-type="string">
            <text:p>WJ/361</text:p>
          </table:table-cell>
          <table:table-cell office:value-type="string">
            <text:p>Full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45">
            <text:p>1145</text:p>
          </table:table-cell>
          <table:table-cell table:number-columns-repeated="2"/>
          <table:table-cell office:value-type="string">
            <text:p>YA</text:p>
          </table:table-cell>
          <table:table-cell office:value-type="string">
            <text:p>and</text:p>
          </table:table-cell>
          <table:table-cell office:value-type="string">
            <text:p>QL/104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46">
            <text:p>1146</text:p>
          </table:table-cell>
          <table:table-cell office:value-type="string">
            <text:p>Q. ya</text:p>
          </table:table-cell>
          <table:table-cell office:value-type="string">
            <text:p>relative pronoun</text:p>
          </table:table-cell>
          <table:table-cell office:value-type="string">
            <text:p>(D)YA/(D)YE</text:p>
          </table:table-cell>
          <table:table-cell office:value-type="string">
            <text:p>demonstrative pointing back</text:p>
          </table:table-cell>
          <table:table-cell office:value-type="string">
            <text:p>QL/105</text:p>
          </table:table-cell>
          <table:table-cell office:value-type="string">
            <text:p>YA</text:p>
          </table:table-cell>
          <table:table-cell office:value-type="string">
            <text:p>over there; back, ago</text:p>
          </table:table-cell>
          <table:table-cell office:value-type="string">
            <text:p>Ety/YA</text:p>
          </table:table-cell>
          <table:table-cell office:value-type="string">
            <text:p>YA</text:p>
          </table:table-cell>
          <table:table-cell office:value-type="string">
            <text:p>?</text:p>
          </table:table-cell>
          <table:table-cell office:value-type="string">
            <text:p>PE17/42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147">
            <text:p>1147</text:p>
          </table:table-cell>
          <table:table-cell office:value-type="string">
            <text:p>Q. yáve</text:p>
          </table:table-cell>
          <table:table-cell office:value-type="string">
            <text:p>fruit</text:p>
          </table:table-cell>
          <table:table-cell office:value-type="string">
            <text:p>Ẏ̯AVA</text:p>
          </table:table-cell>
          <table:table-cell office:value-type="string">
            <text:p>*fruit</text:p>
          </table:table-cell>
          <table:table-cell office:value-type="string">
            <text:p>QL/105</text:p>
          </table:table-cell>
          <table:table-cell office:value-type="string">
            <text:p>YAB</text:p>
          </table:table-cell>
          <table:table-cell office:value-type="string">
            <text:p>fruit</text:p>
          </table:table-cell>
          <table:table-cell office:value-type="string">
            <text:p>Ety/YAB</text:p>
          </table:table-cell>
          <table:table-cell office:value-type="string">
            <text:p>Q. Yávanna</text:p>
          </table:table-cell>
          <table:table-cell office:value-type="string">
            <text:p>Fruit-gift</text:p>
          </table:table-cell>
          <table:table-cell office:value-type="string">
            <text:p>PE17/93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48">
            <text:p>1148</text:p>
          </table:table-cell>
          <table:table-cell table:number-columns-repeated="2"/>
          <table:table-cell office:value-type="string">
            <text:p>YAÐA</text:p>
          </table:table-cell>
          <table:table-cell office:value-type="string">
            <text:p>*gloom</text:p>
          </table:table-cell>
          <table:table-cell office:value-type="string">
            <text:p>QL/10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49">
            <text:p>1149</text:p>
          </table:table-cell>
          <table:table-cell office:value-type="string">
            <text:p>S. iâ</text:p>
          </table:table-cell>
          <table:table-cell office:value-type="string">
            <text:p>chasm, pit</text:p>
          </table:table-cell>
          <table:table-cell table:number-columns-repeated="3"/>
          <table:table-cell office:value-type="string">
            <text:p>YAG</text:p>
          </table:table-cell>
          <table:table-cell office:value-type="string">
            <text:p>yawn, gape</text:p>
          </table:table-cell>
          <table:table-cell office:value-type="string">
            <text:p>Ety/YAG</text:p>
          </table:table-cell>
          <table:table-cell office:value-type="string">
            <text:p>YAGA</text:p>
          </table:table-cell>
          <table:table-cell office:value-type="string">
            <text:p>gap</text:p>
          </table:table-cell>
          <table:table-cell office:value-type="string">
            <text:p>PE17/42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50">
            <text:p>1150</text:p>
          </table:table-cell>
          <table:table-cell table:number-columns-repeated="5"/>
          <table:table-cell office:value-type="string">
            <text:p>YAK</text:p>
          </table:table-cell>
          <table:table-cell office:value-type="string">
            <text:p>*neck</text:p>
          </table:table-cell>
          <table:table-cell office:value-type="string">
            <text:p>Ety/YA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51">
            <text:p>1151</text:p>
          </table:table-cell>
          <table:table-cell table:number-columns-repeated="2"/>
          <table:table-cell office:value-type="string">
            <text:p>ẎAK</text:p>
          </table:table-cell>
          <table:table-cell office:value-type="string">
            <text:p>head of cattle</text:p>
          </table:table-cell>
          <table:table-cell office:value-type="string">
            <text:p>QL/10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52">
            <text:p>1152</text:p>
          </table:table-cell>
          <table:table-cell table:number-columns-repeated="2"/>
          <table:table-cell office:value-type="string">
            <text:p>Y̯AMA</text:p>
          </table:table-cell>
          <table:table-cell office:value-type="string">
            <text:p>*call, shout</text:p>
          </table:table-cell>
          <table:table-cell office:value-type="string">
            <text:p>QL/105</text:p>
          </table:table-cell>
          <table:table-cell office:value-type="string">
            <text:p>YAM/YAL</text:p>
          </table:table-cell>
          <table:table-cell office:value-type="string">
            <text:p>to cry</text:p>
          </table:table-cell>
          <table:table-cell office:value-type="string">
            <text:p>EtyAC/YAM</text:p>
          </table:table-cell>
          <table:table-cell office:value-type="string">
            <text:p>Q. yal-</text:p>
          </table:table-cell>
          <table:table-cell office:value-type="string">
            <text:p>to summon</text:p>
          </table:table-cell>
          <table:table-cell office:value-type="string">
            <text:p>UT/317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53">
            <text:p>1153</text:p>
          </table:table-cell>
          <table:table-cell table:number-columns-repeated="2"/>
          <table:table-cell office:value-type="string">
            <text:p>ẎALA</text:p>
          </table:table-cell>
          <table:table-cell office:value-type="string">
            <text:p>ring, sound hollow</text:p>
          </table:table-cell>
          <table:table-cell office:value-type="string">
            <text:p>QL/10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54">
            <text:p>1154</text:p>
          </table:table-cell>
          <table:table-cell table:number-columns-repeated="8"/>
          <table:table-cell office:value-type="string">
            <text:p>YAN</text:p>
          </table:table-cell>
          <table:table-cell office:value-type="string">
            <text:p>wide</text:p>
          </table:table-cell>
          <table:table-cell office:value-type="string">
            <text:p>PE17/42, 115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55">
            <text:p>1155</text:p>
          </table:table-cell>
          <table:table-cell office:value-type="string">
            <text:p>Q. yanta</text:p>
          </table:table-cell>
          <table:table-cell office:value-type="string">
            <text:p>bridge</text:p>
          </table:table-cell>
          <table:table-cell office:value-type="string">
            <text:p>ẎATA</text:p>
          </table:table-cell>
          <table:table-cell office:value-type="string">
            <text:p>join</text:p>
          </table:table-cell>
          <table:table-cell office:value-type="string">
            <text:p>QL/105</text:p>
          </table:table-cell>
          <table:table-cell office:value-type="string">
            <text:p>YAT</text:p>
          </table:table-cell>
          <table:table-cell office:value-type="string">
            <text:p>join</text:p>
          </table:table-cell>
          <table:table-cell office:value-type="string">
            <text:p>Ety/YAT</text:p>
          </table:table-cell>
          <table:table-cell office:value-type="string">
            <text:p>YAN</text:p>
          </table:table-cell>
          <table:table-cell office:value-type="string">
            <text:p>join</text:p>
          </table:table-cell>
          <table:table-cell office:value-type="string">
            <text:p>VT49/45</text:p>
          </table:table-cell>
          <table:table-cell office:value-type="string">
            <text:p>Full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156">
            <text:p>1156</text:p>
          </table:table-cell>
          <table:table-cell table:number-columns-repeated="5"/>
          <table:table-cell office:value-type="string">
            <text:p>YAN²</text:p>
          </table:table-cell>
          <table:table-cell office:value-type="string">
            <text:p>give</text:p>
          </table:table-cell>
          <table:table-cell office:value-type="string">
            <text:p>EtyAC/YAN²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57">
            <text:p>1157</text:p>
          </table:table-cell>
          <table:table-cell table:number-columns-repeated="2"/>
          <table:table-cell office:value-type="string">
            <text:p>YAPA</text:p>
          </table:table-cell>
          <table:table-cell office:value-type="string">
            <text:p>snarl, snap</text:p>
          </table:table-cell>
          <table:table-cell office:value-type="string">
            <text:p>QL/10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58">
            <text:p>1158</text:p>
          </table:table-cell>
          <table:table-cell table:number-columns-repeated="5"/>
          <table:table-cell office:value-type="string">
            <text:p>YAR</text:p>
          </table:table-cell>
          <table:table-cell office:value-type="string">
            <text:p>blood</text:p>
          </table:table-cell>
          <table:table-cell office:value-type="string">
            <text:p>Ety/YAR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59">
            <text:p>1159</text:p>
          </table:table-cell>
          <table:table-cell table:number-columns-repeated="5"/>
          <table:table-cell office:value-type="string">
            <text:p>YAY</text:p>
          </table:table-cell>
          <table:table-cell office:value-type="string">
            <text:p>mock</text:p>
          </table:table-cell>
          <table:table-cell office:value-type="string">
            <text:p>Ety/YAY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60">
            <text:p>1160</text:p>
          </table:table-cell>
          <table:table-cell table:number-columns-repeated="2"/>
          <table:table-cell office:value-type="string">
            <text:p>YAI</text:p>
          </table:table-cell>
          <table:table-cell office:value-type="string">
            <text:p>*steel</text:p>
          </table:table-cell>
          <table:table-cell office:value-type="string">
            <text:p>GL/37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61">
            <text:p>1161</text:p>
          </table:table-cell>
          <table:table-cell table:number-columns-repeated="2"/>
          <table:table-cell office:value-type="string">
            <text:p>Ī</text:p>
          </table:table-cell>
          <table:table-cell office:value-type="string">
            <text:p>be</text:p>
          </table:table-cell>
          <table:table-cell office:value-type="string">
            <text:p>PE16/140</text:p>
          </table:table-cell>
          <table:table-cell office:value-type="string">
            <text:p>YĒ/I</text:p>
          </table:table-cell>
          <table:table-cell office:value-type="string">
            <text:p>be</text:p>
          </table:table-cell>
          <table:table-cell office:value-type="string">
            <text:p>EtyAC/YĒ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62">
            <text:p>1162</text:p>
          </table:table-cell>
          <table:table-cell office:value-type="string">
            <text:p>Q./S. -iel</text:p>
          </table:table-cell>
          <table:table-cell office:value-type="string">
            <text:p>daughter of</text:p>
          </table:table-cell>
          <table:table-cell table:number-columns-repeated="3"/>
          <table:table-cell office:value-type="string">
            <text:p>{YEL}/YEN</text:p>
          </table:table-cell>
          <table:table-cell office:value-type="string">
            <text:p>daughter</text:p>
          </table:table-cell>
          <table:table-cell office:value-type="string">
            <text:p>Ety/YEL</text:p>
          </table:table-cell>
          <table:table-cell office:value-type="string">
            <text:p>YE(L)</text:p>
          </table:table-cell>
          <table:table-cell office:value-type="string">
            <text:p>daughter</text:p>
          </table:table-cell>
          <table:table-cell office:value-type="string">
            <text:p>PE17/190</text:p>
          </table:table-cell>
          <table:table-cell office:value-type="string">
            <text:p>L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63">
            <text:p>1163</text:p>
          </table:table-cell>
          <table:table-cell table:number-columns-repeated="5"/>
          <table:table-cell office:value-type="string">
            <text:p>YEN</text:p>
          </table:table-cell>
          <table:table-cell office:value-type="string">
            <text:p>year</text:p>
          </table:table-cell>
          <table:table-cell office:value-type="string">
            <text:p>Ety/YEN</text:p>
          </table:table-cell>
          <table:table-cell office:value-type="string">
            <text:p>Q. yén</text:p>
          </table:table-cell>
          <table:table-cell office:value-type="string">
            <text:p>Elvish year</text:p>
          </table:table-cell>
          <table:table-cell office:value-type="string">
            <text:p>LotR/1107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64">
            <text:p>1164</text:p>
          </table:table-cell>
          <table:table-cell table:number-columns-repeated="5"/>
          <table:table-cell office:value-type="string">
            <text:p>YEN</text:p>
          </table:table-cell>
          <table:table-cell office:value-type="string">
            <text:p>daughter</text:p>
          </table:table-cell>
          <table:table-cell office:value-type="string">
            <text:p>Ety/YŌ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65">
            <text:p>1165</text:p>
          </table:table-cell>
          <table:table-cell table:number-columns-repeated="5"/>
          <table:table-cell office:value-type="string">
            <text:p>YER</text:p>
          </table:table-cell>
          <table:table-cell office:value-type="string">
            <text:p>sexual desire</text:p>
          </table:table-cell>
          <table:table-cell office:value-type="string">
            <text:p>Ety/YER</text:p>
          </table:table-cell>
          <table:table-cell office:value-type="string">
            <text:p>YER</text:p>
          </table:table-cell>
          <table:table-cell office:value-type="string">
            <text:p>desire for bodily union</text:p>
          </table:table-cell>
          <table:table-cell office:value-type="string">
            <text:p>NM/2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REN/DYEÐE</text:p>
          </table:table-cell>
          <table:table-cell office:value-type="string">
            <text:p>*iron</text:p>
          </table:table-cell>
          <table:table-cell office:value-type="string">
            <text:p>QL/36,105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67">
            <text:p>1167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desire</text:p>
          </table:table-cell>
          <table:table-cell office:value-type="string">
            <text:p>Ety/YES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68">
            <text:p>1168</text:p>
          </table:table-cell>
          <table:table-cell table:number-columns-repeated="2"/>
          <table:table-cell office:value-type="string">
            <text:p>YḶTḶ</text:p>
          </table:table-cell>
          <table:table-cell office:value-type="string">
            <text:p>*join</text:p>
          </table:table-cell>
          <table:table-cell office:value-type="string">
            <text:p>QL/106</text:p>
          </table:table-cell>
          <table:table-cell table:number-columns-repeated="6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69">
            <text:p>1169</text:p>
          </table:table-cell>
          <table:table-cell table:number-columns-repeated="8"/>
          <table:table-cell office:value-type="string">
            <text:p>YOD</text:p>
          </table:table-cell>
          <table:table-cell office:value-type="string">
            <text:p>fence, enclose</text:p>
          </table:table-cell>
          <table:table-cell office:value-type="string">
            <text:p>PE17/4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70">
            <text:p>1170</text:p>
          </table:table-cell>
          <table:table-cell office:value-type="string">
            <text:p>Q. yondo</text:p>
          </table:table-cell>
          <table:table-cell office:value-type="string">
            <text:p>son</text:p>
          </table:table-cell>
          <table:table-cell office:value-type="string">
            <text:p>Q. Y̯ó</text:p>
          </table:table-cell>
          <table:table-cell office:value-type="string">
            <text:p>son</text:p>
          </table:table-cell>
          <table:table-cell office:value-type="string">
            <text:p>QL/106</text:p>
          </table:table-cell>
          <table:table-cell office:value-type="string">
            <text:p>YŌ/YON</text:p>
          </table:table-cell>
          <table:table-cell office:value-type="string">
            <text:p>son</text:p>
          </table:table-cell>
          <table:table-cell office:value-type="string">
            <text:p>Ety/YŌ</text:p>
          </table:table-cell>
          <table:table-cell office:value-type="string">
            <text:p>YO(N)</text:p>
          </table:table-cell>
          <table:table-cell office:value-type="string">
            <text:p>son</text:p>
          </table:table-cell>
          <table:table-cell office:value-type="string">
            <text:p>PE17/190</text:p>
          </table:table-cell>
          <table:table-cell office:value-type="string">
            <text:p>Full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71">
            <text:p>1171</text:p>
          </table:table-cell>
          <table:table-cell table:number-columns-repeated="8"/>
          <table:table-cell office:value-type="string">
            <text:p>YONO</text:p>
          </table:table-cell>
          <table:table-cell office:value-type="string">
            <text:p>wide, extensive</text:p>
          </table:table-cell>
          <table:table-cell office:value-type="string">
            <text:p>PE17/4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72">
            <text:p>1172</text:p>
          </table:table-cell>
          <table:table-cell office:value-type="string">
            <text:p>S. uial</text:p>
          </table:table-cell>
          <table:table-cell office:value-type="string">
            <text:p>twilight</text:p>
          </table:table-cell>
          <table:table-cell table:number-columns-repeated="3"/>
          <table:table-cell office:value-type="string">
            <text:p>YŪ</text:p>
          </table:table-cell>
          <table:table-cell office:value-type="string">
            <text:p>two, both</text:p>
          </table:table-cell>
          <table:table-cell office:value-type="string">
            <text:p>Ety/YŪ</text:p>
          </table:table-cell>
          <table:table-cell office:value-type="string">
            <text:p>YŪ</text:p>
          </table:table-cell>
          <table:table-cell office:value-type="string">
            <text:p>both</text:p>
          </table:table-cell>
          <table:table-cell office:value-type="string">
            <text:p>PE17/70</text:p>
          </table:table-cell>
          <table:table-cell office:value-type="string">
            <text:p>Late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173">
            <text:p>1173</text:p>
          </table:table-cell>
          <table:table-cell table:number-columns-repeated="5"/>
          <table:table-cell office:value-type="string">
            <text:p>YUK</text:p>
          </table:table-cell>
          <table:table-cell office:value-type="string">
            <text:p>employ, use</text:p>
          </table:table-cell>
          <table:table-cell office:value-type="string">
            <text:p>Ety/YUK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74">
            <text:p>1174</text:p>
          </table:table-cell>
          <table:table-cell table:number-columns-repeated="5"/>
          <table:table-cell office:value-type="string">
            <text:p>YUL</text:p>
          </table:table-cell>
          <table:table-cell office:value-type="string">
            <text:p>smoulder</text:p>
          </table:table-cell>
          <table:table-cell office:value-type="string">
            <text:p>Ety/YUL</text:p>
          </table:table-cell>
          <table:table-cell table:number-columns-repeated="3"/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75">
            <text:p>1175</text:p>
          </table:table-cell>
          <table:table-cell table:number-columns-repeated="8"/>
          <table:table-cell office:value-type="string">
            <text:p>YUL</text:p>
          </table:table-cell>
          <table:table-cell office:value-type="string">
            <text:p>drink</text:p>
          </table:table-cell>
          <table:table-cell office:value-type="string">
            <text:p>PE17/63</text:p>
          </table:table-cell>
          <table:table-cell office:value-type="string">
            <text:p>Isol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76">
            <text:p>1176</text:p>
          </table:table-cell>
          <table:table-cell table:number-columns-repeated="2"/>
          <table:table-cell office:value-type="string">
            <text:p>ẎURU</text:p>
          </table:table-cell>
          <table:table-cell office:value-type="string">
            <text:p>run</text:p>
          </table:table-cell>
          <table:table-cell office:value-type="string">
            <text:p>QL/106</text:p>
          </table:table-cell>
          <table:table-cell office:value-type="string">
            <text:p>YUR</text:p>
          </table:table-cell>
          <table:table-cell office:value-type="string">
            <text:p>run</text:p>
          </table:table-cell>
          <table:table-cell office:value-type="string">
            <text:p>Ety/YUR</text:p>
          </table:table-cell>
          <table:table-cell table:number-columns-repeated="3"/>
          <table:table-cell office:value-type="string">
            <text:p>Early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SUM([.N2:.N1177])" office:value-type="float" office:value="928.699999999999">
            <text:p>928.7</text:p>
          </table:table-cell>
          <table:table-cell table:formula="of:=SUM([.O2:.O1177])" office:value-type="float" office:value="1924">
            <text:p>1924</text:p>
          </table:table-cell>
        </table:table-row>
        <table:table-row table:style-name="ro1">
          <table:table-cell table:number-columns-repeated="15"/>
          <table:table-cell table:formula="of:=[.P1178]/[.Q1178]" office:value-type="float" office:value="0.482692307692307">
            <text:p>0.4826923077</text:p>
          </table:table-cell>
          <table:table-cell/>
        </table:table-row>
        <table:table-row table:style-name="ro1" table:number-rows-repeated="104733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O11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5">06/15/2022</text:date>, <text:time>07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track</meta:initial-creator>
    <meta:creation-date>2022-05-17T08:00:37</meta:creation-date>
    <dc:date>2022-06-15T07:26:02</dc:date>
    <dc:creator>Paul Strack</dc:creator>
    <meta:editing-duration>P23DT20H41M39S</meta:editing-duration>
    <meta:editing-cycles>2888</meta:editing-cycles>
    <meta:generator>OpenOffice/4.1.11$Unix OpenOffice.org_project/4111m1$Build-9808</meta:generator>
    <meta:document-statistic meta:table-count="3" meta:cell-count="11072" meta:object-count="0"/>
  </office:meta>
</office:document-meta>
</file>